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formx="urn:openoffice:names:experimental:ooxml-odf-interop:xmlns:form:1.0" xmlns:dom="http://www.w3.org/2001/xml-events" xmlns:xforms="http://www.w3.org/2002/xforms" xmlns:xsd="http://www.w3.org/2001/XMLSchema" xmlns:xsi="http://www.w3.org/2001/XMLSchema-instance" xmlns:xhtml="http://www.w3.org/1999/xhtml" xmlns:grddl="http://www.w3.org/2003/g/data-view#"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9cm"/>
    </style:style>
    <style:style style:name="co2" style:family="table-column">
      <style:table-column-properties fo:break-before="auto" style:column-width="5.318cm"/>
    </style:style>
    <style:style style:name="co3" style:family="table-column">
      <style:table-column-properties fo:break-before="auto" style:column-width="27.014cm"/>
    </style:style>
    <style:style style:name="co4" style:family="table-column">
      <style:table-column-properties fo:break-before="auto" style:column-width="27.199cm"/>
    </style:style>
    <style:style style:name="co5" style:family="table-column">
      <style:table-column-properties fo:break-before="auto" style:column-width="47.413cm"/>
    </style:style>
    <style:style style:name="co6" style:family="table-column">
      <style:table-column-properties fo:break-before="auto" style:column-width="14.155cm"/>
    </style:style>
    <style:style style:name="co7" style:family="table-column">
      <style:table-column-properties fo:break-before="auto" style:column-width="25.982cm"/>
    </style:style>
    <style:style style:name="co8" style:family="table-column">
      <style:table-column-properties fo:break-before="auto" style:column-width="39.661cm"/>
    </style:style>
    <style:style style:name="co9" style:family="table-column">
      <style:table-column-properties fo:break-before="auto" style:column-width="8.308cm"/>
    </style:style>
    <style:style style:name="co10" style:family="table-column">
      <style:table-column-properties fo:break-before="auto" style:column-width="4.339cm"/>
    </style:style>
    <style:style style:name="co11" style:family="table-column">
      <style:table-column-properties fo:break-before="auto" style:column-width="2.249cm"/>
    </style:style>
    <style:style style:name="ro1" style:family="table-row">
      <style:table-row-properties style:row-height="0.45cm" fo:break-before="auto" style:use-optimal-row-height="true"/>
    </style:style>
    <style:style style:name="ta1" style:family="table" style:master-page-name="mp1">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2" style:family="table-cell" style:parent-style-name="Default" style:data-style-name="N0">
      <style:table-cell-properties fo:background-color="#ffff00" style:text-align-source="fix" style:repeat-content="false" style:vertical-align="automatic"/>
      <style:paragraph-properties fo:text-align="start" fo:margin-left="0cm"/>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49"/>
  </office:automatic-styles>
  <office:body>
    <office:spreadsheet>
      <table:calculation-settings table:automatic-find-labels="false" table:use-regular-expressions="false" table:use-wildcards="true"/>
      <table:table table:name="icd_combined"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5" table:default-cell-style-name="ce3"/>
        <table:table-column table:style-name="co6" table:default-cell-style-name="ce3"/>
        <table:table-column table:style-name="co7" table:default-cell-style-name="ce3"/>
        <table:table-column table:style-name="co8" table:default-cell-style-name="ce3"/>
        <table:table-column table:style-name="co5" table:number-columns-repeated="4" table:default-cell-style-name="ce3"/>
        <table:table-column table:style-name="co9" table:default-cell-style-name="ce3"/>
        <table:table-column table:style-name="co5" table:number-columns-repeated="3" table:default-cell-style-name="ce3"/>
        <table:table-column table:style-name="co10" table:default-cell-style-name="ce3"/>
        <table:table-column table:style-name="co11" table:number-columns-repeated="16363"/>
        <table:table-row table:style-name="ro1">
          <table:table-cell table:style-name="ce2" office:value-type="string">
            <text:p>International Code Designator (ICD)</text:p>
          </table:table-cell>
          <table:table-cell table:style-name="ce2" office:value-type="string">
            <text:p>'Scheme' equal 'Coding System'</text:p>
          </table:table-cell>
          <table:table-cell table:style-name="ce2" office:value-type="string">
            <text:p>Name of Scheme</text:p>
          </table:table-cell>
          <table:table-cell table:style-name="ce2" office:value-type="string">
            <text:p>Name of Coding System</text:p>
          </table:table-cell>
          <table:table-cell table:style-name="ce2" office:value-type="string">
            <text:p>Intended Purpose/App. Area</text:p>
          </table:table-cell>
          <table:table-cell table:style-name="ce2" office:value-type="string">
            <text:p>Issuing Organization</text:p>
          </table:table-cell>
          <table:table-cell table:style-name="ce2" office:value-type="string">
            <text:p>Structure of Code</text:p>
          </table:table-cell>
          <table:table-cell table:style-name="ce2" office:value-type="string">
            <text:p>Display Requirements</text:p>
          </table:table-cell>
          <table:table-cell table:style-name="ce2" office:value-type="string">
            <text:p>Character Repertoire</text:p>
          </table:table-cell>
          <table:table-cell table:style-name="ce2" office:value-type="string">
            <text:p>Language(s) Used</text:p>
          </table:table-cell>
          <table:table-cell table:style-name="ce2" office:value-type="string">
            <text:p>Supports Org. Parts?</text:p>
          </table:table-cell>
          <table:table-cell table:style-name="ce2" office:value-type="string">
            <text:p>Org. Identifier Reuse</text:p>
          </table:table-cell>
          <table:table-cell table:style-name="ce2" office:value-type="string">
            <text:p>Orgs Covered by System</text:p>
          </table:table-cell>
          <table:table-cell table:style-name="ce2" office:value-type="string">
            <text:p>Notes on Use of Code</text:p>
          </table:table-cell>
          <table:table-cell table:style-name="ce2" office:value-type="string">
            <text:p>Alt. Names for Scheme</text:p>
          </table:table-cell>
          <table:table-cell table:style-name="ce2" office:value-type="string">
            <text:p>Sponsoring Authority</text:p>
          </table:table-cell>
          <table:table-cell table:style-name="ce2" office:value-type="string">
            <text:p>Date of Issue of ICD</text:p>
          </table:table-cell>
          <table:table-cell table:style-name="ce2" office:value-type="string">
            <text:p>Additional Comments</text:p>
          </table:table-cell>
          <table:table-cell table:style-name="ce2" office:value-type="string">
            <text:p>number of characters and their significance, if any: 1)</text:p>
          </table:table-cell>
          <table:table-cell table:style-name="ce2" office:value-type="string">
            <text:p>identification of the check digit characters, if any: 2)</text:p>
          </table:table-cell>
          <table:table-cell table:style-name="ce2" office:value-type="string">
            <text:p>Record Last Updated</text:p>
          </table:table-cell>
          <table:table-cell table:style-name="ce2" table:number-columns-repeated="16363"/>
        </table:table-row>
        <table:table-row table:style-name="ro1" table:visibility="filter">
          <table:table-cell office:value-type="float" office:value="1">
            <text:p>1</text:p>
          </table:table-cell>
          <table:table-cell table:style-name="ce4" office:value-type="string">
            <text:p>true</text:p>
          </table:table-cell>
          <table:table-cell table:number-columns-repeated="2" office:value-type="string">
            <text:p>(Not Assigned)</text:p>
          </table:table-cell>
          <table:table-cell table:number-columns-repeated="17"/>
          <table:table-cell table:style-name="ce3" table:number-columns-repeated="16363"/>
        </table:table-row>
        <table:table-row table:style-name="ro1" table:visibility="filter">
          <table:table-cell office:value-type="float" office:value="2">
            <text:p>2</text:p>
          </table:table-cell>
          <table:table-cell table:style-name="ce4" office:value-type="string">
            <text:p>true</text:p>
          </table:table-cell>
          <table:table-cell table:number-columns-repeated="2" office:value-type="string">
            <text:p>System Information et Repertoire des Entreprise et des Etablissements: SIRENE</text:p>
          </table:table-cell>
          <table:table-cell/>
          <table:table-cell office:value-type="string">
            <text:p>Institut National de la Statistique et des Etudes Economiques, (I.N.S.E.E.),\nDepartement des Repertoires, 18, Bd Adolphe Pinard, 75675 PARIS Cedex 14, Tel:\n540 1212, Tlx:204924 INSEE F</text:p>
          </table:table-cell>
          <table:table-cell office:value-type="string">
            <text:p>1) Number of characters: 9 characters ("SIREN") 14 " 9+5 ("SIRET"), The 9 character\nnumber designates an organization, The 14 character number designates a specific\nestablishment of the organization designated by the first 9 characters. <text:s/>2) Check\ndigits: 9th &amp; 14th character respectively</text:p>
          </table:table-cell>
          <table:table-cell office:value-type="string">
            <text:p>The 9 figure code number (SIREN) is written in groups of 3 characters. <text:s/>Example:\n784 301 772, The 14 figure code number is written in 3 groups of 3 characters and a\nsingle group of 5. <text:s/>Example: 784 301 772 00025</text:p>
          </table:table-cell>
          <table:table-cell table:number-columns-repeated="4"/>
          <table:table-cell office:value-type="string">
            <text:p>Enterprises; (individual enterprises or companies) in the field of agriculture, industry,\ntrade, services, Associations; Authorities, regional authorities and public\nestablishments, active in France. <text:s/>Number of units covered: approximately</text:p>
          </table:table-cell>
          <table:table-cell office:value-type="string">
            <text:p>The Sirene number is used in France mainly for the official registration in the Trade\nRegister and as the only number used between authorities and organizations, and\nbetween authorities when dealing with data interchange on organizations.</text:p>
          </table:table-cell>
          <table:table-cell/>
          <table:table-cell office:value-type="string">
            <text:p>Association Francaise de Normalisation: AFNOR</text:p>
          </table:table-cell>
          <table:table-cell table:style-name="ce4" office:value-type="string">
            <text:p>Jan 198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3">
            <text:p>3</text:p>
          </table:table-cell>
          <table:table-cell table:style-name="ce4" office:value-type="string">
            <text:p>true</text:p>
          </table:table-cell>
          <table:table-cell table:number-columns-repeated="2" office:value-type="string">
            <text:p>Codification Numerique des Etablissments Financiers En Belgique</text:p>
          </table:table-cell>
          <table:table-cell/>
          <table:table-cell office:value-type="string">
            <text:p>Association Belge des Banques, rue Ravenstein 36, Bte 5, 1000 BRUXELLES, Tel:\n02 512 5868</text:p>
          </table:table-cell>
          <table:table-cell office:value-type="string">
            <text:p>1) 3 numeric digits, 2) None</text:p>
          </table:table-cell>
          <table:table-cell office:value-type="string">
            <text:p>In one group of three</text:p>
          </table:table-cell>
          <table:table-cell table:number-columns-repeated="4"/>
          <table:table-cell office:value-type="string">
            <text:p>All financial institutions in Belgium.</text:p>
          </table:table-cell>
          <table:table-cell office:value-type="string">
            <text:p>Many financial institutions have more than one code number, e.g. to indicate each\nbranch individually. <text:s/>The codes can be reallocated over the time (mostly in the case\nwhere a financial institution terminates its activity). <text:s/>Some code numbers are\ncurrently unused. <text:s/>Code numbers 990 through 999 are reserved.</text:p>
          </table:table-cell>
          <table:table-cell/>
          <table:table-cell office:value-type="string">
            <text:p>Organization for Data Exchange by Tele Transmission in Europe: ODETTE</text:p>
          </table:table-cell>
          <table:table-cell table:style-name="ce4" office:value-type="string">
            <text:p>Feb 198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4">
            <text:p>4</text:p>
          </table:table-cell>
          <table:table-cell table:style-name="ce4" office:value-type="string">
            <text:p>true</text:p>
          </table:table-cell>
          <table:table-cell table:number-columns-repeated="2" office:value-type="string">
            <text:p>NBS/OSI NETWORK</text:p>
          </table:table-cell>
          <table:table-cell/>
          <table:table-cell office:value-type="string">
            <text:p>National Bureau of Standards, Bldg 225 Room B151, Gaithersburg MD, 20899, USA,\nTel: 301 975 2833, Tlx: 197674 NBS UT</text:p>
          </table:table-cell>
          <table:table-cell office:value-type="string">
            <text:p>1) 0004 OSINET Open System Interconnection Network, 2) No check digits are\nneeded as the whole message has a checking mechanism.</text:p>
          </table:table-cell>
          <table:table-cell office:value-type="string">
            <text:p>None except that all fields are left justified.</text:p>
          </table:table-cell>
          <table:table-cell table:number-columns-repeated="4"/>
          <table:table-cell office:value-type="string">
            <text:p>NBS will assign a sub value to any company or organizations that, participates in the\nOSINET. <text:s/>The covered by program encompasses companies in the US as well as\nthe code Europe and Asia.</text:p>
          </table:table-cell>
          <table:table-cell office:value-type="string">
            <text:p>The ICD code forms the initial part of the OSI network addressing and naming tree as\ndepicted in Addendum 2 to ISO 8348.</text:p>
          </table:table-cell>
          <table:table-cell/>
          <table:table-cell office:value-type="string">
            <text:p>American National Standards Institute: ANSI</text:p>
          </table:table-cell>
          <table:table-cell table:style-name="ce4" office:value-type="string">
            <text:p>Feb 1988</text:p>
          </table:table-cell>
          <table:table-cell table:number-columns-repeated="4"/>
          <table:table-cell table:style-name="ce3" table:number-columns-repeated="16363"/>
        </table:table-row>
        <table:table-row table:style-name="ro1" table:visibility="filter">
          <table:table-cell office:value-type="float" office:value="5">
            <text:p>5</text:p>
          </table:table-cell>
          <table:table-cell table:style-name="ce4" office:value-type="string">
            <text:p>true</text:p>
          </table:table-cell>
          <table:table-cell table:number-columns-repeated="2" office:value-type="string">
            <text:p>USA FED GOV OSI NETWORK</text:p>
          </table:table-cell>
          <table:table-cell/>
          <table:table-cell office:value-type="string">
            <text:p>National Bureau of Standards, Bldg 225 Room B151, Gaithersburg MD, 20899, USA,\nTel: 301 975 2833, Tlx: 197674 NBS UT</text:p>
          </table:table-cell>
          <table:table-cell office:value-type="string">
            <text:p>1) 0005 GOSNET United States Federal Government Open System Interconnection\nNetwork, 2) No check digits are needed as the whole message has a checking\nmechanism.</text:p>
          </table:table-cell>
          <table:table-cell office:value-type="string">
            <text:p>None except that all fields are left justified</text:p>
          </table:table-cell>
          <table:table-cell table:number-columns-repeated="4"/>
          <table:table-cell office:value-type="string">
            <text:p>NBS will assign a sub value to any company or organizations that participates in the\nGovernment Open System Interconnection Network. <text:s/>This program encompasses\ngovernmental offices throughout the world.</text:p>
          </table:table-cell>
          <table:table-cell office:value-type="string">
            <text:p>The ICD code forms the initial part of the OSI network addressing and naming tree as\ndepicted in Addendum 2 to ISO 8348.</text:p>
          </table:table-cell>
          <table:table-cell/>
          <table:table-cell office:value-type="string">
            <text:p>American National Standards Institute: ANSI</text:p>
          </table:table-cell>
          <table:table-cell table:style-name="ce4" office:value-type="string">
            <text:p>Feb 1988</text:p>
          </table:table-cell>
          <table:table-cell table:number-columns-repeated="4"/>
          <table:table-cell table:style-name="ce3" table:number-columns-repeated="16363"/>
        </table:table-row>
        <table:table-row table:style-name="ro1" table:visibility="filter">
          <table:table-cell office:value-type="float" office:value="6">
            <text:p>6</text:p>
          </table:table-cell>
          <table:table-cell table:style-name="ce4" office:value-type="string">
            <text:p>true</text:p>
          </table:table-cell>
          <table:table-cell table:number-columns-repeated="2" office:value-type="string">
            <text:p>USA DOD OSI NETWORK</text:p>
          </table:table-cell>
          <table:table-cell/>
          <table:table-cell office:value-type="string">
            <text:p>Defense Communication Agency, DSEC - R130, 1860 Wiehle Ave, Reston VA,\n22090-5500, Tel: 703 437-2802, Fax: 703 437-2382</text:p>
          </table:table-cell>
          <table:table-cell office:value-type="string">
            <text:p>1) 0006 DODNET Open System Interconnection Network for the Department of\nDefense USA, 2) No check digits are needed as the whole message has a checking\nmechanism.</text:p>
          </table:table-cell>
          <table:table-cell office:value-type="string">
            <text:p>None except that all fields are left justified.</text:p>
          </table:table-cell>
          <table:table-cell table:number-columns-repeated="4"/>
          <table:table-cell office:value-type="string">
            <text:p>US DOD will assign a sub value to any commands, the bases, or field activities that\nparticipates in the DOD OSI network program. <text:s/>The program encompasses all\nmilitary commands throughout the entire world.</text:p>
          </table:table-cell>
          <table:table-cell office:value-type="string">
            <text:p>The ICD code forms the initial part of the OSI network addressing and naming tree as\ndepicted in Addendum 2 to ISO 8348.</text:p>
          </table:table-cell>
          <table:table-cell/>
          <table:table-cell office:value-type="string">
            <text:p>American National Standards Institute: ANSI</text:p>
          </table:table-cell>
          <table:table-cell table:style-name="ce4" office:value-type="string">
            <text:p>Feb 1988</text:p>
          </table:table-cell>
          <table:table-cell table:number-columns-repeated="4"/>
          <table:table-cell table:style-name="ce3" table:number-columns-repeated="16363"/>
        </table:table-row>
        <table:table-row table:style-name="ro1" table:visibility="filter">
          <table:table-cell office:value-type="float" office:value="7">
            <text:p>7</text:p>
          </table:table-cell>
          <table:table-cell table:style-name="ce4" office:value-type="string">
            <text:p>true</text:p>
          </table:table-cell>
          <table:table-cell table:number-columns-repeated="2" office:value-type="string">
            <text:p>Organisationsnummer</text:p>
          </table:table-cell>
          <table:table-cell/>
          <table:table-cell office:value-type="string">
            <text:p>The National Tax Board, (Riksskatteverket, RSV), 171 94 SOLNA, SWEDEN, Tel: 08\n981520</text:p>
          </table:table-cell>
          <table:table-cell office:value-type="string">
            <text:p>1) 10 digits. <text:s/>1st digit = Group number, 2nd - 9th digit = Ordinalnumber1st digit, =\nGroup number, 10th digit = Check digit, 2) Last digit.</text:p>
          </table:table-cell>
          <table:table-cell office:value-type="string">
            <text:p>Single group of 10 digits.</text:p>
          </table:table-cell>
          <table:table-cell table:number-columns-repeated="4"/>
          <table:table-cell office:value-type="string">
            <text:p>All persons registered in Sweden for tax purposes.</text:p>
          </table:table-cell>
          <table:table-cell office:value-type="string">
            <text:p>The third digit in the organisation number is never lower than 2 in order to avoid it\nbeing confused with personal numbers.</text:p>
          </table:table-cell>
          <table:table-cell/>
          <table:table-cell office:value-type="string">
            <text:p>Organization for Data Exchange by Tele Transmission in Europe: ODETTE</text:p>
          </table:table-cell>
          <table:table-cell table:style-name="ce4" office:value-type="string">
            <text:p>Nov 1986</text:p>
          </table:table-cell>
          <table:table-cell table:number-columns-repeated="4"/>
          <table:table-cell table:style-name="ce3" table:number-columns-repeated="16363"/>
        </table:table-row>
        <table:table-row table:style-name="ro1" table:visibility="filter">
          <table:table-cell office:value-type="float" office:value="8">
            <text:p>8</text:p>
          </table:table-cell>
          <table:table-cell table:style-name="ce4" office:value-type="string">
            <text:p>true</text:p>
          </table:table-cell>
          <table:table-cell table:number-columns-repeated="2" office:value-type="string">
            <text:p>LE NUMERO NATIONAL</text:p>
          </table:table-cell>
          <table:table-cell/>
          <table:table-cell office:value-type="string">
            <text:p>Ministere De L'interieur et de la Fonction Publique, Cite administrative de l'Etat, Tour\ndes Finances, Bd. <text:s/>Pacheco. 19 - Bte 20, 1010 Bruxelles.</text:p>
          </table:table-cell>
          <table:table-cell office:value-type="string">
            <text:p>1) 13 characters, 2) 8th &amp; 9th characters</text:p>
          </table:table-cell>
          <table:table-cell office:value-type="string">
            <text:p>Four groups, Group 1 = single digit, Group 2 = six digits, Group 3 = two digits (check\ndigits), Group 4 = four digits</text:p>
          </table:table-cell>
          <table:table-cell table:number-columns-repeated="4"/>
          <table:table-cell office:value-type="string">
            <text:p>Business registered for tax purposes.</text:p>
          </table:table-cell>
          <table:table-cell office:value-type="string">
            <text:p>None</text:p>
          </table:table-cell>
          <table:table-cell/>
          <table:table-cell office:value-type="string">
            <text:p>Organization for Data Exchange by Tele Transmission in Europe: ODETTE</text:p>
          </table:table-cell>
          <table:table-cell table:style-name="ce4" office:value-type="string">
            <text:p>Apr 1986</text:p>
          </table:table-cell>
          <table:table-cell table:number-columns-repeated="4"/>
          <table:table-cell table:style-name="ce3" table:number-columns-repeated="16363"/>
        </table:table-row>
        <table:table-row table:style-name="ro1" table:visibility="filter">
          <table:table-cell office:value-type="float" office:value="9">
            <text:p>9</text:p>
          </table:table-cell>
          <table:table-cell table:style-name="ce4" office:value-type="string">
            <text:p>true</text:p>
          </table:table-cell>
          <table:table-cell table:number-columns-repeated="2" office:value-type="string">
            <text:p>SIRET-CODE</text:p>
          </table:table-cell>
          <table:table-cell/>
          <table:table-cell office:value-type="string">
            <text:p>DU PONT DE NEMOURS (FRANCE) S.A. <text:s/>137, rue de l'Universite, F-75334, PARIS\nCedex 07, Tel: 1 45 50 65 50</text:p>
          </table:table-cell>
          <table:table-cell office:value-type="string">
            <text:p>1) 14 digits, 2) None</text:p>
          </table:table-cell>
          <table:table-cell office:value-type="string">
            <text:p>In four groups, Groups 1 - 3 = three digits each, Group 4 = five digits</text:p>
          </table:table-cell>
          <table:table-cell table:number-columns-repeated="4"/>
          <table:table-cell office:value-type="string">
            <text:p>Used for CEFIC Trials.</text:p>
          </table:table-cell>
          <table:table-cell office:value-type="string">
            <text:p>None</text:p>
          </table:table-cell>
          <table:table-cell table:number-columns-repeated="2"/>
          <table:table-cell table:style-name="ce4" office:value-type="string">
            <text:p>Apr 1988</text:p>
          </table:table-cell>
          <table:table-cell table:number-columns-repeated="4"/>
          <table:table-cell table:style-name="ce3" table:number-columns-repeated="16363"/>
        </table:table-row>
        <table:table-row table:style-name="ro1" table:visibility="filter">
          <table:table-cell office:value-type="float" office:value="10">
            <text:p>10</text:p>
          </table:table-cell>
          <table:table-cell table:style-name="ce4" office:value-type="string">
            <text:p>true</text:p>
          </table:table-cell>
          <table:table-cell table:number-columns-repeated="2" office:value-type="string">
            <text:p>Organizational Identifiers for Structured Names under ISO 9541 Part 2</text:p>
          </table:table-cell>
          <table:table-cell/>
          <table:table-cell office:value-type="string">
            <text:p>Association for Font Information Interchange: AFII, 2961 Copa de Oro, Los Alamites,\nCalifornia 90720, USA, Tel: 1 213 333 4642, Fax: 1 213 333 4664</text:p>
          </table:table-cell>
          <table:table-cell office:value-type="string">
            <text:p>1) Between 1 - 14 characters (letters, digits and hyphens only). <text:s/>2) None</text:p>
          </table:table-cell>
          <table:table-cell office:value-type="string">
            <text:p>None</text:p>
          </table:table-cell>
          <table:table-cell table:number-columns-repeated="4"/>
          <table:table-cell office:value-type="string">
            <text:p>Any organization which applied to be covered under visions of ISO 9541-2, in order\nthat they may create structured names as defined in the above standard.</text:p>
          </table:table-cell>
          <table:table-cell office:value-type="string">
            <text:p>The organizational codes established under this coding systems constitute the\nregistered organizational identifiers recognised under ISO 9541-2. <text:s/>That standard\neffectively establishes agreements under which, as allowed by clauses 5.1 and 5.3 of\nISO 6523, both the ICD and the organization name are generally omitted, from the\nSIO, and thus only the organization code portion of the SIO is interchanged.</text:p>
          </table:table-cell>
          <table:table-cell/>
          <table:table-cell office:value-type="string">
            <text:p>Association for Font Information Interchange: AFII</text:p>
          </table:table-cell>
          <table:table-cell table:style-name="ce4" office:value-type="string">
            <text:p>Apr 1988</text:p>
          </table:table-cell>
          <table:table-cell table:number-columns-repeated="4"/>
          <table:table-cell table:style-name="ce3" table:number-columns-repeated="16363"/>
        </table:table-row>
        <table:table-row table:style-name="ro1">
          <table:table-cell office:value-type="float" office:value="11">
            <text:p>11</text:p>
          </table:table-cell>
          <table:table-cell table:style-name="ce4" office:value-type="string">
            <text:p>false</text:p>
          </table:table-cell>
          <table:table-cell office:value-type="string">
            <text:p>International Code Designator for the Identification of OSI-based, Amateur Radio Organizations, Network Objects and Application Services.</text:p>
          </table:table-cell>
          <table:table-cell office:value-type="string">
            <text:p>International Code Designator for the Identification of OSI-based, Amateur Radio\nOrganizations, Network Objects and Application Services.</text:p>
          </table:table-cell>
          <table:table-cell/>
          <table:table-cell office:value-type="string">
            <text:p>The Radio Amateur Telecommunications Society, 206 North Vivyen Street,\nBergenfield, New Jersey 07621, Tel: 201-387-8896</text:p>
          </table:table-cell>
          <table:table-cell office:value-type="string">
            <text:p>1) The format of the code is: Class Instance, a. The Class is a field which indicates\nthe general category of object such as the identified organization, network element or\napplication services. <text:s/>b. The Instance is a field which indicates the specific instance\nof the organization, network element or application service. <text:s/>c. These fields shall be\nseparated by any non-alphabetic, non-numeric, printable IA5 character. <text:s/>2) None</text:p>
          </table:table-cell>
          <table:table-cell office:value-type="string">
            <text:p>The "Class" and "Instance" field combine to unique identify a particular organization,\nnetwork element or application service. <text:s/>In applications where the "Instance" implicity\nreflects the "Class" to the user, the "Class" field may be omitted.</text:p>
          </table:table-cell>
          <table:table-cell table:number-columns-repeated="4"/>
          <table:table-cell office:value-type="string">
            <text:p>Amateur Radio groups which wish to participate in the OSI-based network fostered\nby our work and the work of our members and affiliated groups.</text:p>
          </table:table-cell>
          <table:table-cell office:value-type="string">
            <text:p>Specific object and attribute naming conventions are currently being defined.</text:p>
          </table:table-cell>
          <table:table-cell/>
          <table:table-cell office:value-type="string">
            <text:p>American National Standards Institute: ANSI</text:p>
          </table:table-cell>
          <table:table-cell table:style-name="ce4" office:value-type="string">
            <text:p>Apr 1988</text:p>
          </table:table-cell>
          <table:table-cell table:number-columns-repeated="4"/>
          <table:table-cell table:style-name="ce3" table:number-columns-repeated="16363"/>
        </table:table-row>
        <table:table-row table:style-name="ro1" table:visibility="filter">
          <table:table-cell office:value-type="float" office:value="12">
            <text:p>12</text:p>
          </table:table-cell>
          <table:table-cell table:style-name="ce4" office:value-type="string">
            <text:p>true</text:p>
          </table:table-cell>
          <table:table-cell table:number-columns-repeated="2" office:value-type="string">
            <text:p>European Computer Manufacturers Association: ECMA</text:p>
          </table:table-cell>
          <table:table-cell/>
          <table:table-cell office:value-type="string">
            <text:p>European Computer Manufacturers Association, rue du Rhone 114, 1204 Geneva,\nSWITZERLAND Tel: 41 22 735 36 34, Tlx 22288 ECMA CH</text:p>
          </table:table-cell>
          <table:table-cell office:value-type="string">
            <text:p>1) Three fields, First field = ICD, Second field = Organization Code, four-digit number,\n1000-9989, Third field = Organization Name, upto 250 characters, 2) None</text:p>
          </table:table-cell>
          <table:table-cell office:value-type="string">
            <text:p>None</text:p>
          </table:table-cell>
          <table:table-cell table:number-columns-repeated="4"/>
          <table:table-cell office:value-type="string">
            <text:p>Member companies of ECMA</text:p>
          </table:table-cell>
          <table:table-cell office:value-type="string">
            <text:p>None</text:p>
          </table:table-cell>
          <table:table-cell/>
          <table:table-cell office:value-type="string">
            <text:p>European Computer Manufacturers Association: ECMA</text:p>
          </table:table-cell>
          <table:table-cell table:style-name="ce4" office:value-type="string">
            <text:p>Sep 198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
            <text:p>13</text:p>
          </table:table-cell>
          <table:table-cell table:style-name="ce4" office:value-type="string">
            <text:p>true</text:p>
          </table:table-cell>
          <table:table-cell table:number-columns-repeated="2" office:value-type="string">
            <text:p>VSA FTP CODE (FTP = File Transfer Protocol)</text:p>
          </table:table-cell>
          <table:table-cell/>
          <table:table-cell office:value-type="string">
            <text:p>Verband der Automobilindustrie e.V. <text:s/>Westendstrasse 61, 6000 Frankfurt/M.1,\nGERMANY, Tel: 0 69 75 702 81, Tlx: 411293</text:p>
          </table:table-cell>
          <table:table-cell office:value-type="string">
            <text:p>1) Four fields, First field = four digit, ICD code, Second field = six characters, Third\nfield = eight characters, identification of organization. <text:s/>Fourth field = six characters,\nspecial identification (e.g. sub-address), if required. <text:s/>2) None</text:p>
          </table:table-cell>
          <table:table-cell office:value-type="string">
            <text:p>Identification of the organization field may only use capital letters, digits 1 -9 and\nhyphens.</text:p>
          </table:table-cell>
          <table:table-cell table:number-columns-repeated="4"/>
          <table:table-cell office:value-type="string">
            <text:p>Motorcar manufacturer and motor suppliers</text:p>
          </table:table-cell>
          <table:table-cell office:value-type="string">
            <text:p>The code serves the addressing between the communicating partners</text:p>
          </table:table-cell>
          <table:table-cell/>
          <table:table-cell office:value-type="string">
            <text:p>Deutsches Institut fur Normung e.V.: DIN</text:p>
          </table:table-cell>
          <table:table-cell table:style-name="ce4" office:value-type="string">
            <text:p>Apr 1989</text:p>
          </table:table-cell>
          <table:table-cell table:number-columns-repeated="4"/>
          <table:table-cell table:style-name="ce3" table:number-columns-repeated="16363"/>
        </table:table-row>
        <table:table-row table:style-name="ro1" table:visibility="filter">
          <table:table-cell office:value-type="float" office:value="14">
            <text:p>14</text:p>
          </table:table-cell>
          <table:table-cell table:style-name="ce4" office:value-type="string">
            <text:p>true</text:p>
          </table:table-cell>
          <table:table-cell table:number-columns-repeated="2" office:value-type="string">
            <text:p>NIST/OSI Implememts' Workshop</text:p>
          </table:table-cell>
          <table:table-cell/>
          <table:table-cell office:value-type="string">
            <text:p>United States Department of Commerce, National Institute of Standards and\nTechnology, Gaithersburg, Maryland 20899, USA, Tel: 301 975 2833, Tlx: 197674</text:p>
          </table:table-cell>
          <table:table-cell office:value-type="string">
            <text:p>1) 0014 OWI NIST Workshop for Implementors of OSI, 2) No check digits are needed\nas the whole message has checking mechanism</text:p>
          </table:table-cell>
          <table:table-cell office:value-type="string">
            <text:p>None, except that all fields are left justified.</text:p>
          </table:table-cell>
          <table:table-cell table:number-columns-repeated="4"/>
          <table:table-cell office:value-type="string">
            <text:p>NIST/OSI Workshop attenders will assign a sub value to any special interest group\nthat is approved and chartered by the Workshop, if it is appropriate to assign such\nsub values. <text:s/>The Workshop, is an open, public, international forum.</text:p>
          </table:table-cell>
          <table:table-cell office:value-type="string">
            <text:p>The ICD code forms the initial part of the Workshop naming and addressing tree.</text:p>
          </table:table-cell>
          <table:table-cell/>
          <table:table-cell office:value-type="string">
            <text:p>United States Department of Commerce.</text:p>
          </table:table-cell>
          <table:table-cell table:style-name="ce4" office:value-type="string">
            <text:p>Aug 198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
            <text:p>15</text:p>
          </table:table-cell>
          <table:table-cell table:style-name="ce4" office:value-type="string">
            <text:p>true</text:p>
          </table:table-cell>
          <table:table-cell table:number-columns-repeated="2" office:value-type="string">
            <text:p>Electronic Data Interchange: EDI</text:p>
          </table:table-cell>
          <table:table-cell/>
          <table:table-cell office:value-type="string">
            <text:p>Avon Rubber p.l.c. <text:s/>Bath Road, Melksham, Wiltshire, SN12 8AA, Tel: 0225 703101,\nFax: 0225 707880</text:p>
          </table:table-cell>
          <table:table-cell office:value-type="string">
            <text:p>1) details not received yet, 2)</text:p>
          </table:table-cell>
          <table:table-cell office:value-type="string">
            <text:p>Details not received yet</text:p>
          </table:table-cell>
          <table:table-cell table:number-columns-repeated="4"/>
          <table:table-cell table:number-columns-repeated="2" office:value-type="string">
            <text:p>Details not received yet</text:p>
          </table:table-cell>
          <table:table-cell/>
          <table:table-cell office:value-type="string">
            <text:p>None</text:p>
          </table:table-cell>
          <table:table-cell office:value-type="string">
            <text:p>Not confirmed, awaiting above details</text:p>
          </table:table-cell>
          <table:table-cell office:value-type="string">
            <text:p>(PROVISIONAL)</text:p>
          </table:table-cell>
          <table:table-cell table:number-columns-repeated="3"/>
          <table:table-cell table:style-name="ce3" table:number-columns-repeated="16363"/>
        </table:table-row>
        <table:table-row table:style-name="ro1" table:visibility="filter">
          <table:table-cell office:value-type="float" office:value="16">
            <text:p>16</text:p>
          </table:table-cell>
          <table:table-cell table:style-name="ce4" office:value-type="string">
            <text:p>true</text:p>
          </table:table-cell>
          <table:table-cell table:number-columns-repeated="2" office:value-type="string">
            <text:p>EWOS Object Identifiers</text:p>
          </table:table-cell>
          <table:table-cell/>
          <table:table-cell office:value-type="string">
            <text:p>EWOS (European Workshop for Open Systems), Rue de Stassart 36, B-1050\nBrussels, BELGIUM, Tel: 32 2 511 7455, Fax: 32 2 511 8723</text:p>
          </table:table-cell>
          <table:table-cell office:value-type="string">
            <text:p>1) Digit ICD code = 0016, Organization Code = 4 characters, Organization Name =\n34 characters, 2) None</text:p>
          </table:table-cell>
          <table:table-cell office:value-type="string">
            <text:p>Communication: A solidus (/) is used as a separate, the SIO shall be terminated by\na double solidus(//). <text:s/>Display: When the SIO is displayed or printed, the ICD, the\norganization code and the organization name shall be separated by one or more\nspaces.</text:p>
          </table:table-cell>
          <table:table-cell table:number-columns-repeated="4"/>
          <table:table-cell office:value-type="string">
            <text:p>EWOS is the European Regional Workshop for the elaboration f, Functional\nstandards, the taxonomy for which is described in JTC 1 TR 10000, in cooperation\nwith the other Regional Workshops (N-IOW and AOW) in order to ensure\nInternational harmonization.</text:p>
          </table:table-cell>
          <table:table-cell office:value-type="string">
            <text:p>a) In the SIO the Organization Name will normally be omitted, b) The code is\nprimarily intended for the registration of Objects Identifiers according to ISO 8824:\nLevel 1: iso (1), Level 2: identified-organization (3), Level 3: ewos (0016), Level 4: and\nhigher: (defined by EWOS conventions)</text:p>
          </table:table-cell>
          <table:table-cell/>
          <table:table-cell office:value-type="string">
            <text:p>European Workshop for Open Systems</text:p>
          </table:table-cell>
          <table:table-cell table:style-name="ce4" office:value-type="string">
            <text:p>Oct 1990</text:p>
          </table:table-cell>
          <table:table-cell table:number-columns-repeated="4"/>
          <table:table-cell table:style-name="ce3" table:number-columns-repeated="16363"/>
        </table:table-row>
        <table:table-row table:style-name="ro1" table:visibility="filter">
          <table:table-cell office:value-type="float" office:value="17">
            <text:p>17</text:p>
          </table:table-cell>
          <table:table-cell table:style-name="ce4" office:value-type="string">
            <text:p>true</text:p>
          </table:table-cell>
          <table:table-cell table:number-columns-repeated="2" office:value-type="string">
            <text:p>COMMON LANGUAGE</text:p>
          </table:table-cell>
          <table:table-cell/>
          <table:table-cell office:value-type="string">
            <text:p>Data Communications Technology Planning, Telcordia, Room 1F-359, 331 Newman\nSprings Road, P O Box 7020, Red Bank, NJ 07701-7020, USA, Tel: 1 201 758 2198,\nFax: 1 201 530 6875</text:p>
          </table:table-cell>
          <table:table-cell office:value-type="string">
            <text:p>1) Two fields, a. <text:s/>Place Code = four characters, derived from location name. <text:s/>b.\nState/Province/Country code = two characters, derived from the location name, 2)\nNone</text:p>
          </table:table-cell>
          <table:table-cell office:value-type="string">
            <text:p>None</text:p>
          </table:table-cell>
          <table:table-cell table:number-columns-repeated="4"/>
          <table:table-cell office:value-type="string">
            <text:p>Telecommunication administrations and public carriers.</text:p>
          </table:table-cell>
          <table:table-cell office:value-type="string">
            <text:p>Codes for named populated places, geographic places, geopolitical places, outlaying\nareas, and other related entities of the state of the United States, provinces and\nterritories of Canada, countries of the world, and other, unique areas. <text:s/>Also for the\nidentification of organizations, places, equipment and governmental entities by the\ntelecommunication industry.</text:p>
          </table:table-cell>
          <table:table-cell/>
          <table:table-cell office:value-type="string">
            <text:p>American National Standards Institute: ANSI</text:p>
          </table:table-cell>
          <table:table-cell office:value-type="string">
            <text:p>Mar 1990/ Amended Apr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8">
            <text:p>18</text:p>
          </table:table-cell>
          <table:table-cell table:style-name="ce4" office:value-type="string">
            <text:p>true</text:p>
          </table:table-cell>
          <table:table-cell table:number-columns-repeated="2" office:value-type="string">
            <text:p>SNA/OSI Network</text:p>
          </table:table-cell>
          <table:table-cell/>
          <table:table-cell office:value-type="string">
            <text:p>International Business Machines Corporation: IBM, IBM Bldg. <text:s/>678, 1001 Winstead\nDrive, Cary, NC 27513, USA, Tel: 1 919 301 4004</text:p>
          </table:table-cell>
          <table:table-cell office:value-type="string">
            <text:p>1) xxx SNA-OSI NET Open Systems Interconnection Network, 2) None, as the whole\nmessage has a checking mechanism.</text:p>
          </table:table-cell>
          <table:table-cell office:value-type="string">
            <text:p>None, except that all fields are left justified.</text:p>
          </table:table-cell>
          <table:table-cell table:number-columns-repeated="4"/>
          <table:table-cell office:value-type="string">
            <text:p>Any company or organization that participates in an SNA/OSI networking\nenvironment. <text:s/>This program encompasses companies throughout the world.</text:p>
          </table:table-cell>
          <table:table-cell office:value-type="string">
            <text:p>The ICD code will also form the initial part of the OSI Network addressing and naming\ntree as depicted in Addendum 2 to ISO 8348.</text:p>
          </table:table-cell>
          <table:table-cell/>
          <table:table-cell office:value-type="string">
            <text:p>International Business Machines Corporation: IBM</text:p>
          </table:table-cell>
          <table:table-cell table:style-name="ce4" office:value-type="string">
            <text:p>May 1990</text:p>
          </table:table-cell>
          <table:table-cell table:number-columns-repeated="4"/>
          <table:table-cell table:style-name="ce3" table:number-columns-repeated="16363"/>
        </table:table-row>
        <table:table-row table:style-name="ro1" table:visibility="filter">
          <table:table-cell office:value-type="float" office:value="19">
            <text:p>19</text:p>
          </table:table-cell>
          <table:table-cell table:style-name="ce4" office:value-type="string">
            <text:p>true</text:p>
          </table:table-cell>
          <table:table-cell table:number-columns-repeated="2" office:value-type="string">
            <text:p>Air Transport Industry Services Communications Network</text:p>
          </table:table-cell>
          <table:table-cell/>
          <table:table-cell office:value-type="string">
            <text:p>International Air Transport Association, IATA Centre, Route de l'Aeroport 33,\nP.O.Box 672, CH-1215 Geneva 15 Airport, Switzerland</text:p>
          </table:table-cell>
          <table:table-cell office:value-type="string">
            <text:p>1) ICD IATA International Air Transport Association, 2) No check digits are needed as\nthe whole message has a checking mechanism.</text:p>
          </table:table-cell>
          <table:table-cell office:value-type="string">
            <text:p>None at the present time except that all fields are left justified.</text:p>
          </table:table-cell>
          <table:table-cell table:number-columns-repeated="4"/>
          <table:table-cell office:value-type="string">
            <text:p>IATA will assign a sub value to any company or organisations that participates in\naeronautical telecommunications networks. <text:s/>This program encompasses companies\nand organizations worldwide.</text:p>
          </table:table-cell>
          <table:table-cell office:value-type="string">
            <text:p>The ICD code forms the initial part of the OSI network addressing and naming tree as\ndepicted in Addendum 2 to ISO 8348.</text:p>
          </table:table-cell>
          <table:table-cell table:number-columns-repeated="2"/>
          <table:table-cell office:value-type="string">
            <text:p>Provisional</text:p>
          </table:table-cell>
          <table:table-cell office:value-type="string">
            <text:p>This ICD is allocated on a provisional basis, awaiting confirmation from IATA.</text:p>
          </table:table-cell>
          <table:table-cell table:number-columns-repeated="3"/>
          <table:table-cell table:style-name="ce3" table:number-columns-repeated="16363"/>
        </table:table-row>
        <table:table-row table:style-name="ro1" table:visibility="filter">
          <table:table-cell office:value-type="float" office:value="20">
            <text:p>20</text:p>
          </table:table-cell>
          <table:table-cell table:style-name="ce4" office:value-type="string">
            <text:p>true</text:p>
          </table:table-cell>
          <table:table-cell table:number-columns-repeated="2" office:value-type="string">
            <text:p>European Laboratory for Particle Physics: CERN</text:p>
          </table:table-cell>
          <table:table-cell/>
          <table:table-cell office:value-type="string">
            <text:p>European Laboratory for Particle Physics, CERN, 1211 Geneva 23, Switzerland. <text:s/>Tel:\n41 22 767 6111, Fax: 41 22 767 7155</text:p>
          </table:table-cell>
          <table:table-cell office:value-type="string">
            <text:p>1) 4 Digit ICD code. <text:s/>Organization code upto 14 characters. <text:s/>Organization name upto\n250 characters. <text:s/>2) No check digits needed.</text:p>
          </table:table-cell>
          <table:table-cell office:value-type="string">
            <text:p>None.</text:p>
          </table:table-cell>
          <table:table-cell table:number-columns-repeated="4"/>
          <table:table-cell office:value-type="string">
            <text:p>CERN itself and academic institutes collaborating with CEN.</text:p>
          </table:table-cell>
          <table:table-cell office:value-type="string">
            <text:p>The ICD code forms the initial part of the OSI network addressing and naming tree as\ndepicted in Addendum 2 of ISO 8348.</text:p>
          </table:table-cell>
          <table:table-cell/>
          <table:table-cell office:value-type="string">
            <text:p>European Laboratory for Particle Physics: CERN.</text:p>
          </table:table-cell>
          <table:table-cell table:style-name="ce4" office:value-type="string">
            <text:p>Aug 1990</text:p>
          </table:table-cell>
          <table:table-cell table:number-columns-repeated="4"/>
          <table:table-cell table:style-name="ce3" table:number-columns-repeated="16363"/>
        </table:table-row>
        <table:table-row table:style-name="ro1">
          <table:table-cell office:value-type="float" office:value="21">
            <text:p>21</text:p>
          </table:table-cell>
          <table:table-cell table:style-name="ce4" office:value-type="string">
            <text:p>false</text:p>
          </table:table-cell>
          <table:table-cell office:value-type="string">
            <text:p>SOCIETY FOR WORLDWIDE INTERBANK FINANCIAL, TELECOMMUNICATION S.W.I.F.T.</text:p>
          </table:table-cell>
          <table:table-cell office:value-type="string">
            <text:p>SOCIETY FOR WORLDWIDE INTERBANK FINANCIAL, TELECOMMUNICATION\nS.W.I.F.T.</text:p>
          </table:table-cell>
          <table:table-cell/>
          <table:table-cell office:value-type="string">
            <text:p>SOCIETY FOR WORLDWIDE INTERBANK FINANCIAL, TELECOMMUNICATION\nS.W.I.F.T. <text:s/>Avenue Adele,1, B - 1310 La Hulpe, BELGIUM, Tel: +32 2 6553111, Fax:\n+32 2 6553226</text:p>
          </table:table-cell>
          <table:table-cell office:value-type="string">
            <text:p>1) ICD 4 Digits, Organization code upto 11 characters, Organization name upto 250\ncharacters, 2) None</text:p>
          </table:table-cell>
          <table:table-cell office:value-type="string">
            <text:p>None</text:p>
          </table:table-cell>
          <table:table-cell table:number-columns-repeated="4"/>
          <table:table-cell office:value-type="string">
            <text:p>Bank's identifiers for financial transfer on the S.W.I.F.T. <text:s/>Network.</text:p>
          </table:table-cell>
          <table:table-cell office:value-type="string">
            <text:p>To be used for assignment of object identifiers (ISO 8824/8825)</text:p>
          </table:table-cell>
          <table:table-cell/>
          <table:table-cell office:value-type="string">
            <text:p>S.W.I.F.T.</text:p>
          </table:table-cell>
          <table:table-cell table:style-name="ce4" office:value-type="string">
            <text:p>Sep 1990</text:p>
          </table:table-cell>
          <table:table-cell table:number-columns-repeated="4"/>
          <table:table-cell table:style-name="ce3" table:number-columns-repeated="16363"/>
        </table:table-row>
        <table:table-row table:style-name="ro1" table:visibility="filter">
          <table:table-cell office:value-type="float" office:value="22">
            <text:p>22</text:p>
          </table:table-cell>
          <table:table-cell table:style-name="ce4" office:value-type="string">
            <text:p>true</text:p>
          </table:table-cell>
          <table:table-cell table:number-columns-repeated="2" office:value-type="string">
            <text:p>OSF Distributed Computing Object Identification</text:p>
          </table:table-cell>
          <table:table-cell/>
          <table:table-cell office:value-type="string">
            <text:p>Open Software Foundation, 11 Cambridge Center, Cambridge, MA 02142, USA, Tel:\n617 621 8700, Fax: 617 621 0631</text:p>
          </table:table-cell>
          <table:table-cell office:value-type="string">
            <text:p>1) Organization code: full 4- character code without spaces or hyphens.\nOrganization name: at most 250 characters and shall consist of the legal name or\nalternative names. <text:s/>2) None.</text:p>
          </table:table-cell>
          <table:table-cell office:value-type="string">
            <text:p>Display of SIO should be in the order of ICD, organization code and organization\nname where the components are separated by spaces. <text:s/>Example: for the\norganization "OSF", SIO representation ICD CODE NAME, communication:\nxxxx/xxxx/OSF//, display: xxxx xxxx OSF</text:p>
          </table:table-cell>
          <table:table-cell table:number-columns-repeated="4"/>
          <table:table-cell office:value-type="string">
            <text:p>Member organizations of Open Software Foundation - currently OSF has 205\nmembers located in 37 countries in the North America, South America, Europe,\nAsia, Africa and Australia.</text:p>
          </table:table-cell>
          <table:table-cell office:value-type="string">
            <text:p>OSF provides public domain software in OS, ISO networking and management. <text:s/>The\ninitial use of the coding system are for identifying the following objects in OSF's\ndistributed computing environment: the attributes of entries in the distributed\ndirectory, the object class of each entry in the directory, the type of name\ncomponents (RDNs), the communication protocol profiles, the interfaces offered by</text:p>
          </table:table-cell>
          <table:table-cell/>
          <table:table-cell office:value-type="string">
            <text:p>American National Standards Institute: ANSI</text:p>
          </table:table-cell>
          <table:table-cell table:style-name="ce4" office:value-type="string">
            <text:p>Sep 1990</text:p>
          </table:table-cell>
          <table:table-cell table:number-columns-repeated="4"/>
          <table:table-cell table:style-name="ce3" table:number-columns-repeated="16363"/>
        </table:table-row>
        <table:table-row table:style-name="ro1" table:visibility="filter">
          <table:table-cell office:value-type="float" office:value="23">
            <text:p>23</text:p>
          </table:table-cell>
          <table:table-cell table:style-name="ce4" office:value-type="string">
            <text:p>true</text:p>
          </table:table-cell>
          <table:table-cell table:number-columns-repeated="2" office:value-type="string">
            <text:p>Nordic University and Research Network: NORDUnet</text:p>
          </table:table-cell>
          <table:table-cell/>
          <table:table-cell office:value-type="string">
            <text:p>NORDUnet, c/o SICS, P O Box 1263, S-16428 KISTA, Sweden, Tel. <text:s/>+46 8\n7521563, Fax. <text:s/>+46 8 7517230</text:p>
          </table:table-cell>
          <table:table-cell office:value-type="string">
            <text:p>1) ICD Code - 4 digits, Organisation code - upto 14 characters, Organisation Name -\nupto 250 characters, 2) No check digits needed.</text:p>
          </table:table-cell>
          <table:table-cell office:value-type="string">
            <text:p>None.</text:p>
          </table:table-cell>
          <table:table-cell table:number-columns-repeated="4"/>
          <table:table-cell office:value-type="string">
            <text:p>The coding system covers the following national research networking, organizations\nin the five Nordic countries: - Finnish University and Research Network (FUNET), -\nSURIS (Island), - Swedish University Network (SUNET), - UNI.C (Denmark), -\nUNINETT (Norway), They together comprise the NORDUnet network currently,\nconnecting more than 15,000 hosts.</text:p>
          </table:table-cell>
          <table:table-cell office:value-type="string">
            <text:p>The ICD code forms the initial part of the OSI network addressing and tree as\ndepicted in Addendum 2 of ISO 8348.</text:p>
          </table:table-cell>
          <table:table-cell/>
          <table:table-cell office:value-type="string">
            <text:p>NORDUnet and the above mentioned five national networking organizations.</text:p>
          </table:table-cell>
          <table:table-cell table:style-name="ce4" office:value-type="string">
            <text:p>Jan 199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24">
            <text:p>24</text:p>
          </table:table-cell>
          <table:table-cell table:style-name="ce4" office:value-type="string">
            <text:p>true</text:p>
          </table:table-cell>
          <table:table-cell table:number-columns-repeated="2" office:value-type="string">
            <text:p>Digital Equipment Corporation: DEC</text:p>
          </table:table-cell>
          <table:table-cell/>
          <table:table-cell office:value-type="string">
            <text:p>Digital Equipment (Europe) S.A.R.L. <text:s/>B.P. <text:s/>129 - Sophia Antipolis, 06561 Valbonne\nCedex, France, Tel: 33 92 95 51 11, Fax: 33 93 65 34 24</text:p>
          </table:table-cell>
          <table:table-cell office:value-type="string">
            <text:p>1) Four digit ICD code, Organisation code upto 14 characters, Organisation name\nupto 250 characters, 2) None</text:p>
          </table:table-cell>
          <table:table-cell office:value-type="string">
            <text:p>None</text:p>
          </table:table-cell>
          <table:table-cell table:number-columns-repeated="4"/>
          <table:table-cell office:value-type="string">
            <text:p>Digital Equipment Corporation and associated companies.</text:p>
          </table:table-cell>
          <table:table-cell office:value-type="string">
            <text:p>The ICD code forms the initial part of the OSI network addressing as described in\nISO8348 Addendum 2.</text:p>
          </table:table-cell>
          <table:table-cell/>
          <table:table-cell office:value-type="string">
            <text:p>Digital Equipment Corporation</text:p>
          </table:table-cell>
          <table:table-cell table:style-name="ce4" office:value-type="string">
            <text:p>Jan 199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25">
            <text:p>25</text:p>
          </table:table-cell>
          <table:table-cell table:style-name="ce4" office:value-type="string">
            <text:p>true</text:p>
          </table:table-cell>
          <table:table-cell table:number-columns-repeated="2" office:value-type="string">
            <text:p>OSI ASIA-OCEANIA WORKSHOP</text:p>
          </table:table-cell>
          <table:table-cell/>
          <table:table-cell office:value-type="string">
            <text:p>OSI ASIA-OCEANIA WORKSHOP, c/o Interoperability Technology Association for\nInformation Processing, Japan, Sumito Gaien Bldg. <text:s/>3F, 24 Daikyo-cho, Shinjuku-ku,\nTokyo 160, JAPAN, Tel: +81-3-3358-2721, Fax: +81-3-3358-4753</text:p>
          </table:table-cell>
          <table:table-cell office:value-type="string">
            <text:p>1) Number of the characters and their significance as defined in clause 3 of ISO\n6523, ICD = 4 characters, Organization code = upto 14 characters, Organization\nname = upto 250 characters, 2) No identification of check digits</text:p>
          </table:table-cell>
          <table:table-cell office:value-type="string">
            <text:p>As defined in clause 4 of ISO 6523</text:p>
          </table:table-cell>
          <table:table-cell table:number-columns-repeated="4"/>
          <table:table-cell office:value-type="string">
            <text:p>Organizations working on the establishment of OSI functional standard in AOW,\nsuch as the AOW SIGs (Special Interest Groups)</text:p>
          </table:table-cell>
          <table:table-cell office:value-type="string">
            <text:p>The code is used as an element of object identifiers which need to be assigned\nrelating the ISPs (International Standardized Profiles) that AOW is working on.</text:p>
          </table:table-cell>
          <table:table-cell/>
          <table:table-cell office:value-type="string">
            <text:p>AOW (Asia Oceania Workshop)</text:p>
          </table:table-cell>
          <table:table-cell table:style-name="ce4" office:value-type="string">
            <text:p>Feb 1991</text:p>
          </table:table-cell>
          <table:table-cell table:number-columns-repeated="4"/>
          <table:table-cell table:style-name="ce3" table:number-columns-repeated="16363"/>
        </table:table-row>
        <table:table-row table:style-name="ro1" table:visibility="filter">
          <table:table-cell office:value-type="float" office:value="26">
            <text:p>26</text:p>
          </table:table-cell>
          <table:table-cell table:style-name="ce4" office:value-type="string">
            <text:p>true</text:p>
          </table:table-cell>
          <table:table-cell table:number-columns-repeated="2" office:value-type="string">
            <text:p>NATO ISO 6523 ICDE coding scheme</text:p>
          </table:table-cell>
          <table:table-cell/>
          <table:table-cell office:value-type="string">
            <text:p>North Atlantic Treaty Organisation (NATO), NATO HQ, Bvd Leopold III, B - 1110\nBrussels, Belgium, Attention: Mr S Seiffert, DS/ICP Section, (TSGCEE SG/9\nSecretary), Tel: 010 32 2 728 4632, Fax: 010 32 2 728 4103</text:p>
          </table:table-cell>
          <table:table-cell office:value-type="string">
            <text:p>1) ICD Code - 4 digits, Organisation code up to 14 characters, Organisation name up\nto 250 characters, 2) No check digits</text:p>
          </table:table-cell>
          <table:table-cell office:value-type="string">
            <text:p>None</text:p>
          </table:table-cell>
          <table:table-cell table:number-columns-repeated="4"/>
          <table:table-cell office:value-type="string">
            <text:p>NATO OSI networks</text:p>
          </table:table-cell>
          <table:table-cell office:value-type="string">
            <text:p>The ICD code forms the initial part of the OSI network addressing and naming tree\ndepicted in Addendum 2 of ISO 8348</text:p>
          </table:table-cell>
          <table:table-cell/>
          <table:table-cell office:value-type="string">
            <text:p>British Standards Institution: BSI</text:p>
          </table:table-cell>
          <table:table-cell table:style-name="ce4" office:value-type="string">
            <text:p>Mar 1991</text:p>
          </table:table-cell>
          <table:table-cell table:number-columns-repeated="4"/>
          <table:table-cell table:style-name="ce3" table:number-columns-repeated="16363"/>
        </table:table-row>
        <table:table-row table:style-name="ro1" table:visibility="filter">
          <table:table-cell office:value-type="float" office:value="27">
            <text:p>27</text:p>
          </table:table-cell>
          <table:table-cell table:style-name="ce4" office:value-type="string">
            <text:p>true</text:p>
          </table:table-cell>
          <table:table-cell table:number-columns-repeated="2" office:value-type="string">
            <text:p>Aeronautical Telecommunications Network (ATN)</text:p>
          </table:table-cell>
          <table:table-cell/>
          <table:table-cell office:value-type="string">
            <text:p>International Civil Aviation Organization (ICAO), Communications Section, Air\nNavigation Bureau, 1000 Sherbrooke Street West, Montreal, Quebec H3A 2R2,\nCANADA</text:p>
          </table:table-cell>
          <table:table-cell office:value-type="string">
            <text:p>1) /XXXX/ICAO/International Civil Aviation Organization, 2) No check digits</text:p>
          </table:table-cell>
          <table:table-cell office:value-type="string">
            <text:p>None</text:p>
          </table:table-cell>
          <table:table-cell table:number-columns-repeated="4"/>
          <table:table-cell office:value-type="string">
            <text:p>ICAO will assign a sub-value to its Contracting States</text:p>
          </table:table-cell>
          <table:table-cell office:value-type="string">
            <text:p>The ICD code forms the initial part of the ISO network addressing and naming tree as\ndepicted in Addendum No 2 to ISO 8348</text:p>
          </table:table-cell>
          <table:table-cell/>
          <table:table-cell office:value-type="string">
            <text:p>British Standards Institution: BSI</text:p>
          </table:table-cell>
          <table:table-cell table:style-name="ce4" office:value-type="string">
            <text:p>Jun 199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28">
            <text:p>28</text:p>
          </table:table-cell>
          <table:table-cell table:style-name="ce4" office:value-type="string">
            <text:p>true</text:p>
          </table:table-cell>
          <table:table-cell table:number-columns-repeated="2" office:value-type="string">
            <text:p>International Standard ISO 6523</text:p>
          </table:table-cell>
          <table:table-cell/>
          <table:table-cell office:value-type="string">
            <text:p>Styria Federn GmbH, Postfach 101, A-8750 Judenburg, AUSTRIA</text:p>
          </table:table-cell>
          <table:table-cell office:value-type="string">
            <text:p>1) 14 characters identifying STYRIA FEDERN GmbH, 2) no check digits</text:p>
          </table:table-cell>
          <table:table-cell office:value-type="string">
            <text:p>No separators</text:p>
          </table:table-cell>
          <table:table-cell table:number-columns-repeated="4"/>
          <table:table-cell office:value-type="string">
            <text:p>ODETTE - Organisation for Data Exchange through Tele Transmission in Europe</text:p>
          </table:table-cell>
          <table:table-cell office:value-type="string">
            <text:p>None</text:p>
          </table:table-cell>
          <table:table-cell/>
          <table:table-cell office:value-type="string">
            <text:p>Osterreichisches Normungsinstitut (ON)</text:p>
          </table:table-cell>
          <table:table-cell table:style-name="ce4" office:value-type="string">
            <text:p>Jun 1991</text:p>
          </table:table-cell>
          <table:table-cell table:number-columns-repeated="4"/>
          <table:table-cell table:style-name="ce3" table:number-columns-repeated="16363"/>
        </table:table-row>
        <table:table-row table:style-name="ro1" table:visibility="filter">
          <table:table-cell office:value-type="float" office:value="29">
            <text:p>29</text:p>
          </table:table-cell>
          <table:table-cell table:style-name="ce4" office:value-type="string">
            <text:p>true</text:p>
          </table:table-cell>
          <table:table-cell table:number-columns-repeated="2" office:value-type="string">
            <text:p>The All-Union Classifier of Enterprises and Organisations</text:p>
          </table:table-cell>
          <table:table-cell/>
          <table:table-cell office:value-type="string">
            <text:p>General Computing Centre of the State, Committee of the USSR on Statistics, 44\nIzmailovskoye Chosse, Moscow 105679, U S S R</text:p>
          </table:table-cell>
          <table:table-cell office:value-type="string">
            <text:p>1) 8 character in digits, The first 7 digits indicate the ordinal number of an\norganization, 2) From 0 to 9 including one check digit</text:p>
          </table:table-cell>
          <table:table-cell office:value-type="string">
            <text:p>The check digit is given without a space</text:p>
          </table:table-cell>
          <table:table-cell table:number-columns-repeated="4"/>
          <table:table-cell office:value-type="string">
            <text:p>All organisations of the USSR</text:p>
          </table:table-cell>
          <table:table-cell office:value-type="string">
            <text:p>None</text:p>
          </table:table-cell>
          <table:table-cell/>
          <table:table-cell office:value-type="string">
            <text:p>The State Committee of the USSR for Standardization &amp; Metrology (GOMST)</text:p>
          </table:table-cell>
          <table:table-cell table:style-name="ce4" office:value-type="string">
            <text:p>Aug 1991</text:p>
          </table:table-cell>
          <table:table-cell table:number-columns-repeated="4"/>
          <table:table-cell table:style-name="ce3" table:number-columns-repeated="16363"/>
        </table:table-row>
        <table:table-row table:style-name="ro1" table:visibility="filter">
          <table:table-cell office:value-type="float" office:value="30">
            <text:p>30</text:p>
          </table:table-cell>
          <table:table-cell table:style-name="ce4" office:value-type="string">
            <text:p>true</text:p>
          </table:table-cell>
          <table:table-cell table:number-columns-repeated="2" office:value-type="string">
            <text:p>AT&amp;T/OSI Network</text:p>
          </table:table-cell>
          <table:table-cell/>
          <table:table-cell office:value-type="string">
            <text:p>AT&amp;T, Standards and Regulatory Support, Room 5A256, Route 202-206N,\nBedminster, NJ 07921, UNITED STATES OF AMERICA</text:p>
          </table:table-cell>
          <table:table-cell office:value-type="string">
            <text:p>1) ICD, 2) Organization Code, 1-14 characters, 3) Organization Name, upto 250\ncharacters</text:p>
          </table:table-cell>
          <table:table-cell office:value-type="string">
            <text:p>None except that all fields are left justified</text:p>
          </table:table-cell>
          <table:table-cell table:number-columns-repeated="4"/>
          <table:table-cell office:value-type="string">
            <text:p>Any organizations in an AT&amp;T/OSI networking environment. <text:s/>This program\nencompasses organizations throughout the world.</text:p>
          </table:table-cell>
          <table:table-cell office:value-type="string">
            <text:p>The ICD code will also form the Initial Domain Part of the OSI network, addressing\nand naming tree as specified in Addendum 2 to ISO 8348.</text:p>
          </table:table-cell>
          <table:table-cell/>
          <table:table-cell office:value-type="string">
            <text:p>American National Standards Institute (ANSI) - USA</text:p>
          </table:table-cell>
          <table:table-cell table:style-name="ce4" office:value-type="string">
            <text:p>Sep 1991</text:p>
          </table:table-cell>
          <table:table-cell table:number-columns-repeated="4"/>
          <table:table-cell table:style-name="ce3" table:number-columns-repeated="16363"/>
        </table:table-row>
        <table:table-row table:style-name="ro1" table:visibility="filter">
          <table:table-cell office:value-type="float" office:value="31">
            <text:p>31</text:p>
          </table:table-cell>
          <table:table-cell table:style-name="ce4" office:value-type="string">
            <text:p>true</text:p>
          </table:table-cell>
          <table:table-cell table:number-columns-repeated="2" office:value-type="string">
            <text:p>EDI Partner Identification Code</text:p>
          </table:table-cell>
          <table:table-cell/>
          <table:table-cell office:value-type="string">
            <text:p>Odette NL, Europaplein 2, 1078 GZ AMSTERDAM, Tel: 020 - 5491212, Fax: 020 -\n6463857</text:p>
          </table:table-cell>
          <table:table-cell office:value-type="string">
            <text:p>1) ICD Code...N4, District Number of Chamber of Commerce...N2, Company number\naccording to Chamber of Commerce...N12, Sub-address...AN 6 (if required)</text:p>
          </table:table-cell>
          <table:table-cell office:value-type="string">
            <text:p>N.A.</text:p>
          </table:table-cell>
          <table:table-cell table:number-columns-repeated="4"/>
          <table:table-cell office:value-type="string">
            <text:p>Partners in assembly industry</text:p>
          </table:table-cell>
          <table:table-cell office:value-type="string">
            <text:p>To identify EDI partners</text:p>
          </table:table-cell>
          <table:table-cell/>
          <table:table-cell office:value-type="string">
            <text:p>NNI - Delft - The Netherlands</text:p>
          </table:table-cell>
          <table:table-cell table:style-name="ce4" office:value-type="string">
            <text:p>Oct 1991</text:p>
          </table:table-cell>
          <table:table-cell table:number-columns-repeated="4"/>
          <table:table-cell table:style-name="ce3" table:number-columns-repeated="16363"/>
        </table:table-row>
        <table:table-row table:style-name="ro1" table:visibility="filter">
          <table:table-cell office:value-type="float" office:value="32">
            <text:p>32</text:p>
          </table:table-cell>
          <table:table-cell table:style-name="ce4" office:value-type="string">
            <text:p>true</text:p>
          </table:table-cell>
          <table:table-cell table:number-columns-repeated="2" office:value-type="string">
            <text:p>Telecom Australia</text:p>
          </table:table-cell>
          <table:table-cell/>
          <table:table-cell office:value-type="string">
            <text:p>Australia Telecommunications Corporation, Forward Network Planning Unit, 11/172\nWilliams Street, Melbourne, AUSTRALIA 3000, Tel: 613 634 7878, Fax: 613 670 2562</text:p>
          </table:table-cell>
          <table:table-cell office:value-type="string">
            <text:p>1) Delimiter between ICD and Organisation code to be 3 spaces, 2) Delimiter\nbetween Organisation name and Organisation code to be 2 spaces, 3) Delimiter\nbetween names within the Organisation name to be 2 spaces, 4) No check digits</text:p>
          </table:table-cell>
          <table:table-cell office:value-type="string">
            <text:p>As defined in clause 4 of ISO 6523</text:p>
          </table:table-cell>
          <table:table-cell table:number-columns-repeated="4"/>
          <table:table-cell office:value-type="string">
            <text:p>This would be Telecom Australia and its associated Companies both nationally and\ninternationally</text:p>
          </table:table-cell>
          <table:table-cell office:value-type="string">
            <text:p>The code is used as an element of Object Identifier when defining objects within\nTelecom Australia. <text:s/>In addition the code shall be used as an element of NSAP\naddressing.</text:p>
          </table:table-cell>
          <table:table-cell/>
          <table:table-cell office:value-type="string">
            <text:p>Telecom Australia</text:p>
          </table:table-cell>
          <table:table-cell table:style-name="ce4" office:value-type="string">
            <text:p>Oct 1991</text:p>
          </table:table-cell>
          <table:table-cell table:number-columns-repeated="4"/>
          <table:table-cell table:style-name="ce3" table:number-columns-repeated="16363"/>
        </table:table-row>
        <table:table-row table:style-name="ro1" table:visibility="filter">
          <table:table-cell office:value-type="float" office:value="33">
            <text:p>33</text:p>
          </table:table-cell>
          <table:table-cell table:style-name="ce4" office:value-type="string">
            <text:p>true</text:p>
          </table:table-cell>
          <table:table-cell table:number-columns-repeated="2" office:value-type="string">
            <text:p>S G W OSI Internetwork</text:p>
          </table:table-cell>
          <table:table-cell/>
          <table:table-cell office:value-type="string">
            <text:p>S G Warburg Group Management Ltd, 1 Finsbury Avenue, LONDON, EC2M 2PA,\nTel: 071 606 1066, Fax: 071 382 4800</text:p>
          </table:table-cell>
          <table:table-cell office:value-type="string">
            <text:p>1) S G W OSI, 2) S G Warburg Group Management Ltd</text:p>
          </table:table-cell>
          <table:table-cell office:value-type="string">
            <text:p>None</text:p>
          </table:table-cell>
          <table:table-cell table:number-columns-repeated="4"/>
          <table:table-cell office:value-type="string">
            <text:p>Exclusive use by S G Warburg locations worldwide</text:p>
          </table:table-cell>
          <table:table-cell office:value-type="string">
            <text:p>Exclusive use by S G W</text:p>
          </table:table-cell>
          <table:table-cell/>
          <table:table-cell office:value-type="string">
            <text:p>BSI UK</text:p>
          </table:table-cell>
          <table:table-cell table:style-name="ce4" office:value-type="string">
            <text:p>Nov 1991</text:p>
          </table:table-cell>
          <table:table-cell office:value-type="string">
            <text:p>Contact for enquiries at S G W: Tim Ecott, Extn 3840</text:p>
          </table:table-cell>
          <table:table-cell table:number-columns-repeated="3"/>
          <table:table-cell table:style-name="ce3" table:number-columns-repeated="16363"/>
        </table:table-row>
        <table:table-row table:style-name="ro1" table:visibility="filter">
          <table:table-cell office:value-type="float" office:value="34">
            <text:p>34</text:p>
          </table:table-cell>
          <table:table-cell table:style-name="ce4" office:value-type="string">
            <text:p>true</text:p>
          </table:table-cell>
          <table:table-cell table:number-columns-repeated="2" office:value-type="string">
            <text:p>Reuter Open Address Standard</text:p>
          </table:table-cell>
          <table:table-cell/>
          <table:table-cell office:value-type="string">
            <text:p>Reuters Ltd, 85 Fleet Street, LONDON, EC4P 4AJ, Tel: 071 250 1122, Tlx: 23222</text:p>
          </table:table-cell>
          <table:table-cell office:value-type="string">
            <text:p>1) According to ISO 8348 Addendum 2, 2) There are no check digits</text:p>
          </table:table-cell>
          <table:table-cell office:value-type="string">
            <text:p>None</text:p>
          </table:table-cell>
          <table:table-cell table:number-columns-repeated="4"/>
          <table:table-cell office:value-type="string">
            <text:p>Reuters and associated companies, their customers and suppliers.</text:p>
          </table:table-cell>
          <table:table-cell office:value-type="string">
            <text:p>To be used in the formation of OSI Network Service Access Point (NSAP) addresses</text:p>
          </table:table-cell>
          <table:table-cell/>
          <table:table-cell office:value-type="string">
            <text:p>BSI IST/6 Technical Committee</text:p>
          </table:table-cell>
          <table:table-cell table:style-name="ce4" office:value-type="string">
            <text:p>Nov 1991</text:p>
          </table:table-cell>
          <table:table-cell table:number-columns-repeated="4"/>
          <table:table-cell table:style-name="ce3" table:number-columns-repeated="16363"/>
        </table:table-row>
        <table:table-row table:style-name="ro1" table:visibility="filter">
          <table:table-cell office:value-type="float" office:value="35">
            <text:p>35</text:p>
          </table:table-cell>
          <table:table-cell table:style-name="ce4" office:value-type="string">
            <text:p>true</text:p>
          </table:table-cell>
          <table:table-cell table:number-columns-repeated="2" office:value-type="string">
            <text:p>ISO 6523 - ICD</text:p>
          </table:table-cell>
          <table:table-cell/>
          <table:table-cell office:value-type="string">
            <text:p>The British Petroleum Co Plc, Britannic House, 1 Finsbury Circus, LONDON, EC2M\n7BU, Tel: 071 496 4054, Fax: 071 496 4540, Tlx: 888811</text:p>
          </table:table-cell>
          <table:table-cell office:value-type="string">
            <text:p>1), 2)</text:p>
          </table:table-cell>
          <table:table-cell office:value-type="string">
            <text:p>None</text:p>
          </table:table-cell>
          <table:table-cell table:number-columns-repeated="4"/>
          <table:table-cell office:value-type="string">
            <text:p>British Petroleum Ltd businesses including (but not limited to) BP Exploration\nInternational, BP Oil International, BP Chemicals, BP Research, BP Finance, BP\nEngineering.</text:p>
          </table:table-cell>
          <table:table-cell office:value-type="string">
            <text:p>This code will be used internationally by BP thus a non-geographic code is requested.</text:p>
          </table:table-cell>
          <table:table-cell/>
          <table:table-cell office:value-type="string">
            <text:p>British Standards Institute/ISO 6523-ICD</text:p>
          </table:table-cell>
          <table:table-cell table:style-name="ce4" office:value-type="string">
            <text:p>Nov 1991</text:p>
          </table:table-cell>
          <table:table-cell office:value-type="string">
            <text:p>This will be the AFI:IDI for the BP Group OSI Network implementation worldwide</text:p>
          </table:table-cell>
          <table:table-cell table:number-columns-repeated="3"/>
          <table:table-cell table:style-name="ce3" table:number-columns-repeated="16363"/>
        </table:table-row>
        <table:table-row table:style-name="ro1" table:visibility="filter">
          <table:table-cell office:value-type="float" office:value="36">
            <text:p>36</text:p>
          </table:table-cell>
          <table:table-cell table:style-name="ce4" office:value-type="string">
            <text:p>true</text:p>
          </table:table-cell>
          <table:table-cell table:number-columns-repeated="2" office:value-type="string">
            <text:p>TeleTrust Object Identifiers</text:p>
          </table:table-cell>
          <table:table-cell/>
          <table:table-cell office:value-type="string">
            <text:p>TeleTrust Deutschland e.V. <text:s/>c/o GMD, Dolivostrasse 15, D-6100 Darmstadt,\nGERMANY, Tel: 49 6151 869 700, Fax: 49 6151 869 785</text:p>
          </table:table-cell>
          <table:table-cell office:value-type="string">
            <text:p>1) Organization code: TeleTrust, 2) Organization name: TeleTrust-Deutschland-e.V.</text:p>
          </table:table-cell>
          <table:table-cell office:value-type="string">
            <text:p>As per ISO 6523 Clause 4</text:p>
          </table:table-cell>
          <table:table-cell table:number-columns-repeated="4"/>
          <table:table-cell office:value-type="string">
            <text:p>TeleTrust Deutschland is a group of 16 companies (vendors, software, houses, user\nand research organizations) organized to promote trustworthiness in Open Systems,\ni.e. in particular to contribute to the development, the acceptability and the legal\nbasis of Digital Signatures for the purpose of communication and co-operation of\nOpen Systems.</text:p>
          </table:table-cell>
          <table:table-cell office:value-type="string">
            <text:p>a) In the SIO the Organization name will normally be omitted. <text:s/>b) The code is\nprimarily intended for the registration of Object Identifiers for security related objects\naccording to ISO/IEC 8824, Level 1: iso(1), Level 2: identified-organization(3), Level 3:\nteletrust(0036), Level 4 and higher: (defined by TeleTrust conventions)</text:p>
          </table:table-cell>
          <table:table-cell/>
          <table:table-cell office:value-type="string">
            <text:p>BSI</text:p>
          </table:table-cell>
          <table:table-cell table:style-name="ce4" office:value-type="string">
            <text:p>Nov 1991</text:p>
          </table:table-cell>
          <table:table-cell table:number-columns-repeated="4"/>
          <table:table-cell table:style-name="ce3" table:number-columns-repeated="16363"/>
        </table:table-row>
        <table:table-row table:style-name="ro1" table:visibility="filter">
          <table:table-cell office:value-type="float" office:value="37">
            <text:p>37</text:p>
          </table:table-cell>
          <table:table-cell table:style-name="ce4" office:value-type="string">
            <text:p>true</text:p>
          </table:table-cell>
          <table:table-cell table:number-columns-repeated="2" office:value-type="string">
            <text:p>LY-tunnus</text:p>
          </table:table-cell>
          <table:table-cell/>
          <table:table-cell office:value-type="string">
            <text:p>National Board of Taxes, (Verohallitus), Haapanimenk 7-9B, SF-00530 Helsinki,\nFINLAND Tel: 010 3580 39621, Fax: 010 3580 39624247</text:p>
          </table:table-cell>
          <table:table-cell office:value-type="string">
            <text:p>1) 8 digits, 1st-7th digit = number, 8th digit = check number, 2) digit</text:p>
          </table:table-cell>
          <table:table-cell office:value-type="string">
            <text:p>Single group of 8 digits</text:p>
          </table:table-cell>
          <table:table-cell table:number-columns-repeated="4"/>
          <table:table-cell office:value-type="string">
            <text:p>All organizations in Finland included juridical persons and associations</text:p>
          </table:table-cell>
          <table:table-cell office:value-type="string">
            <text:p>It is possible to add 0-4 characters set to the code for more detailed use of one\norganization. <text:s/>Characters are digits or capital letter.</text:p>
          </table:table-cell>
          <table:table-cell/>
          <table:table-cell office:value-type="string">
            <text:p>Standardization body of Finland (SFS)</text:p>
          </table:table-cell>
          <table:table-cell table:style-name="ce4" office:value-type="string">
            <text:p>Feb 1992</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38">
            <text:p>38</text:p>
          </table:table-cell>
          <table:table-cell table:style-name="ce4" office:value-type="string">
            <text:p>true</text:p>
          </table:table-cell>
          <table:table-cell table:number-columns-repeated="2" office:value-type="string">
            <text:p>The Australian GOSIP Network</text:p>
          </table:table-cell>
          <table:table-cell/>
          <table:table-cell office:value-type="string">
            <text:p>Standards Australia, 80 Arthur Street, P O Box 458, North Sydney, NSW 2059,\nAUSTRALIA, Tel: 010 612 963 4111, Fax: 010 612 959 3896</text:p>
          </table:table-cell>
          <table:table-cell office:value-type="string">
            <text:p>1) NSAP address: maximum length: 20 codes including the ICD code, 2) No check\ndigit</text:p>
          </table:table-cell>
          <table:table-cell office:value-type="string">
            <text:p>None</text:p>
          </table:table-cell>
          <table:table-cell table:number-columns-repeated="4"/>
          <table:table-cell office:value-type="string">
            <text:p>Australian government departments and agencies at federal, state and local levels as\nwell as other GOSIP conferment groups. <text:s/>GOSIP groups from nearby countries have\nbeen invited to use this scheme too.</text:p>
          </table:table-cell>
          <table:table-cell office:value-type="string">
            <text:p>As noted above it will be used as the initial identifier of an NSAP coding scheme.</text:p>
          </table:table-cell>
          <table:table-cell/>
          <table:table-cell office:value-type="string">
            <text:p>Standards Australia (who will hold the registration in trust for the Australian GOSIP\nregistration scheme)</text:p>
          </table:table-cell>
          <table:table-cell table:style-name="ce4" office:value-type="string">
            <text:p>Mar 1992</text:p>
          </table:table-cell>
          <table:table-cell table:number-columns-repeated="4"/>
          <table:table-cell table:style-name="ce3" table:number-columns-repeated="16363"/>
        </table:table-row>
        <table:table-row table:style-name="ro1" table:visibility="filter">
          <table:table-cell office:value-type="float" office:value="39">
            <text:p>39</text:p>
          </table:table-cell>
          <table:table-cell table:style-name="ce4" office:value-type="string">
            <text:p>true</text:p>
          </table:table-cell>
          <table:table-cell table:number-columns-repeated="2" office:value-type="string">
            <text:p>The OZ DOD OSI Network</text:p>
          </table:table-cell>
          <table:table-cell/>
          <table:table-cell office:value-type="string">
            <text:p>The Australian Department of Defence, Communications and Information Branch,\nRussell Offices (B-3-25), P O Box E33, Queen Victoria Terrace, Canberra, ACT\n2600, AUSTRALIA, Tel: 010 616 265 3730, Fax: 010 616 265 3601</text:p>
          </table:table-cell>
          <table:table-cell office:value-type="string">
            <text:p>1) 0039/OZDOD DEFNET/Australian Department of Defence OSI Network, 2) No\ncheck digits needed as the whole message has a checking mechanism</text:p>
          </table:table-cell>
          <table:table-cell office:value-type="string">
            <text:p>None except all fields are left justified</text:p>
          </table:table-cell>
          <table:table-cell table:number-columns-repeated="4"/>
          <table:table-cell office:value-type="string">
            <text:p>The Australian DOD is the Australian Government military organisation which looks\nafter the defence requirements of the country.</text:p>
          </table:table-cell>
          <table:table-cell office:value-type="string">
            <text:p>The ICD code forms the initial part of the OSI naming and addressing, tree as\ndepicted in ISO 8348/Add 2 standard. <text:s/>Format of the tree is described in the\nAustralian GOSIP Manuals and used globally.</text:p>
          </table:table-cell>
          <table:table-cell/>
          <table:table-cell office:value-type="string">
            <text:p>Standards Australia</text:p>
          </table:table-cell>
          <table:table-cell table:style-name="ce4" office:value-type="string">
            <text:p>Mar 1992</text:p>
          </table:table-cell>
          <table:table-cell table:number-columns-repeated="4"/>
          <table:table-cell table:style-name="ce3" table:number-columns-repeated="16363"/>
        </table:table-row>
        <table:table-row table:style-name="ro1" table:visibility="filter">
          <table:table-cell office:value-type="float" office:value="40">
            <text:p>40</text:p>
          </table:table-cell>
          <table:table-cell table:style-name="ce4" office:value-type="string">
            <text:p>true</text:p>
          </table:table-cell>
          <table:table-cell table:number-columns-repeated="2" office:value-type="string">
            <text:p>Unilever Group Companies</text:p>
          </table:table-cell>
          <table:table-cell/>
          <table:table-cell office:value-type="string">
            <text:p>Information Technology Group, Unilever Plc, Unilevr House, P O Box 68, LONDON,\nEC4P 4BQ, Tel: 071 822 6763, Fax: 071 822 5996</text:p>
          </table:table-cell>
          <table:table-cell office:value-type="string">
            <text:p>1) 4 digits 0-9, 2) No check digits</text:p>
          </table:table-cell>
          <table:table-cell office:value-type="string">
            <text:p>None</text:p>
          </table:table-cell>
          <table:table-cell table:number-columns-repeated="4"/>
          <table:table-cell office:value-type="string">
            <text:p>Group companies of Unilever Plc and/or Unilever NV.</text:p>
          </table:table-cell>
          <table:table-cell office:value-type="string">
            <text:p>To be used in data communications to form part of the Network Address as defined\nin ISO 8348. The ISO 6523, ICD IDI format with Binary syntax will be used.</text:p>
          </table:table-cell>
          <table:table-cell/>
          <table:table-cell office:value-type="string">
            <text:p>BSI</text:p>
          </table:table-cell>
          <table:table-cell table:style-name="ce4" office:value-type="string">
            <text:p>Mar 1992</text:p>
          </table:table-cell>
          <table:table-cell table:number-columns-repeated="4"/>
          <table:table-cell table:style-name="ce3" table:number-columns-repeated="16363"/>
        </table:table-row>
        <table:table-row table:style-name="ro1" table:visibility="filter">
          <table:table-cell office:value-type="float" office:value="41">
            <text:p>41</text:p>
          </table:table-cell>
          <table:table-cell table:style-name="ce4" office:value-type="string">
            <text:p>true</text:p>
          </table:table-cell>
          <table:table-cell table:number-columns-repeated="2" office:value-type="string">
            <text:p>Citicorp Global Information Network</text:p>
          </table:table-cell>
          <table:table-cell/>
          <table:table-cell office:value-type="string">
            <text:p>Citicorp Global Information Network, One Court Square, 48th floor, Long Island City,\nNY 11120, USA, Tel: 1 718 248 2990, Fax: 1 718 248 2767</text:p>
          </table:table-cell>
          <table:table-cell office:value-type="string">
            <text:p>1) ICD CGIN Citicorp Global Information Network, 2) None</text:p>
          </table:table-cell>
          <table:table-cell office:value-type="string">
            <text:p>None</text:p>
          </table:table-cell>
          <table:table-cell table:number-columns-repeated="4"/>
          <table:table-cell office:value-type="string">
            <text:p>Any company or organization that participates in a Citicorp Global Information\nnetwork environment. <text:s/>This program encompasses companies throughout the world.</text:p>
          </table:table-cell>
          <table:table-cell office:value-type="string">
            <text:p>The ICD code will also form the initial part of the Citicorp Network addressing object\nidentifier tree and naming tree as depicted in Addendum 2 to ISO 8348</text:p>
          </table:table-cell>
          <table:table-cell/>
          <table:table-cell office:value-type="string">
            <text:p>ANSI</text:p>
          </table:table-cell>
          <table:table-cell table:style-name="ce4" office:value-type="string">
            <text:p>Apr 1992</text:p>
          </table:table-cell>
          <table:table-cell table:number-columns-repeated="4"/>
          <table:table-cell table:style-name="ce3" table:number-columns-repeated="16363"/>
        </table:table-row>
        <table:table-row table:style-name="ro1" table:visibility="filter">
          <table:table-cell office:value-type="float" office:value="42">
            <text:p>42</text:p>
          </table:table-cell>
          <table:table-cell table:style-name="ce4" office:value-type="string">
            <text:p>true</text:p>
          </table:table-cell>
          <table:table-cell table:number-columns-repeated="2" office:value-type="string">
            <text:p>DBP Telekom Object Identifiers</text:p>
          </table:table-cell>
          <table:table-cell/>
          <table:table-cell office:value-type="string">
            <text:p>DBP Telekom, Product Development Telesec, P.O. <text:s/>Box 10 00 20, D - 5900 Siegen,\nGERMANY, Tel: +49 271 708 1600, Fax: +49 271 21 835</text:p>
          </table:table-cell>
          <table:table-cell office:value-type="string">
            <text:p>1) Organisation code: four numeric digits (ICD), 2) Organisation name: Deutsche\nBundespost Telekom</text:p>
          </table:table-cell>
          <table:table-cell office:value-type="string">
            <text:p>The display of the code is as per ISO 6523 clause 4, however, its use in restricted to\nthe ISO register. The presentation of the organisation name in a certain application\nis decided individually by the requirements of the application.</text:p>
          </table:table-cell>
          <table:table-cell table:number-columns-repeated="4"/>
          <table:table-cell office:value-type="string">
            <text:p>Telekom subdivisions and customers using Telekom applications &amp; communication\nservices.</text:p>
          </table:table-cell>
          <table:table-cell office:value-type="string">
            <text:p>1) The ICD is primarily intended for the registration of Object Identifiers, according to\nISO 8824/8825 (ANS.1) to be used for the identification resp. registration of: -\napplication layer protocols, - file &amp; document formats, - information objects, -\nlocal/remote procedures. <text:s/>The OID structure and the inclusion of the ICD therein is\ngiven below: level 1: iso(1), level 2: identifiedOrganisation(3), level 3 (ICD): dbpt(0042),\nlevel 4 to n: (defined by Telekom)</text:p>
          </table:table-cell>
          <table:table-cell/>
          <table:table-cell office:value-type="string">
            <text:p>DIN</text:p>
          </table:table-cell>
          <table:table-cell table:style-name="ce4" office:value-type="string">
            <text:p>May 1992</text:p>
          </table:table-cell>
          <table:table-cell table:number-columns-repeated="4"/>
          <table:table-cell table:style-name="ce3" table:number-columns-repeated="16363"/>
        </table:table-row>
        <table:table-row table:style-name="ro1" table:visibility="filter">
          <table:table-cell office:value-type="float" office:value="43">
            <text:p>43</text:p>
          </table:table-cell>
          <table:table-cell table:style-name="ce4" office:value-type="string">
            <text:p>true</text:p>
          </table:table-cell>
          <table:table-cell table:number-columns-repeated="2" office:value-type="string">
            <text:p>HydroNETT</text:p>
          </table:table-cell>
          <table:table-cell/>
          <table:table-cell office:value-type="string">
            <text:p>Norsk Hydro a.s. Att. <text:s/>Nils Hoeg, Corporate Staff Information Systems,\nDrammensveien 264, Vaekero, Oslo, P. <text:s/>O. Box 200, N-1321 Stabekk, Norway, Tel:\n+47 2 73 81 00, Fax: +47 2 73 97 87, Tlx: 72948 hydro N</text:p>
          </table:table-cell>
          <table:table-cell office:value-type="string">
            <text:p>1) ICD code: 4 digit, Organization code: (up to 14 characters). <text:s/>Organization name:\n(up to 250 characters). <text:s/>2) No check digits needed.</text:p>
          </table:table-cell>
          <table:table-cell office:value-type="string">
            <text:p>None</text:p>
          </table:table-cell>
          <table:table-cell table:number-columns-repeated="4"/>
          <table:table-cell office:value-type="string">
            <text:p>Norsk Hydro a.s. is a multinational company represented with different business\nunits in more than 25 countries.</text:p>
          </table:table-cell>
          <table:table-cell office:value-type="string">
            <text:p>The ICD code forms the initial part of the OSI network addressing as depicted in ISO\n8348/AD2.</text:p>
          </table:table-cell>
          <table:table-cell/>
          <table:table-cell office:value-type="string">
            <text:p>Norges Standardiseringsforbund. <text:s/>(Norwegian Standards Association.)</text:p>
          </table:table-cell>
          <table:table-cell table:style-name="ce4" office:value-type="string">
            <text:p>Aug 1992</text:p>
          </table:table-cell>
          <table:table-cell table:number-columns-repeated="4"/>
          <table:table-cell table:style-name="ce3" table:number-columns-repeated="16363"/>
        </table:table-row>
        <table:table-row table:style-name="ro1" table:visibility="filter">
          <table:table-cell office:value-type="float" office:value="44">
            <text:p>44</text:p>
          </table:table-cell>
          <table:table-cell table:style-name="ce4" office:value-type="string">
            <text:p>true</text:p>
          </table:table-cell>
          <table:table-cell table:number-columns-repeated="2" office:value-type="string">
            <text:p>Thai Industrial Standards Institute (TISI)</text:p>
          </table:table-cell>
          <table:table-cell/>
          <table:table-cell office:value-type="string">
            <text:p>Thai Industrial Standards Institute (TISI), Rama VI Street, Bangkok 10400,\nTHAILAND TEL: +66 2 245 78 02, FAX: +66 2 247 87 41</text:p>
          </table:table-cell>
          <table:table-cell office:value-type="string">
            <text:p>1) Four Fields, First field = four digits, ICD code, Second field = three characters to\nrepresent organization group, Third field = between 1-11 characters, Fourth field =\nOrganization Name, up to 250, characters, 2) None</text:p>
          </table:table-cell>
          <table:table-cell office:value-type="string">
            <text:p>None</text:p>
          </table:table-cell>
          <table:table-cell table:number-columns-repeated="4"/>
          <table:table-cell office:value-type="string">
            <text:p>Government: organizations, business entities, financial institutions, etc. <text:s/>as specified\nby the second field to ensure smooth inter-communication among these\norganizations in Thailand.</text:p>
          </table:table-cell>
          <table:table-cell office:value-type="string">
            <text:p>The ICD code forms the initial part of international addressing for Thailand.</text:p>
          </table:table-cell>
          <table:table-cell/>
          <table:table-cell office:value-type="string">
            <text:p>Thai Industrial Standards Institute (TISI)</text:p>
          </table:table-cell>
          <table:table-cell table:style-name="ce4" office:value-type="string">
            <text:p>Aug 1992</text:p>
          </table:table-cell>
          <table:table-cell table:number-columns-repeated="4"/>
          <table:table-cell table:style-name="ce3" table:number-columns-repeated="16363"/>
        </table:table-row>
        <table:table-row table:style-name="ro1" table:visibility="filter">
          <table:table-cell office:value-type="float" office:value="45">
            <text:p>45</text:p>
          </table:table-cell>
          <table:table-cell table:style-name="ce4" office:value-type="string">
            <text:p>true</text:p>
          </table:table-cell>
          <table:table-cell table:number-columns-repeated="2" office:value-type="string">
            <text:p>ICI Company Identification System</text:p>
          </table:table-cell>
          <table:table-cell/>
          <table:table-cell office:value-type="string">
            <text:p>ICI PLC, Millbank, London, SW1P 3JF, Tel: 071 834 4444, Fax: 071 834 2042</text:p>
          </table:table-cell>
          <table:table-cell office:value-type="string">
            <text:p>1) ICD org, Code, 1 4 5 8 9 n, xxxx/xxxx/organisation name//, 2) None</text:p>
          </table:table-cell>
          <table:table-cell office:value-type="string">
            <text:p>Upper and lower case only</text:p>
          </table:table-cell>
          <table:table-cell table:number-columns-repeated="4"/>
          <table:table-cell office:value-type="string">
            <text:p>The coding system covers all ICI Companies Worldwide.</text:p>
          </table:table-cell>
          <table:table-cell office:value-type="string">
            <text:p>The ICD code will be used to manage NSAP allocation for all ICI companies on a\nworldwide basis. <text:s/>The organisation code is used Worldwide by ICI application\nsystems to identify ICI registered companies in machine to machine communications.</text:p>
          </table:table-cell>
          <table:table-cell/>
          <table:table-cell office:value-type="string">
            <text:p>BSI Standards</text:p>
          </table:table-cell>
          <table:table-cell table:style-name="ce4" office:value-type="string">
            <text:p>Sep 1992</text:p>
          </table:table-cell>
          <table:table-cell table:number-columns-repeated="4"/>
          <table:table-cell table:style-name="ce3" table:number-columns-repeated="16363"/>
        </table:table-row>
        <table:table-row table:style-name="ro1" table:visibility="filter">
          <table:table-cell office:value-type="float" office:value="46">
            <text:p>46</text:p>
          </table:table-cell>
          <table:table-cell table:style-name="ce4" office:value-type="string">
            <text:p>true</text:p>
          </table:table-cell>
          <table:table-cell table:number-columns-repeated="2" office:value-type="string">
            <text:p>FUNLOC</text:p>
          </table:table-cell>
          <table:table-cell/>
          <table:table-cell office:value-type="string">
            <text:p>Royal Philips Electronics N.V. <text:s/>Corporate Information Technology, building VP-1,\nGroenewoudseweg 1, P O Box 218, 5600 MD Eindhoven, The Netherlands, Tel: +31\n40 27 83008, Fax: +31 40 27 80080</text:p>
          </table:table-cell>
          <table:table-cell office:value-type="string">
            <text:p>1) 6 Decimal digits,the first 3 denoting the country in a proprietary coding system. <text:s/>2)\nNone</text:p>
          </table:table-cell>
          <table:table-cell office:value-type="string">
            <text:p>None</text:p>
          </table:table-cell>
          <table:table-cell table:number-columns-repeated="4"/>
          <table:table-cell office:value-type="string">
            <text:p>Function locations identified by legal name and address; both for Philips and external\nparties.</text:p>
          </table:table-cell>
          <table:table-cell office:value-type="string">
            <text:p>Current applications are Philips accounting and logistic systems; new application is\nthe identification of objects in the open network environment according to ISO 8824\nwhich starts with a party identification</text:p>
          </table:table-cell>
          <table:table-cell/>
          <table:table-cell office:value-type="string">
            <text:p>NNI</text:p>
          </table:table-cell>
          <table:table-cell office:value-type="string">
            <text:p>Sep 1992 / Amended September 2002</text:p>
          </table:table-cell>
          <table:table-cell table:number-columns-repeated="4"/>
          <table:table-cell table:style-name="ce3" table:number-columns-repeated="16363"/>
        </table:table-row>
        <table:table-row table:style-name="ro1" table:visibility="filter">
          <table:table-cell office:value-type="float" office:value="47">
            <text:p>47</text:p>
          </table:table-cell>
          <table:table-cell table:style-name="ce4" office:value-type="string">
            <text:p>true</text:p>
          </table:table-cell>
          <table:table-cell table:number-columns-repeated="2" office:value-type="string">
            <text:p>BULL ODI/DSA/UNIX Network</text:p>
          </table:table-cell>
          <table:table-cell/>
          <table:table-cell office:value-type="string">
            <text:p>BULL S.A. DTBG,20 Rue Dleumegaie, FRANCE 93406 Saint-Ouen, Tel: +33 (1) 49\n45 51 40, Fax: +33 (1) 49 45 53 36</text:p>
          </table:table-cell>
          <table:table-cell office:value-type="string">
            <text:p>1) Four numeric digits, 2) None</text:p>
          </table:table-cell>
          <table:table-cell office:value-type="string">
            <text:p>None</text:p>
          </table:table-cell>
          <table:table-cell table:number-columns-repeated="4"/>
          <table:table-cell office:value-type="string">
            <text:p>All structures and customers in the world using Bull Networks applications and\ncommunications services.</text:p>
          </table:table-cell>
          <table:table-cell office:value-type="string">
            <text:p>To be used in data communications to form part of the network address. <text:s/>The ISO\n6523 ICD IDI format with binary syntax will be used.</text:p>
          </table:table-cell>
          <table:table-cell/>
          <table:table-cell office:value-type="string">
            <text:p>AFNOR</text:p>
          </table:table-cell>
          <table:table-cell table:style-name="ce4" office:value-type="string">
            <text:p>Sep 1992</text:p>
          </table:table-cell>
          <table:table-cell table:number-columns-repeated="4"/>
          <table:table-cell table:style-name="ce3" table:number-columns-repeated="16363"/>
        </table:table-row>
        <table:table-row table:style-name="ro1" table:visibility="filter">
          <table:table-cell office:value-type="float" office:value="48">
            <text:p>48</text:p>
          </table:table-cell>
          <table:table-cell table:style-name="ce4" office:value-type="string">
            <text:p>true</text:p>
          </table:table-cell>
          <table:table-cell table:number-columns-repeated="2" office:value-type="string">
            <text:p>OSINZ</text:p>
          </table:table-cell>
          <table:table-cell/>
          <table:table-cell office:value-type="string">
            <text:p>OSINZ, (Open Systems Interconnection of New Zealand Inc.), c/- P O Box 5356,\nWellesley Street, Auckland New Zealand Tel: Fax</text:p>
          </table:table-cell>
          <table:table-cell office:value-type="string">
            <text:p>1) 8 Digits (1-4 organisation), (5-8 Subnet ID), 2) None</text:p>
          </table:table-cell>
          <table:table-cell office:value-type="string">
            <text:p>None except all fields are left justified</text:p>
          </table:table-cell>
          <table:table-cell table:number-columns-repeated="4"/>
          <table:table-cell office:value-type="string">
            <text:p>Organisations in New Zealand participating in OSI interop activities</text:p>
          </table:table-cell>
          <table:table-cell office:value-type="string">
            <text:p>ISO 6523 ICD IDI format with binary syntax will be used</text:p>
          </table:table-cell>
          <table:table-cell/>
          <table:table-cell office:value-type="string">
            <text:p>SANZ</text:p>
          </table:table-cell>
          <table:table-cell table:style-name="ce4" office:value-type="string">
            <text:p>OCT 1992</text:p>
          </table:table-cell>
          <table:table-cell table:number-columns-repeated="4"/>
          <table:table-cell table:style-name="ce3" table:number-columns-repeated="16363"/>
        </table:table-row>
        <table:table-row table:style-name="ro1" table:visibility="filter">
          <table:table-cell office:value-type="float" office:value="49">
            <text:p>49</text:p>
          </table:table-cell>
          <table:table-cell table:style-name="ce4" office:value-type="string">
            <text:p>true</text:p>
          </table:table-cell>
          <table:table-cell table:number-columns-repeated="2" office:value-type="string">
            <text:p>Auckland Area Health</text:p>
          </table:table-cell>
          <table:table-cell/>
          <table:table-cell office:value-type="string">
            <text:p>Auckland Area Health Board, Information Systems, Greenlane/National Women's\nHospital, Greenlane West, Auckland 3, New Zealand Tel: Fax</text:p>
          </table:table-cell>
          <table:table-cell office:value-type="string">
            <text:p>1) 8 Digits (1-4 organisation), (5-8 Subnet ID), 2) None</text:p>
          </table:table-cell>
          <table:table-cell office:value-type="string">
            <text:p>None except all fields are left justified</text:p>
          </table:table-cell>
          <table:table-cell table:number-columns-repeated="4"/>
          <table:table-cell office:value-type="string">
            <text:p>Health related organizations in New Zealand</text:p>
          </table:table-cell>
          <table:table-cell office:value-type="string">
            <text:p>ISO 6523 ICD IDI format with binary syntax will be used</text:p>
          </table:table-cell>
          <table:table-cell/>
          <table:table-cell office:value-type="string">
            <text:p>SANZ</text:p>
          </table:table-cell>
          <table:table-cell table:style-name="ce4" office:value-type="string">
            <text:p>Oct 1992</text:p>
          </table:table-cell>
          <table:table-cell table:number-columns-repeated="4"/>
          <table:table-cell table:style-name="ce3" table:number-columns-repeated="16363"/>
        </table:table-row>
        <table:table-row table:style-name="ro1" table:visibility="filter">
          <table:table-cell office:value-type="float" office:value="50">
            <text:p>50</text:p>
          </table:table-cell>
          <table:table-cell table:style-name="ce4" office:value-type="string">
            <text:p>true</text:p>
          </table:table-cell>
          <table:table-cell table:number-columns-repeated="2" office:value-type="string">
            <text:p>Firmenich</text:p>
          </table:table-cell>
          <table:table-cell/>
          <table:table-cell office:value-type="string">
            <text:p>Firmenich S A, 7, rue de la Bergere, CH-1217 Meyrin 2, GENEVA, Switzerland Tel:\n++41 22 780 2211, Contact: Marc Gaudar</text:p>
          </table:table-cell>
          <table:table-cell office:value-type="string">
            <text:p>1) XXXX/XXX XXXXXXX/FIRMENICH//, 2) XXXX/XXXXXXXXXX//</text:p>
          </table:table-cell>
          <table:table-cell office:value-type="string">
            <text:p>1) XXXX XXX XXXXXXX FIRMENICH, 2) XXX XXXXXXXXXX</text:p>
          </table:table-cell>
          <table:table-cell table:number-columns-repeated="4"/>
          <table:table-cell office:value-type="string">
            <text:p>International commercial organization with 30 large and 40 small plants in a total of\n25 different countries</text:p>
          </table:table-cell>
          <table:table-cell office:value-type="string">
            <text:p>Interconnect the plants by an OSI network essentially over X.25 carrier</text:p>
          </table:table-cell>
          <table:table-cell/>
          <table:table-cell office:value-type="string">
            <text:p>BAKOM Switzerland</text:p>
          </table:table-cell>
          <table:table-cell table:style-name="ce4" office:value-type="string">
            <text:p>Oct 1992</text:p>
          </table:table-cell>
          <table:table-cell table:number-columns-repeated="4"/>
          <table:table-cell table:style-name="ce3" table:number-columns-repeated="16363"/>
        </table:table-row>
        <table:table-row table:style-name="ro1" table:visibility="filter">
          <table:table-cell office:value-type="float" office:value="51">
            <text:p>51</text:p>
          </table:table-cell>
          <table:table-cell table:style-name="ce4" office:value-type="string">
            <text:p>true</text:p>
          </table:table-cell>
          <table:table-cell table:number-columns-repeated="2" office:value-type="string">
            <text:p>AGFA-DIS</text:p>
          </table:table-cell>
          <table:table-cell/>
          <table:table-cell office:value-type="string">
            <text:p>AGFA N.V. <text:s/>Septestraat 27, 2640 Mortsel, BELGIUM, Tel: + 32 3 4442111, Fax: +\n32 3 4447094</text:p>
          </table:table-cell>
          <table:table-cell office:value-type="string">
            <text:p>1) XXXX/AGFA-DIS/AGFA-DIS//, 2) None</text:p>
          </table:table-cell>
          <table:table-cell office:value-type="string">
            <text:p>XXXX AGFA-DIS AGFA-DIS</text:p>
          </table:table-cell>
          <table:table-cell table:number-columns-repeated="4"/>
          <table:table-cell office:value-type="string">
            <text:p>All medical related organisations of AGFA</text:p>
          </table:table-cell>
          <table:table-cell office:value-type="string">
            <text:p>Medical Communication</text:p>
          </table:table-cell>
          <table:table-cell/>
          <table:table-cell office:value-type="string">
            <text:p>IBN - BELGIUM</text:p>
          </table:table-cell>
          <table:table-cell table:style-name="ce4" office:value-type="string">
            <text:p>Nov 1992</text:p>
          </table:table-cell>
          <table:table-cell table:number-columns-repeated="4"/>
          <table:table-cell table:style-name="ce3" table:number-columns-repeated="16363"/>
        </table:table-row>
        <table:table-row table:style-name="ro1" table:visibility="filter">
          <table:table-cell office:value-type="float" office:value="52">
            <text:p>52</text:p>
          </table:table-cell>
          <table:table-cell table:style-name="ce4" office:value-type="string">
            <text:p>true</text:p>
          </table:table-cell>
          <table:table-cell table:number-columns-repeated="2" office:value-type="string">
            <text:p>Society of Motion Picture and Television Engineers (SMPTE)</text:p>
          </table:table-cell>
          <table:table-cell/>
          <table:table-cell office:value-type="string">
            <text:p>Society of Motion Picture and Television Engineers (SMPTE), 595 W. <text:s/>Hartadae Ave.\nWhite Plains, NY 10607, USA, Tel: +1 914 761 11 00, Fax: +1 914 761 31 15</text:p>
          </table:table-cell>
          <table:table-cell office:value-type="string">
            <text:p>1) Three fields, First field = ICD, Second field = SMPTE, Third field = Society of\nMotion Picture and Television Engineers, 2) None, except that all fields are left</text:p>
          </table:table-cell>
          <table:table-cell office:value-type="string">
            <text:p>Any organization which operates within or contributes to establishing SMPTE\npractices. This program encompasses organizations throughout the world.</text:p>
          </table:table-cell>
          <table:table-cell table:number-columns-repeated="4"/>
          <table:table-cell office:value-type="string">
            <text:p>Any organization which operates within or contributes to establishing SMPTE\npractices. This program encompasses organizations throughout the world.</text:p>
          </table:table-cell>
          <table:table-cell office:value-type="string">
            <text:p>The ICD code will also be used to identify SMPTE constituent organizations\n(committees, working groups, task forces, etc./), and the objects they, define. <text:s/>The\nICD code will also form the Initial Domain Part of the OSI network addressing and\nnaming tree as specified in Addendum 2 tot ISO 8348</text:p>
          </table:table-cell>
          <table:table-cell/>
          <table:table-cell office:value-type="string">
            <text:p>ANSI</text:p>
          </table:table-cell>
          <table:table-cell table:style-name="ce4" office:value-type="string">
            <text:p>Nov 1992</text:p>
          </table:table-cell>
          <table:table-cell table:number-columns-repeated="4"/>
          <table:table-cell table:style-name="ce3" table:number-columns-repeated="16363"/>
        </table:table-row>
        <table:table-row table:style-name="ro1" table:visibility="filter">
          <table:table-cell office:value-type="float" office:value="53">
            <text:p>53</text:p>
          </table:table-cell>
          <table:table-cell table:style-name="ce4" office:value-type="string">
            <text:p>true</text:p>
          </table:table-cell>
          <table:table-cell table:number-columns-repeated="2" office:value-type="string">
            <text:p>Migros_Network M_NETOPZ</text:p>
          </table:table-cell>
          <table:table-cell/>
          <table:table-cell office:value-type="string">
            <text:p>Migros-Genossenschafts-Bund, Administration KIM-TEKO HH17, Limmatstrasse\n152, 8031 ZURICH, Tel: Fax</text:p>
          </table:table-cell>
          <table:table-cell office:value-type="string">
            <text:p>1) MIGROS, MGB, 2) None</text:p>
          </table:table-cell>
          <table:table-cell office:value-type="string">
            <text:p>NONE</text:p>
          </table:table-cell>
          <table:table-cell table:number-columns-repeated="4"/>
          <table:table-cell office:value-type="string">
            <text:p>Private Network for National Industrie SWISS, With Backbone Netz X25, About 400\nnodes (1992)</text:p>
          </table:table-cell>
          <table:table-cell office:value-type="string">
            <text:p>NONE</text:p>
          </table:table-cell>
          <table:table-cell/>
          <table:table-cell office:value-type="string">
            <text:p>OFCOM (SWISS)</text:p>
          </table:table-cell>
          <table:table-cell table:style-name="ce4" office:value-type="string">
            <text:p>Dec 1992</text:p>
          </table:table-cell>
          <table:table-cell table:number-columns-repeated="4"/>
          <table:table-cell table:style-name="ce3" table:number-columns-repeated="16363"/>
        </table:table-row>
        <table:table-row table:style-name="ro1" table:visibility="filter">
          <table:table-cell office:value-type="float" office:value="54">
            <text:p>54</text:p>
          </table:table-cell>
          <table:table-cell table:style-name="ce4" office:value-type="string">
            <text:p>true</text:p>
          </table:table-cell>
          <table:table-cell table:number-columns-repeated="2" office:value-type="string">
            <text:p>ISO6523 - ICDPCR</text:p>
          </table:table-cell>
          <table:table-cell/>
          <table:table-cell office:value-type="string">
            <text:p>Pfizer Central Research, Ramsgate Road, Sandwich, Kent, CT13 9NJ, Tel: 0304\n616223, Fax</text:p>
          </table:table-cell>
          <table:table-cell office:value-type="string">
            <text:p>1) As per Addendum 2 ISO 8348, 2) None</text:p>
          </table:table-cell>
          <table:table-cell office:value-type="string">
            <text:p>None</text:p>
          </table:table-cell>
          <table:table-cell table:number-columns-repeated="4"/>
          <table:table-cell office:value-type="string">
            <text:p>Pfizer is a world-wide organization of which Pfizer Ltd is the principal UK subsidiary.\nIt possesses a private global network</text:p>
          </table:table-cell>
          <table:table-cell office:value-type="string">
            <text:p>This code could be used internationally by Pfizer thus a non-geographic code is\nrequired. <text:s/>The code forms the initial part of the OSI network addressing and naming\ntree depicted in Addendum 2 of ISO 8348.</text:p>
          </table:table-cell>
          <table:table-cell/>
          <table:table-cell office:value-type="string">
            <text:p>BSI</text:p>
          </table:table-cell>
          <table:table-cell table:style-name="ce4" office:value-type="string">
            <text:p>Dec 1992</text:p>
          </table:table-cell>
          <table:table-cell office:value-type="string">
            <text:p>This will be the AFI:IDI for the Pfizer Group OSI Network implementation, worldwide.</text:p>
          </table:table-cell>
          <table:table-cell table:number-columns-repeated="3"/>
          <table:table-cell table:style-name="ce3" table:number-columns-repeated="16363"/>
        </table:table-row>
        <table:table-row table:style-name="ro1" table:visibility="filter">
          <table:table-cell office:value-type="float" office:value="55">
            <text:p>55</text:p>
          </table:table-cell>
          <table:table-cell table:style-name="ce4" office:value-type="string">
            <text:p>true</text:p>
          </table:table-cell>
          <table:table-cell table:number-columns-repeated="2" office:value-type="string">
            <text:p>Energy Net</text:p>
          </table:table-cell>
          <table:table-cell/>
          <table:table-cell office:value-type="string">
            <text:p>ABB Asea Brown Boveri Ltd, Affolterstrasse 44, 8050 Zurich, Correspondence\nAddress: ABB Informatik AG, C. Falbriad, TEC1.N, Haselstrasse, CH-5401 Baden,\nTel: + 41 56 75 26 77, Fax: + 41 56 75 21 21</text:p>
          </table:table-cell>
          <table:table-cell office:value-type="string">
            <text:p>1) AFI, ICD, country code, routing domain, Area, ID, SEL, 2) None</text:p>
          </table:table-cell>
          <table:table-cell office:value-type="string">
            <text:p>None</text:p>
          </table:table-cell>
          <table:table-cell table:number-columns-repeated="4"/>
          <table:table-cell office:value-type="string">
            <text:p>Worldwide Private Network for the power plant, power transmission and distribution\nindustry segment.</text:p>
          </table:table-cell>
          <table:table-cell office:value-type="string">
            <text:p>None</text:p>
          </table:table-cell>
          <table:table-cell/>
          <table:table-cell office:value-type="string">
            <text:p>BAKOM, CH-2503 Biel- Bienne, Switzerland</text:p>
          </table:table-cell>
          <table:table-cell table:style-name="ce4" office:value-type="string">
            <text:p>Jan 1993</text:p>
          </table:table-cell>
          <table:table-cell table:number-columns-repeated="4"/>
          <table:table-cell table:style-name="ce3" table:number-columns-repeated="16363"/>
        </table:table-row>
        <table:table-row table:style-name="ro1" table:visibility="filter">
          <table:table-cell office:value-type="float" office:value="56">
            <text:p>56</text:p>
          </table:table-cell>
          <table:table-cell table:style-name="ce4" office:value-type="string">
            <text:p>true</text:p>
          </table:table-cell>
          <table:table-cell table:number-columns-repeated="2" office:value-type="string">
            <text:p>Nokia Object Identifiers (NOI)</text:p>
          </table:table-cell>
          <table:table-cell/>
          <table:table-cell office:value-type="string">
            <text:p>Nokia Corporation Tel: + 358 0 43761, Research Centre Fax: + 358 0 4376227,\nP.O.Box 156, SF-02101 Espoo, FINLAND</text:p>
          </table:table-cell>
          <table:table-cell office:value-type="string">
            <text:p>1) ICD (fixed length 4 digits), Organization code (variable length up to 14 characters),\nOrganization name (variable length up to 250 characters), 2) None</text:p>
          </table:table-cell>
          <table:table-cell office:value-type="string">
            <text:p>When the SIO is displayed or printed the ICD, the organization, code and the\norganization name shall be separated by one or more spaces.</text:p>
          </table:table-cell>
          <table:table-cell table:number-columns-repeated="4"/>
          <table:table-cell office:value-type="string">
            <text:p>Nokia Corporation with its Business Groups (Telecommunications, Mobile Phones,\nCables and Machinery, Consumer Electronics and Basic Industries) and its\nassociated companies worldwide.</text:p>
          </table:table-cell>
          <table:table-cell office:value-type="string">
            <text:p>a) In the SIO the organization name will normally be omitted, b) The code is primarily\nintended for the registration of Object Identifiers according to ISO/IEC 8824: Level\n1:iso(1), Level 2:identified-organization(3), Level 3:nokia(xxxx), Level 4 and\nhigher:defined by Nokia conventions</text:p>
          </table:table-cell>
          <table:table-cell/>
          <table:table-cell office:value-type="string">
            <text:p>Finish Standards Association SFS</text:p>
          </table:table-cell>
          <table:table-cell table:style-name="ce4" office:value-type="string">
            <text:p>Feb 1993</text:p>
          </table:table-cell>
          <table:table-cell table:number-columns-repeated="4"/>
          <table:table-cell table:style-name="ce3" table:number-columns-repeated="16363"/>
        </table:table-row>
        <table:table-row table:style-name="ro1" table:visibility="filter">
          <table:table-cell office:value-type="float" office:value="57">
            <text:p>57</text:p>
          </table:table-cell>
          <table:table-cell table:style-name="ce4" office:value-type="string">
            <text:p>true</text:p>
          </table:table-cell>
          <table:table-cell table:number-columns-repeated="2" office:value-type="string">
            <text:p>Saint Gobain</text:p>
          </table:table-cell>
          <table:table-cell/>
          <table:table-cell office:value-type="string">
            <text:p>Saint Gobain, Les Miroirs, 18, avenue d'Alsace, 92096 PARIS La Defense Cedex 27,\nMonsieur Jean Dorleans, Tel: 33 1 47 62 36 05, Fax: 33 1 47 62 50 64</text:p>
          </table:table-cell>
          <table:table-cell office:value-type="string">
            <text:p>1) ICD 4 digits, (AFI 47 followed by a 4 digit ICD), 2) None</text:p>
          </table:table-cell>
          <table:table-cell office:value-type="string">
            <text:p>None</text:p>
          </table:table-cell>
          <table:table-cell table:number-columns-repeated="4"/>
          <table:table-cell office:value-type="string">
            <text:p>A group of industrial companies manufacturing engineered materials located in 35\ndifferent countries.</text:p>
          </table:table-cell>
          <table:table-cell office:value-type="string">
            <text:p>To be used for assignment of: N.E.T (ISO 8348/Add 2), A.E.T (FTAM, X.400 Psaps,\nand so on), and object identification (ISO 8824/8825)</text:p>
          </table:table-cell>
          <table:table-cell/>
          <table:table-cell office:value-type="string">
            <text:p>AFNOR</text:p>
          </table:table-cell>
          <table:table-cell table:style-name="ce4" office:value-type="string">
            <text:p>Mar 1993</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58">
            <text:p>58</text:p>
          </table:table-cell>
          <table:table-cell table:style-name="ce4" office:value-type="string">
            <text:p>true</text:p>
          </table:table-cell>
          <table:table-cell table:number-columns-repeated="2" office:value-type="string">
            <text:p>Siemens Corporate Network</text:p>
          </table:table-cell>
          <table:table-cell/>
          <table:table-cell office:value-type="string">
            <text:p>Siemens AG,RI SCN, St Martin-Str. <text:s/>76, W-8000 Muenchen 90, Germany, Tel: +49\n89 4133 2565, Fax: +49 89 4133 1984</text:p>
          </table:table-cell>
          <table:table-cell office:value-type="string">
            <text:p>1) cccc(ICD) SCN (Siemens Corporate Network), 2) No check digits as in general the\nwhole message has a checking mechanism.</text:p>
          </table:table-cell>
          <table:table-cell office:value-type="string">
            <text:p>None</text:p>
          </table:table-cell>
          <table:table-cell table:number-columns-repeated="4"/>
          <table:table-cell office:value-type="string">
            <text:p>Any company or organization that participates in the Siemens Corporate Network.\nThis network encompasses companies and organizations throughout the world.</text:p>
          </table:table-cell>
          <table:table-cell office:value-type="string">
            <text:p>The ICD code will form the initial part of the OSI Network addressing and naming tree\nas depicted in Addendum 2 to ISO 8348 (Network layer addressing). <text:s/>These\naddresses will uniquely identify systems within SCN and to the outside world.</text:p>
          </table:table-cell>
          <table:table-cell/>
          <table:table-cell office:value-type="string">
            <text:p>Deutsches Institut fur Normung e.V.(DIN)</text:p>
          </table:table-cell>
          <table:table-cell table:style-name="ce4" office:value-type="string">
            <text:p>Apr 1993</text:p>
          </table:table-cell>
          <table:table-cell table:number-columns-repeated="4"/>
          <table:table-cell table:style-name="ce3" table:number-columns-repeated="16363"/>
        </table:table-row>
        <table:table-row table:style-name="ro1" table:visibility="filter">
          <table:table-cell office:value-type="float" office:value="59">
            <text:p>59</text:p>
          </table:table-cell>
          <table:table-cell table:style-name="ce4" office:value-type="string">
            <text:p>true</text:p>
          </table:table-cell>
          <table:table-cell table:number-columns-repeated="2" office:value-type="string">
            <text:p>DANZNET</text:p>
          </table:table-cell>
          <table:table-cell/>
          <table:table-cell office:value-type="string">
            <text:p>DANZAS AG, Head Office, Switzerland 4051 Basel, Attn Schutz Bertrand</text:p>
          </table:table-cell>
          <table:table-cell office:value-type="string">
            <text:p>1) Between 1 - 4 characters (letters, digits and hyphens only). <text:s/>2) Between 1 - 12\ncharacters (letters, digits and hyphens only).</text:p>
          </table:table-cell>
          <table:table-cell office:value-type="string">
            <text:p>NONE</text:p>
          </table:table-cell>
          <table:table-cell table:number-columns-repeated="4"/>
          <table:table-cell office:value-type="string">
            <text:p>Danzas country group organizations and Head Office</text:p>
          </table:table-cell>
          <table:table-cell office:value-type="string">
            <text:p>NONE</text:p>
          </table:table-cell>
          <table:table-cell/>
          <table:table-cell office:value-type="string">
            <text:p>OFCOM/BAKOM</text:p>
          </table:table-cell>
          <table:table-cell table:style-name="ce4" office:value-type="string">
            <text:p>May 1993</text:p>
          </table:table-cell>
          <table:table-cell table:number-columns-repeated="4"/>
          <table:table-cell table:style-name="ce3" table:number-columns-repeated="16363"/>
        </table:table-row>
        <table:table-row table:style-name="ro1" table:visibility="filter">
          <table:table-cell office:value-type="float" office:value="60">
            <text:p>60</text:p>
          </table:table-cell>
          <table:table-cell table:style-name="ce4" office:value-type="string">
            <text:p>true</text:p>
          </table:table-cell>
          <table:table-cell table:number-columns-repeated="2" office:value-type="string">
            <text:p>Data Universal Numbering System (D-U-N-S Number)</text:p>
          </table:table-cell>
          <table:table-cell/>
          <table:table-cell office:value-type="string">
            <text:p>Dun and Bradstreet Ltd, Holmers Farm Way, High Wycombe, 1 Bucks, HP12 4UL</text:p>
          </table:table-cell>
          <table:table-cell office:value-type="string">
            <text:p>1) Eight identification digits and a check digit. <text:s/>A two digit prefix will be added in the\nfuture but it will not be used to calculate the check digit. <text:s/>2) The Organization name\nis not part of the D-U-N-S number.</text:p>
          </table:table-cell>
          <table:table-cell office:value-type="string">
            <text:p>IIIIIIIIC where all characters are the digits 0, to 9, I = an identification digit and C = the\ncheck digit. <text:s/>When the prefix (P) is added the display requirement will be eleven\ndigits, PPIIIIIIIIC.</text:p>
          </table:table-cell>
          <table:table-cell table:number-columns-repeated="4"/>
          <table:table-cell office:value-type="string">
            <text:p>It is the objective of Dun and Bradstreet to allocate a D-U-N-S number to all\nbusinesses and institutions engaged in a specific business activity.</text:p>
          </table:table-cell>
          <table:table-cell office:value-type="string">
            <text:p>The D-U-N-S Number originated to facilitate the compilation of financial status reports\non those involved in business transactions but it is now widely used for other\npurposes also. <text:s/>The number has world wide recognition as a means of identifying\nbusinesses and institutions.</text:p>
          </table:table-cell>
          <table:table-cell/>
          <table:table-cell office:value-type="string">
            <text:p>BSI/DISC</text:p>
          </table:table-cell>
          <table:table-cell table:style-name="ce4" office:value-type="string">
            <text:p>JUN 1993</text:p>
          </table:table-cell>
          <table:table-cell office:value-type="string">
            <text:p>A full specification of scheme has been deposited with the Registration Authority</text:p>
          </table:table-cell>
          <table:table-cell table:number-columns-repeated="3"/>
          <table:table-cell table:style-name="ce3" table:number-columns-repeated="16363"/>
        </table:table-row>
        <table:table-row table:style-name="ro1" table:visibility="filter">
          <table:table-cell office:value-type="float" office:value="61">
            <text:p>61</text:p>
          </table:table-cell>
          <table:table-cell table:style-name="ce4" office:value-type="string">
            <text:p>true</text:p>
          </table:table-cell>
          <table:table-cell table:number-columns-repeated="2" office:value-type="string">
            <text:p>SOFFEX OSI</text:p>
          </table:table-cell>
          <table:table-cell/>
          <table:table-cell office:value-type="string">
            <text:p>SOFFEX Swiss Options and Financial Futures Exchange AG. <text:s/>Neumattstrasse 7,\nCH-8953 Dietikon, Switzerland</text:p>
          </table:table-cell>
          <table:table-cell office:value-type="string">
            <text:p>1) 4 numeric digits, 2) None</text:p>
          </table:table-cell>
          <table:table-cell office:value-type="string">
            <text:p>None except all fields are left justified</text:p>
          </table:table-cell>
          <table:table-cell table:number-columns-repeated="4"/>
          <table:table-cell office:value-type="string">
            <text:p>Swiss financial derivatives exchange</text:p>
          </table:table-cell>
          <table:table-cell office:value-type="string">
            <text:p>This code is to assist in uniquely identifying data network node addresses in an\ninternational supporting network for financial applications. <text:s/>This supporting network\nmay have operational interfaces to other (private) data networks.</text:p>
          </table:table-cell>
          <table:table-cell/>
          <table:table-cell office:value-type="string">
            <text:p>BAKOM - Bundesamt fuer Kommunication, (Swiss Federal Office for\nCommunication), CH-2501 Biel-Bienne, Switzerland.</text:p>
          </table:table-cell>
          <table:table-cell table:style-name="ce4" office:value-type="string">
            <text:p>Jun 1993</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62">
            <text:p>62</text:p>
          </table:table-cell>
          <table:table-cell table:style-name="ce4" office:value-type="string">
            <text:p>true</text:p>
          </table:table-cell>
          <table:table-cell table:number-columns-repeated="2" office:value-type="string">
            <text:p>KPN OVN</text:p>
          </table:table-cell>
          <table:table-cell/>
          <table:table-cell office:value-type="string">
            <text:p>Koninklijke KPN, Operator Vaste net BBT/IP, P O Box 30000, 2500 GA's-\nGravenhage, The Netherlands, Contact: G L J Kloos, Tel: +31 70 343 4762, Fax: +31\n70 371 3569, E-mail: g.l.j.kloos@kpn.com</text:p>
          </table:table-cell>
          <table:table-cell office:value-type="string">
            <text:p>1) ICD 4 digits, 2) None</text:p>
          </table:table-cell>
          <table:table-cell office:value-type="string">
            <text:p>None</text:p>
          </table:table-cell>
          <table:table-cell table:number-columns-repeated="4"/>
          <table:table-cell office:value-type="string">
            <text:p>KPN OVN (Operator Fixed Networks)</text:p>
          </table:table-cell>
          <table:table-cell office:value-type="string">
            <text:p>This code is used in the VTOA network of KPN OVN.</text:p>
          </table:table-cell>
          <table:table-cell/>
          <table:table-cell office:value-type="string">
            <text:p>Nederlands Normalisatie Instituut, P O Box 5059, 2600 GB DELFT</text:p>
          </table:table-cell>
          <table:table-cell office:value-type="string">
            <text:p>Jul 1993/ Amended Sep 2000</text:p>
          </table:table-cell>
          <table:table-cell office:value-type="string">
            <text:p>Changes in 'Name of coding system', 'Name &amp; address of issuing organization',\n'Description of organizations covered by coding system' and 'Notes on use' Sept</text:p>
          </table:table-cell>
          <table:table-cell table:number-columns-repeated="3"/>
          <table:table-cell table:style-name="ce3" table:number-columns-repeated="16363"/>
        </table:table-row>
        <table:table-row table:style-name="ro1" table:visibility="filter">
          <table:table-cell office:value-type="float" office:value="63">
            <text:p>63</text:p>
          </table:table-cell>
          <table:table-cell table:style-name="ce4" office:value-type="string">
            <text:p>true</text:p>
          </table:table-cell>
          <table:table-cell table:number-columns-repeated="2" office:value-type="string">
            <text:p>ascomOSINet</text:p>
          </table:table-cell>
          <table:table-cell/>
          <table:table-cell office:value-type="string">
            <text:p>Ascom AG, Belpstrasse 37, CH-3000 Bern, Switzerland Fax: +41 55 41 63 85, Tel:\n+41 55 41 60 04</text:p>
          </table:table-cell>
          <table:table-cell office:value-type="string">
            <text:p>1) ICD 4 digits, 2) None</text:p>
          </table:table-cell>
          <table:table-cell office:value-type="string">
            <text:p>All fields are left justified</text:p>
          </table:table-cell>
          <table:table-cell table:number-columns-repeated="4"/>
          <table:table-cell office:value-type="string">
            <text:p>ascom</text:p>
          </table:table-cell>
          <table:table-cell office:value-type="string">
            <text:p>-</text:p>
          </table:table-cell>
          <table:table-cell/>
          <table:table-cell office:value-type="string">
            <text:p>BAKOM Bundesamt fur Kommunication, Zukunftstrasse 44, CH-2501 Biel-Bienne\nSwitzerland</text:p>
          </table:table-cell>
          <table:table-cell table:style-name="ce4" office:value-type="string">
            <text:p>Aug 1993</text:p>
          </table:table-cell>
          <table:table-cell office:value-type="string">
            <text:p>-</text:p>
          </table:table-cell>
          <table:table-cell table:number-columns-repeated="3"/>
          <table:table-cell table:style-name="ce3" table:number-columns-repeated="16363"/>
        </table:table-row>
        <table:table-row table:style-name="ro1" table:visibility="filter">
          <table:table-cell office:value-type="float" office:value="64">
            <text:p>64</text:p>
          </table:table-cell>
          <table:table-cell table:style-name="ce4" office:value-type="string">
            <text:p>true</text:p>
          </table:table-cell>
          <table:table-cell table:number-columns-repeated="2" office:value-type="string">
            <text:p>UTC: Uniforme Transport Code</text:p>
          </table:table-cell>
          <table:table-cell/>
          <table:table-cell office:value-type="string">
            <text:p>Foundation UTC, P.O.Box 82118, 2508 EC The Hague, The Netherlands, Tel: + 31\n70 35 10 777, Fax: + 31 70 35 12 025</text:p>
          </table:table-cell>
          <table:table-cell office:value-type="string">
            <text:p>1) ICD Code: 4 digits, Organization code: minimum 1, maximum 8 digits, Sequence\nnumber: minimum 1, maximum 8 digits, 2) None</text:p>
          </table:table-cell>
          <table:table-cell office:value-type="string">
            <text:p>Check digit according to ISO 7064-8</text:p>
          </table:table-cell>
          <table:table-cell table:number-columns-repeated="4"/>
          <table:table-cell office:value-type="string">
            <text:p>The shipping and transport industry</text:p>
          </table:table-cell>
          <table:table-cell office:value-type="string">
            <text:p>The code identifies an individual transport or handling unit (e.g. <text:s/>pallet, parcel) for\nreasons of tracing or tracing. <text:s/>The unit may have an international destination.</text:p>
          </table:table-cell>
          <table:table-cell/>
          <table:table-cell office:value-type="string">
            <text:p>NNI - The Netherlands</text:p>
          </table:table-cell>
          <table:table-cell table:style-name="ce4" office:value-type="string">
            <text:p>Oct 1993</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65">
            <text:p>65</text:p>
          </table:table-cell>
          <table:table-cell table:style-name="ce4" office:value-type="string">
            <text:p>true</text:p>
          </table:table-cell>
          <table:table-cell table:number-columns-repeated="2" office:value-type="string">
            <text:p>SOLVAY OSI CODING</text:p>
          </table:table-cell>
          <table:table-cell/>
          <table:table-cell office:value-type="string">
            <text:p>Direction Centrale Technique (Informatique Scientifique), SOLVAY S.A, Rue de\nRansbeek 310, B-1120 Bruxelles</text:p>
          </table:table-cell>
          <table:table-cell office:value-type="string">
            <text:p>1) Two octets, fixed length. <text:s/>The particular values of 00-00 (all zeros) and FF-FF\n(allones) will be reserved, so that addresses are able to comply with ECMA-117,\nwhere the ISO 6523 organization code is mapped to ECMA-117 subnetwork. <text:s/>This\nstructure also permits compliance with GOSIP (FIPS PUB 146), 2) No check digits\nwill be used</text:p>
          </table:table-cell>
          <table:table-cell office:value-type="string">
            <text:p>The code should be displayed as XX-XX where X is an hexadecimal number.</text:p>
          </table:table-cell>
          <table:table-cell table:number-columns-repeated="4"/>
          <table:table-cell office:value-type="string">
            <text:p>Companies member of the Solvay Group (globally consolidated), and major\norganizational subdivisions of such companies, including large plants or national\nsubsidiaries.</text:p>
          </table:table-cell>
          <table:table-cell office:value-type="string">
            <text:p>Whenever possible, ISO 8348 addresses using this code will comply with FIPS PUB\n146, with an End System ID of exactly 4 octets, so that the DSP can also conform\nto ECMA 117 where ECMA's subnet-address maps onto FIPS's Subnet ID\nconcatenated with the End System ID.</text:p>
          </table:table-cell>
          <table:table-cell/>
          <table:table-cell office:value-type="string">
            <text:p>IBN-Belgium</text:p>
          </table:table-cell>
          <table:table-cell table:style-name="ce4" office:value-type="string">
            <text:p>Dec 1993</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66">
            <text:p>66</text:p>
          </table:table-cell>
          <table:table-cell table:style-name="ce4" office:value-type="string">
            <text:p>true</text:p>
          </table:table-cell>
          <table:table-cell table:number-columns-repeated="2" office:value-type="string">
            <text:p>Roche Corporate Network</text:p>
          </table:table-cell>
          <table:table-cell/>
          <table:table-cell office:value-type="string">
            <text:p>F. <text:s/>HOFFMANN - LA ROCHE AG, Grenzacherstasse 124, CH-4002 BASEL,\nSwitzerland</text:p>
          </table:table-cell>
          <table:table-cell office:value-type="string">
            <text:p>As per Addendum 2 ISO 8348</text:p>
          </table:table-cell>
          <table:table-cell office:value-type="string">
            <text:p>None</text:p>
          </table:table-cell>
          <table:table-cell table:number-columns-repeated="4"/>
          <table:table-cell office:value-type="string">
            <text:p>Hoffmann- La Roche is an international organization with a private global network.\nThe coding system includes all affiliates belonging to the the Roche group (currently\nabout 125 different legal entities).</text:p>
          </table:table-cell>
          <table:table-cell office:value-type="string">
            <text:p>Will be used internationaly by Roche thus a non-geographic code is required.</text:p>
          </table:table-cell>
          <table:table-cell/>
          <table:table-cell office:value-type="string">
            <text:p>BAKOM Switzerland</text:p>
          </table:table-cell>
          <table:table-cell table:style-name="ce4" office:value-type="string">
            <text:p>Jan 1994</text:p>
          </table:table-cell>
          <table:table-cell table:number-columns-repeated="4"/>
          <table:table-cell table:style-name="ce3" table:number-columns-repeated="16363"/>
        </table:table-row>
        <table:table-row table:style-name="ro1" table:visibility="filter">
          <table:table-cell office:value-type="float" office:value="67">
            <text:p>67</text:p>
          </table:table-cell>
          <table:table-cell table:style-name="ce4" office:value-type="string">
            <text:p>true</text:p>
          </table:table-cell>
          <table:table-cell table:number-columns-repeated="2" office:value-type="string">
            <text:p>ZellwegerOSINet</text:p>
          </table:table-cell>
          <table:table-cell/>
          <table:table-cell office:value-type="string">
            <text:p>Zellweger Uster AG, Wilstrasse 11, CH-8610 USTER, Switzerland Tel: + 41 1 943\n2608, Fax: + 41 1 943 3815</text:p>
          </table:table-cell>
          <table:table-cell office:value-type="string">
            <text:p>1) ICD 4 digits, 2) None</text:p>
          </table:table-cell>
          <table:table-cell office:value-type="string">
            <text:p>All fields are left justified</text:p>
          </table:table-cell>
          <table:table-cell table:number-columns-repeated="4"/>
          <table:table-cell office:value-type="string">
            <text:p>Zellweger</text:p>
          </table:table-cell>
          <table:table-cell office:value-type="string">
            <text:p>BAKOM - Switzerland</text:p>
          </table:table-cell>
          <table:table-cell table:number-columns-repeated="2"/>
          <table:table-cell table:style-name="ce4" office:value-type="string">
            <text:p>Jan 1994</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68">
            <text:p>68</text:p>
          </table:table-cell>
          <table:table-cell table:style-name="ce4" office:value-type="string">
            <text:p>true</text:p>
          </table:table-cell>
          <table:table-cell table:number-columns-repeated="2" office:value-type="string">
            <text:p>Intel Corporation OSI</text:p>
          </table:table-cell>
          <table:table-cell/>
          <table:table-cell office:value-type="string">
            <text:p>Intel Corporation, 1900 Prairie City Road, Folsom, Ca. <text:s/>95630, USA</text:p>
          </table:table-cell>
          <table:table-cell office:value-type="string">
            <text:p>1) 4 Numeric digits, 2) None</text:p>
          </table:table-cell>
          <table:table-cell office:value-type="string">
            <text:p>None except all fields are left justified</text:p>
          </table:table-cell>
          <table:table-cell table:number-columns-repeated="4"/>
          <table:table-cell office:value-type="string">
            <text:p>Intel Corporation, operating in several countries around the world.</text:p>
          </table:table-cell>
          <table:table-cell office:value-type="string">
            <text:p>The ICD code will be used to form the Initial Domain Identifier (IDI) portion of the Initial\nDomain Part (IDP) as described in ISO 8348 Addendum 2 for OSI NSAP addressing.</text:p>
          </table:table-cell>
          <table:table-cell/>
          <table:table-cell office:value-type="string">
            <text:p>ANSI - USA</text:p>
          </table:table-cell>
          <table:table-cell table:style-name="ce4" office:value-type="string">
            <text:p>Jan 1994</text:p>
          </table:table-cell>
          <table:table-cell table:number-columns-repeated="4"/>
          <table:table-cell table:style-name="ce3" table:number-columns-repeated="16363"/>
        </table:table-row>
        <table:table-row table:style-name="ro1" table:visibility="filter">
          <table:table-cell office:value-type="float" office:value="69">
            <text:p>69</text:p>
          </table:table-cell>
          <table:table-cell table:style-name="ce4" office:value-type="string">
            <text:p>true</text:p>
          </table:table-cell>
          <table:table-cell table:number-columns-repeated="2" office:value-type="string">
            <text:p>SITA Object Identifier Tree</text:p>
          </table:table-cell>
          <table:table-cell/>
          <table:table-cell office:value-type="string">
            <text:p>SITA, 112 Avenue Charles de Gaulle, 92522 NEUILLY-SUR-SEINE CEDEX, France</text:p>
          </table:table-cell>
          <table:table-cell office:value-type="string">
            <text:p>1) ISO(1), identified organization(3), sita(00xx), 2) None</text:p>
          </table:table-cell>
          <table:table-cell office:value-type="string">
            <text:p>None</text:p>
          </table:table-cell>
          <table:table-cell table:number-columns-repeated="4"/>
          <table:table-cell office:value-type="string">
            <text:p>Airlines Aircraft Manufacturers etc (i.e. <text:s/>users of SITA Worldwide\nTelecommunications and Information Services)</text:p>
          </table:table-cell>
          <table:table-cell office:value-type="string">
            <text:p>SITA intends to use its OID Tree to define its own Objects for use with its OSI-based\nservices (e.g. MHS &amp; OSI Management)</text:p>
          </table:table-cell>
          <table:table-cell/>
          <table:table-cell office:value-type="string">
            <text:p>SITA (as an international organization) has a class B Liason with ISO/IEC JTC1</text:p>
          </table:table-cell>
          <table:table-cell table:style-name="ce4" office:value-type="string">
            <text:p>Apr 1994</text:p>
          </table:table-cell>
          <table:table-cell table:number-columns-repeated="4"/>
          <table:table-cell table:style-name="ce3" table:number-columns-repeated="16363"/>
        </table:table-row>
        <table:table-row table:style-name="ro1" table:visibility="filter">
          <table:table-cell office:value-type="float" office:value="70">
            <text:p>70</text:p>
          </table:table-cell>
          <table:table-cell table:style-name="ce4" office:value-type="string">
            <text:p>true</text:p>
          </table:table-cell>
          <table:table-cell table:number-columns-repeated="2" office:value-type="string">
            <text:p>DaimlerChrysler Corporate Network</text:p>
          </table:table-cell>
          <table:table-cell/>
          <table:table-cell office:value-type="string">
            <text:p>DaimlerChrysler AG, TOS/L, 010 M406, Emil0Kessler Strasse 4, 70546 Stuttgart,\nGERMANY</text:p>
          </table:table-cell>
          <table:table-cell office:value-type="string">
            <text:p>1) cccc (ICD) DCCN (DaimlerChrysler Corporate Network), 2) No check digits as in\ngeneral the whole message has a checking mechanism</text:p>
          </table:table-cell>
          <table:table-cell office:value-type="string">
            <text:p>None</text:p>
          </table:table-cell>
          <table:table-cell table:number-columns-repeated="4"/>
          <table:table-cell office:value-type="string">
            <text:p>Any company or organization that participates in the DaimlerChrysler Corporate\nNetwork. <text:s/>This network encompassed companies and organizations throughout the\nworld.</text:p>
          </table:table-cell>
          <table:table-cell office:value-type="string">
            <text:p>The ICD code will form the initial part of the OSI Network addressing and naming free\nas depicted in Addendum 2 to ISO 8348 (Network Layer addressing). <text:s/>These\naddresses will uniquely identify systems within DBCN and to the outside world.</text:p>
          </table:table-cell>
          <table:table-cell/>
          <table:table-cell office:value-type="string">
            <text:p>Deutsches Institut fur Normung e.V. <text:s/>(DIN)</text:p>
          </table:table-cell>
          <table:table-cell office:value-type="string">
            <text:p>Apr 1994/ Amended Oct 2001</text:p>
          </table:table-cell>
          <table:table-cell table:number-columns-repeated="4"/>
          <table:table-cell table:style-name="ce3" table:number-columns-repeated="16363"/>
        </table:table-row>
        <table:table-row table:style-name="ro1" table:visibility="filter">
          <table:table-cell office:value-type="float" office:value="71">
            <text:p>71</text:p>
          </table:table-cell>
          <table:table-cell table:style-name="ce4" office:value-type="string">
            <text:p>true</text:p>
          </table:table-cell>
          <table:table-cell table:number-columns-repeated="2" office:value-type="string">
            <text:p>LEGO /OSI NETWORK</text:p>
          </table:table-cell>
          <table:table-cell/>
          <table:table-cell office:value-type="string">
            <text:p>LEGO Systems Inc, 555 Taylor Road, Enfield, Conneticut 06082, USA, Tel: (203)\n749 2291, Fax: (203) 763 6681</text:p>
          </table:table-cell>
          <table:table-cell office:value-type="string">
            <text:p>1) Three fields: First field = ICD, Second field = Organization Code, Third field =\nOrganization Name, 2) None</text:p>
          </table:table-cell>
          <table:table-cell office:value-type="string">
            <text:p>None, except that all fields are left justified</text:p>
          </table:table-cell>
          <table:table-cell table:number-columns-repeated="4"/>
          <table:table-cell office:value-type="string">
            <text:p>The organizations to be covered by the coding system include company locations\nand subsidaries in the United States, 15 European cities, the Far East (Japan &amp;\nKorea) and Brazil. <text:s/>We estimate having 5000+ nodes on the LEGOnet within 3 years.</text:p>
          </table:table-cell>
          <table:table-cell office:value-type="string">
            <text:p>The ICD code will also form the Initial Domain Part of the OSI network addressing\nand naming tree as specified in addendum 2 to ISO 8348.</text:p>
          </table:table-cell>
          <table:table-cell/>
          <table:table-cell office:value-type="string">
            <text:p>American National Standards Institute (ANSI) - USA</text:p>
          </table:table-cell>
          <table:table-cell table:style-name="ce4" office:value-type="string">
            <text:p>May 1994</text:p>
          </table:table-cell>
          <table:table-cell office:value-type="string">
            <text:p>It is also necessary for 1 or more of these sites to be able to connect to non-LEGO\ncompanies</text:p>
          </table:table-cell>
          <table:table-cell table:number-columns-repeated="3"/>
          <table:table-cell table:style-name="ce3" table:number-columns-repeated="16363"/>
        </table:table-row>
        <table:table-row table:style-name="ro1" table:visibility="filter">
          <table:table-cell office:value-type="float" office:value="72">
            <text:p>72</text:p>
          </table:table-cell>
          <table:table-cell table:style-name="ce4" office:value-type="string">
            <text:p>true</text:p>
          </table:table-cell>
          <table:table-cell table:number-columns-repeated="2" office:value-type="string">
            <text:p>NAVISTAR/OSI Network</text:p>
          </table:table-cell>
          <table:table-cell/>
          <table:table-cell office:value-type="string">
            <text:p>International Truck &amp; Engine Corp, 4201 Winfield Road, Warrenville, Illinois 60555,\nUSA, Attention: Kosit Manaspiti, Tel: 630 753 5517, Fax: 630 753 6710, e-mail:\nkosit.manaspiti@nav-international.com</text:p>
          </table:table-cell>
          <table:table-cell office:value-type="string">
            <text:p>1) Three fields: First field = ICD, Second field = NAVISTAR, Third field = International\nTruck and Engine Corporation, 2) None</text:p>
          </table:table-cell>
          <table:table-cell office:value-type="string">
            <text:p>None, except that all fields are left justified</text:p>
          </table:table-cell>
          <table:table-cell table:number-columns-repeated="4"/>
          <table:table-cell office:value-type="string">
            <text:p>Any organization that participates in the NAVISTAR/OSI networking system\nincluding: - Navistar International Corporation, -International Truck and Engine\nCorporation</text:p>
          </table:table-cell>
          <table:table-cell office:value-type="string">
            <text:p>The ICD code will also form the Initial Domain Part of the OSI Network addressing\nand naming tree as specified in Addendum 2 to ISO 8348.</text:p>
          </table:table-cell>
          <table:table-cell/>
          <table:table-cell office:value-type="string">
            <text:p>American National Standards Institute (ANSI) - USA</text:p>
          </table:table-cell>
          <table:table-cell office:value-type="string">
            <text:p>May 1994/ Amended Nov 200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73">
            <text:p>73</text:p>
          </table:table-cell>
          <table:table-cell table:style-name="ce4" office:value-type="string">
            <text:p>true</text:p>
          </table:table-cell>
          <table:table-cell table:number-columns-repeated="2" office:value-type="string">
            <text:p>ICD Formatted ATM address</text:p>
          </table:table-cell>
          <table:table-cell/>
          <table:table-cell office:value-type="string">
            <text:p>Newbridge Networks Corporation, 600 March Road, P O Box 13600, Kanata, Ontario,\nCANADA, K2K 2E6</text:p>
          </table:table-cell>
          <table:table-cell office:value-type="string">
            <text:p>1) Format: /XXXX/xxxxxxx/Organization Name//, Example: /XXXX/000000/Newbridge\nNetwork Corporation//, The xxxxxx field is a 6-digit BCD encoded number. <text:s/>2) There\nare no check digits</text:p>
          </table:table-cell>
          <table:table-cell office:value-type="string">
            <text:p>None</text:p>
          </table:table-cell>
          <table:table-cell table:number-columns-repeated="4"/>
          <table:table-cell office:value-type="string">
            <text:p>Private ATM Networks using Newbridge ATM terminal and switching equipment.</text:p>
          </table:table-cell>
          <table:table-cell office:value-type="string">
            <text:p>Used as an ATM address prefix by, 1) Newbridge ATM terminal equipment: a) when\nperforming user - network address registration, b) transparently initiating signalled\nATM connections on behalf of other non-ATM (LAN) devices, c) directly initiating\nsignalled ATM connections, 2) Newbridge ATM switching equipment used to: a)\nperform network - user address registration, b) perform routing of Switched Virtual\nConnections across a private ATM cell switching network</text:p>
          </table:table-cell>
          <table:table-cell/>
          <table:table-cell office:value-type="string">
            <text:p>COSIRA, c/o CGI Information Systems and Management Consultants Inc. <text:s/>275\nSlater Street, 19th Floor, Ottawa, Ontario, CANADA, K1P 5H9</text:p>
          </table:table-cell>
          <table:table-cell table:style-name="ce4" office:value-type="string">
            <text:p>Jun 1994</text:p>
          </table:table-cell>
          <table:table-cell table:number-columns-repeated="4"/>
          <table:table-cell table:style-name="ce3" table:number-columns-repeated="16363"/>
        </table:table-row>
        <table:table-row table:style-name="ro1" table:visibility="filter">
          <table:table-cell office:value-type="float" office:value="74">
            <text:p>74</text:p>
          </table:table-cell>
          <table:table-cell table:style-name="ce4" office:value-type="string">
            <text:p>true</text:p>
          </table:table-cell>
          <table:table-cell table:number-columns-repeated="2" office:value-type="string">
            <text:p>ARINC</text:p>
          </table:table-cell>
          <table:table-cell/>
          <table:table-cell office:value-type="string">
            <text:p>ARINC Incorporated, 2551 Riva Road, Annapolis, MD 21401-7465, USA, Tel: + 410\n266 4000, Fax: + 410 266 4040</text:p>
          </table:table-cell>
          <table:table-cell office:value-type="string">
            <text:p>1) ISO (1), identified organization (3), arinc (00xx), 2) None</text:p>
          </table:table-cell>
          <table:table-cell office:value-type="string">
            <text:p>None</text:p>
          </table:table-cell>
          <table:table-cell table:number-columns-repeated="4"/>
          <table:table-cell office:value-type="string">
            <text:p>Owners and Customers of ARINC'S Data Network services, Information Systems and\nother services. <text:s/>Members of the Aeronautical industry.</text:p>
          </table:table-cell>
          <table:table-cell office:value-type="string">
            <text:p>ARINC will define its own Objects for use with its OSI-based systems and services.\nARINC will also define Objects for use within the Aeronautical industry.</text:p>
          </table:table-cell>
          <table:table-cell/>
          <table:table-cell office:value-type="string">
            <text:p>American National Standards Institute (ANSI)</text:p>
          </table:table-cell>
          <table:table-cell table:style-name="ce4" office:value-type="string">
            <text:p>Jul 1994</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75">
            <text:p>75</text:p>
          </table:table-cell>
          <table:table-cell table:style-name="ce4" office:value-type="string">
            <text:p>true</text:p>
          </table:table-cell>
          <table:table-cell table:number-columns-repeated="2" office:value-type="string">
            <text:p>Alcanet/Alcatel-Alsthom Corporate Network</text:p>
          </table:table-cell>
          <table:table-cell/>
          <table:table-cell office:value-type="string">
            <text:p>Alcatel Network Services Deutschland GmbH, Motostr. <text:s/>25, D - 70499 Stuttgart,\nGERMANY, Technical Contact: Thomas Galuschka, Tel: + 49 711 821 2367, Fax: +\n49 711 821 4793</text:p>
          </table:table-cell>
          <table:table-cell office:value-type="string">
            <text:p>1) cccc (ICD) Alcanet, 2) No check digits as in general the whole message has a\nchecking mechanism</text:p>
          </table:table-cell>
          <table:table-cell office:value-type="string">
            <text:p>None</text:p>
          </table:table-cell>
          <table:table-cell table:number-columns-repeated="4"/>
          <table:table-cell office:value-type="string">
            <text:p>Any company or organization that is part of the Alcatel-Alsthom group. <text:s/>The network\nof this group (Alcanet) encompasses companies and organizations throughout the</text:p>
          </table:table-cell>
          <table:table-cell office:value-type="string">
            <text:p>The ICD code forms the initial part of the OSI network addressing scheme as\ndepicted in Addendum 2 of ISO 8384</text:p>
          </table:table-cell>
          <table:table-cell/>
          <table:table-cell office:value-type="string">
            <text:p>Deutsches Institut fur Normung e.V. <text:s/>(DIN)</text:p>
          </table:table-cell>
          <table:table-cell table:style-name="ce4" office:value-type="string">
            <text:p>Aug 1994</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76">
            <text:p>76</text:p>
          </table:table-cell>
          <table:table-cell table:style-name="ce4" office:value-type="string">
            <text:p>true</text:p>
          </table:table-cell>
          <table:table-cell table:number-columns-repeated="2" office:value-type="string">
            <text:p>Sistema Italiano di Identificazione di ogetti gestito da UNINFO</text:p>
          </table:table-cell>
          <table:table-cell/>
          <table:table-cell office:value-type="string">
            <text:p>UNINFO, Ente di Normazione Federato all'UNI, C.so Galileo Ferraris 93, 10128\nTorino, ITALY, Tel: + 3911 501 027, Fax: + 3911 501 837</text:p>
          </table:table-cell>
          <table:table-cell office:value-type="string">
            <text:p>1) Six digits. <text:s/>Organization name: variable length up to 250 characters, 2) No check\ndigits</text:p>
          </table:table-cell>
          <table:table-cell office:value-type="string">
            <text:p>Space used as separator within the coding scheme of the organization name and\nbetween the organization code and the organization name.</text:p>
          </table:table-cell>
          <table:table-cell table:number-columns-repeated="4"/>
          <table:table-cell office:value-type="string">
            <text:p>Any Italian company or organization intending for the registration of Object Identifiers\naccording to ISO 8824</text:p>
          </table:table-cell>
          <table:table-cell office:value-type="string">
            <text:p>To be used for assignments of object identifiers according to ISO 8824 and ISO 8825</text:p>
          </table:table-cell>
          <table:table-cell/>
          <table:table-cell office:value-type="string">
            <text:p>UNI</text:p>
          </table:table-cell>
          <table:table-cell table:style-name="ce4" office:value-type="string">
            <text:p>Oct 1994</text:p>
          </table:table-cell>
          <table:table-cell table:number-columns-repeated="4"/>
          <table:table-cell table:style-name="ce3" table:number-columns-repeated="16363"/>
        </table:table-row>
        <table:table-row table:style-name="ro1" table:visibility="filter">
          <table:table-cell office:value-type="float" office:value="77">
            <text:p>77</text:p>
          </table:table-cell>
          <table:table-cell table:style-name="ce4" office:value-type="string">
            <text:p>true</text:p>
          </table:table-cell>
          <table:table-cell table:number-columns-repeated="2" office:value-type="string">
            <text:p>Sistema Italiano di Indirizzamento di Reti OSI Gestito da UNINFO</text:p>
          </table:table-cell>
          <table:table-cell/>
          <table:table-cell office:value-type="string">
            <text:p>UNINFO, Ente di Normazione Federato all'UNI, C.so Galileo Ferraris, 93, 10128\nTorino, ITALY</text:p>
          </table:table-cell>
          <table:table-cell office:value-type="string">
            <text:p>1) To be defined, 2)</text:p>
          </table:table-cell>
          <table:table-cell office:value-type="string">
            <text:p>To be defined</text:p>
          </table:table-cell>
          <table:table-cell table:number-columns-repeated="4"/>
          <table:table-cell office:value-type="string">
            <text:p>Any company or organization operating in an Italian OSI networking environment.</text:p>
          </table:table-cell>
          <table:table-cell office:value-type="string">
            <text:p>The ICD code forms the initial part of the OSI network Addressing and naming tree\ndepicted in Addendum 2 of ISO 8348.</text:p>
          </table:table-cell>
          <table:table-cell/>
          <table:table-cell office:value-type="string">
            <text:p>UNI</text:p>
          </table:table-cell>
          <table:table-cell table:style-name="ce4" office:value-type="string">
            <text:p>Oct 1994</text:p>
          </table:table-cell>
          <table:table-cell table:number-columns-repeated="4"/>
          <table:table-cell table:style-name="ce3" table:number-columns-repeated="16363"/>
        </table:table-row>
        <table:table-row table:style-name="ro1" table:visibility="filter">
          <table:table-cell office:value-type="float" office:value="78">
            <text:p>78</text:p>
          </table:table-cell>
          <table:table-cell table:style-name="ce4" office:value-type="string">
            <text:p>true</text:p>
          </table:table-cell>
          <table:table-cell table:number-columns-repeated="2" office:value-type="string">
            <text:p>Mitel terminal or switching equipment</text:p>
          </table:table-cell>
          <table:table-cell/>
          <table:table-cell office:value-type="string">
            <text:p>Mitel Corporation, 350 Legget Drive, P O Box 13089, Kanata ON K2K 1X3, Canada,\nAttn: Mr Francois Audet</text:p>
          </table:table-cell>
          <table:table-cell office:value-type="string">
            <text:p>1) XXX/MITEL/Mitel Corporation//, 2) None</text:p>
          </table:table-cell>
          <table:table-cell office:value-type="string">
            <text:p>None</text:p>
          </table:table-cell>
          <table:table-cell table:number-columns-repeated="4"/>
          <table:table-cell office:value-type="string">
            <text:p>Networks using Mitel terminal or switching equipment</text:p>
          </table:table-cell>
          <table:table-cell office:value-type="string">
            <text:p>The ICD code will form the initial part of the naming tree for: 1 - Private Integrated\nServices Network manufacturer-specific information as the Organization identifier\nforming the initial part of the OBJECT IDENTIFIER tree. <text:s/>2 - OSI Application Layer\nsuch as CSTA (ECMA 179).</text:p>
          </table:table-cell>
          <table:table-cell/>
          <table:table-cell office:value-type="string">
            <text:p>COSIRA, 275 Slater St, 19th Floor, Ottawa ON K1P 5H9, Canada</text:p>
          </table:table-cell>
          <table:table-cell table:style-name="ce4" office:value-type="string">
            <text:p>Nov 1994</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79">
            <text:p>79</text:p>
          </table:table-cell>
          <table:table-cell table:style-name="ce4" office:value-type="string">
            <text:p>true</text:p>
          </table:table-cell>
          <table:table-cell table:number-columns-repeated="2" office:value-type="string">
            <text:p>ATM Forum</text:p>
          </table:table-cell>
          <table:table-cell/>
          <table:table-cell office:value-type="string">
            <text:p>The ATM Forum, 303 Vintage Park Drive, Foster City, CA 94404-1138, USA, Tel:\n+(415)-578-6860, Fax: +(415)-525-0182</text:p>
          </table:table-cell>
          <table:table-cell office:value-type="string">
            <text:p>1) Format includes 2 fields, First field = ICD, Second field = Domains Specific Part,\n2) None</text:p>
          </table:table-cell>
          <table:table-cell office:value-type="string">
            <text:p>None, except that all fields are left justified</text:p>
          </table:table-cell>
          <table:table-cell table:number-columns-repeated="4"/>
          <table:table-cell office:value-type="string">
            <text:p>Any organization or company that participates in the ATM Forum UNI private\naddressing format. <text:s/>The ATM Forum encompasses organizations and companies\nthroughout the world.</text:p>
          </table:table-cell>
          <table:table-cell office:value-type="string">
            <text:p>The ICD code will also form part of the Initial Domain Part of the OSI network\naddressing as specified in Addendum 2 to ISO 8348</text:p>
          </table:table-cell>
          <table:table-cell/>
          <table:table-cell office:value-type="string">
            <text:p>ANSI, 11 West 42nd Street, New York 10036, USA</text:p>
          </table:table-cell>
          <table:table-cell table:style-name="ce4" office:value-type="string">
            <text:p>Dec 1994</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80">
            <text:p>80</text:p>
          </table:table-cell>
          <table:table-cell table:style-name="ce4" office:value-type="string">
            <text:p>true</text:p>
          </table:table-cell>
          <table:table-cell table:number-columns-repeated="2" office:value-type="string">
            <text:p>UK National Health Service Scheme, (EDIRA compliant)</text:p>
          </table:table-cell>
          <table:table-cell/>
          <table:table-cell office:value-type="string">
            <text:p>National Health Service, Information Management Center, 15 Frederick Road,\nBirmingham, B15 1SD, Contact person: Mr Brian LOVE, Tel: +44 1454 261 551,\nFax: +44 1454 261 581</text:p>
          </table:table-cell>
          <table:table-cell office:value-type="string">
            <text:p>1) Structure of EDI identifier, Character repertoire, The EDI identifier consists of digits\nonly. <text:s/>The identifier is fixed length and therefore no separators are required. <text:s/>Length\nof registered organization id, The registered organization identifier has a fixed length\nof 10 digits including check digit, Subdivisions of registered organization id, There are\nno formal sub-divisions of the registered organization identifier. <text:s/>It is intended to\nallocate initially from the band &lt;10xxxxxxxc&gt; in case it becomes necessary to\nassign registration sub-authorities. <text:s/>Sub-authorities would then be allocated bands\n&lt;11xxxxxxxc&gt;, &lt;12xxxxxxxc&gt; etc. <text:s/>allowing a possible total of 89 sub authorities.\nRegistered organization identifiers starting &lt;0xxxxxxxxc&gt; are reserved for special\npurposes. <text:s/>2) Check sum computation, The check sum used will be modulo 7.</text:p>
          </table:table-cell>
          <table:table-cell office:value-type="string">
            <text:p>None</text:p>
          </table:table-cell>
          <table:table-cell table:number-columns-repeated="4"/>
          <table:table-cell office:value-type="string">
            <text:p>Organization highest level, Intended scope is 'legal entities' of the UK Healthcare\ncommunity i.e. <text:s/>GPs, GDPs, NHS Hospital Trusts, Health Authorities, Health\nCommissioning Agencies, Health Laboratories, NHS Executive and other NHS\nbodies such as Blood Transfusion etc. <text:s/>Organizations having a legitimate interest in\nthe Healthcare Community e.g. <text:s/>health insurance companies etc. will be strongly,\nencouraged to use alternative registration schemes but may be considered for the\nNHS scheme on a case by case basis.</text:p>
          </table:table-cell>
          <table:table-cell office:value-type="string">
            <text:p>EDIRA recommendations for coding in EDIFACT and other EDI systems</text:p>
          </table:table-cell>
          <table:table-cell/>
          <table:table-cell office:value-type="string">
            <text:p>Association Francaise de Normalisation (AFNOR), Tour Europe, Cedex 7, 92049\nParis La Defense, FRANCE</text:p>
          </table:table-cell>
          <table:table-cell table:style-name="ce4" office:value-type="string">
            <text:p>Jan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81">
            <text:p>81</text:p>
          </table:table-cell>
          <table:table-cell table:style-name="ce4" office:value-type="string">
            <text:p>true</text:p>
          </table:table-cell>
          <table:table-cell table:number-columns-repeated="2" office:value-type="string">
            <text:p>International NSAP</text:p>
          </table:table-cell>
          <table:table-cell/>
          <table:table-cell office:value-type="string">
            <text:p>Federal Office for Communications, Zukunfstrasse 44, POSTFACH, CH-2501 Biel,\nSwitzerland Tel: +41 32 285 111, Fax: +41 32 285 528</text:p>
          </table:table-cell>
          <table:table-cell office:value-type="string">
            <text:p>1) NSAP address (detailed document on structure can be supplied on request, 2) No\ncheck digit</text:p>
          </table:table-cell>
          <table:table-cell office:value-type="string">
            <text:p>None</text:p>
          </table:table-cell>
          <table:table-cell table:number-columns-repeated="4"/>
          <table:table-cell office:value-type="string">
            <text:p>Any organization requiring an international (country-independant) NSAP numbering\nspace</text:p>
          </table:table-cell>
          <table:table-cell office:value-type="string">
            <text:p>None</text:p>
          </table:table-cell>
          <table:table-cell/>
          <table:table-cell office:value-type="string">
            <text:p>OFCOM/Swiss Federal Office for Communications</text:p>
          </table:table-cell>
          <table:table-cell table:style-name="ce4" office:value-type="string">
            <text:p>Feb 1995</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82">
            <text:p>82</text:p>
          </table:table-cell>
          <table:table-cell table:style-name="ce4" office:value-type="string">
            <text:p>false</text:p>
          </table:table-cell>
          <table:table-cell office:value-type="string">
            <text:p>Norwegian Telecommunications Authority's, NTA'S, EDI, identifier scheme (EDIRA compliant)</text:p>
          </table:table-cell>
          <table:table-cell office:value-type="string">
            <text:p>Norwegian Telecommunications Authority's, NTA'S, EDI, identifier scheme (EDIRA\ncompliant)</text:p>
          </table:table-cell>
          <table:table-cell/>
          <table:table-cell office:value-type="string">
            <text:p>Norwegian Telecommunications Authority, P O Box 447 Sentrum, N-0104 Oslo,\nNORWAY, Contact person: Mr Knut Smaaland Tel: + 47 22 82 48 04, Fax: + 47 22\n82 48 40</text:p>
          </table:table-cell>
          <table:table-cell office:value-type="string">
            <text:p>1) Character repertoire; the registered identifier consists of digits only, the length is\nvariable, no separators are needed, Length of registered organization identifier; the\nidentifier has a minimum length of 4 digits and a maximum length of 12 digits\nincluding the check digit where applicable. <text:s/>Subdivision of registered organization\nidentifier; the first digit designates the version number of the coding system, the next\ntwo digits designates the registration authority or one of its sub-authorities, then\nfollows the organization designator. <text:s/>The registered part is preceded by the ICD value\nwhen encoded in EDIFACT messages. <text:s/>2) Check digit computation; when applicable\nthe check digit will be computed modulo 11. <text:s/>The check digit will be the last digit in\nthe registered identifier.</text:p>
          </table:table-cell>
          <table:table-cell office:value-type="string">
            <text:p>None</text:p>
          </table:table-cell>
          <table:table-cell table:number-columns-repeated="4"/>
          <table:table-cell office:value-type="string">
            <text:p>Any organization or part thereof in need of unique EDI identifier.</text:p>
          </table:table-cell>
          <table:table-cell office:value-type="string">
            <text:p>For use in EDIFACT messages in accordance with current national recommendation\non identification of EDI objects. <text:s/>(EDIRA compliant)</text:p>
          </table:table-cell>
          <table:table-cell/>
          <table:table-cell office:value-type="string">
            <text:p>Norwegian Standards Association</text:p>
          </table:table-cell>
          <table:table-cell table:style-name="ce4" office:value-type="string">
            <text:p>Feb 1995</text:p>
          </table:table-cell>
          <table:table-cell office:value-type="string">
            <text:p>Previously used code 56 within the UN/ECE 0007 code list.</text:p>
          </table:table-cell>
          <table:table-cell table:number-columns-repeated="3"/>
          <table:table-cell table:style-name="ce3" table:number-columns-repeated="16363"/>
        </table:table-row>
        <table:table-row table:style-name="ro1" table:visibility="filter">
          <table:table-cell office:value-type="float" office:value="83">
            <text:p>83</text:p>
          </table:table-cell>
          <table:table-cell table:style-name="ce4" office:value-type="string">
            <text:p>true</text:p>
          </table:table-cell>
          <table:table-cell table:number-columns-repeated="2" office:value-type="string">
            <text:p>Advanced Telecommunications Modules Limited, Corporate Network</text:p>
          </table:table-cell>
          <table:table-cell/>
          <table:table-cell office:value-type="string">
            <text:p>ATM Ltd, Mount Pleasant House, Cambridge, CB3 0BL, ENGLAND</text:p>
          </table:table-cell>
          <table:table-cell office:value-type="string">
            <text:p>1) Format includes 2 fields : First field = ICD, Second field = Domain specific part, 2)\nNone</text:p>
          </table:table-cell>
          <table:table-cell office:value-type="string">
            <text:p>None - all fields are left justified</text:p>
          </table:table-cell>
          <table:table-cell table:number-columns-repeated="4"/>
          <table:table-cell office:value-type="string">
            <text:p>ATM terminal or switching equipments using the UNI private, addressing format</text:p>
          </table:table-cell>
          <table:table-cell office:value-type="string">
            <text:p>The ICD code will also form part of the Initial Domain Part of the OSI network\naddressing as specified in Addendum 2 to ISO 8348</text:p>
          </table:table-cell>
          <table:table-cell/>
          <table:table-cell office:value-type="string">
            <text:p>BSI</text:p>
          </table:table-cell>
          <table:table-cell table:style-name="ce4" office:value-type="string">
            <text:p>Mar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84">
            <text:p>84</text:p>
          </table:table-cell>
          <table:table-cell table:style-name="ce4" office:value-type="string">
            <text:p>true</text:p>
          </table:table-cell>
          <table:table-cell table:number-columns-repeated="2" office:value-type="string">
            <text:p>Athens Chamber of Commerce &amp; Industry Scheme (EDIRA compliant)</text:p>
          </table:table-cell>
          <table:table-cell/>
          <table:table-cell office:value-type="string">
            <text:p>Athens Chamber of Commerce &amp; Industry, Akadimias Street 7, GR 108 71 Athens,\nContact person: Mrs M Hliapa, Tel: +301 362-7911, Fax: +301-362-4643</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 registered\norganization (mandatory part of the identifier ;6 digits), C: numerical value used by\nthe registered organization (free part; 6 digits), D: numerical check digit calculated by\nthe registered organization; (2 digits), Check digit computation, The check digit is\nmodular 97 computed on ABC as one number.</text:p>
          </table:table-cell>
          <table:table-cell office:value-type="string">
            <text:p>None</text:p>
          </table:table-cell>
          <table:table-cell table:number-columns-repeated="4"/>
          <table:table-cell office:value-type="string">
            <text:p>Organization highest level, The Athens Chamber of Commerce &amp; Industry will register\nat the highest level: Organizations (legal persons, partnerships, sole proprietor-ships\nand their branch offices) registered in the business register or organizations (legal or\nnatural persons) not registered in the business register.</text:p>
          </table:table-cell>
          <table:table-cell office:value-type="string">
            <text:p>EDIRA recommendations for coding in EDIFACT and other EDI syntaxes.</text:p>
          </table:table-cell>
          <table:table-cell/>
          <table:table-cell office:value-type="string">
            <text:p>Association Francaise de Normalisation: AFNOR</text:p>
          </table:table-cell>
          <table:table-cell table:style-name="ce4" office:value-type="string">
            <text:p>Mar 1995</text:p>
          </table:table-cell>
          <table:table-cell table:number-columns-repeated="4"/>
          <table:table-cell table:style-name="ce3" table:number-columns-repeated="16363"/>
        </table:table-row>
        <table:table-row table:style-name="ro1" table:visibility="filter">
          <table:table-cell office:value-type="float" office:value="85">
            <text:p>85</text:p>
          </table:table-cell>
          <table:table-cell table:style-name="ce4" office:value-type="string">
            <text:p>true</text:p>
          </table:table-cell>
          <table:table-cell table:number-columns-repeated="2" office:value-type="string">
            <text:p>Swiss Chambers of Commerce Scheme (EDIRA) compliant</text:p>
          </table:table-cell>
          <table:table-cell office:value-type="string">
            <text:p>Numerical identifiers of organizations</text:p>
          </table:table-cell>
          <table:table-cell office:value-type="string">
            <text:p>Zurich Chamber of Commerce on behalf of Swiss Chambers, of Commerce, CH-8022\nZurich, Otto Mueller, Phone: + 411 217 4050 Fax: + 411 217 4051, e-mail:\nomueller@zurichcci.ch</text:p>
          </table:table-cell>
          <table:table-cell office:value-type="string">
            <text:p>999-999999-999999-9-99; useage of 100999999-999999-9-99 is prohibited, 1)18\nnumerical characters, organization ID (mandatory): 9 characters (first 3 char. may,\nindicate a registration office), organization part, OPI (optional): 6 char. <text:s/>OPI source\nindicator, OPIS (optional): 1 char. <text:s/>2) Check digits (optional): last 2 char. <text:s/>Calculated\nmod 97 on used characters</text:p>
          </table:table-cell>
          <table:table-cell office:value-type="string">
            <text:p>0085999999999999999999; the allocated ICD value is used as a 4 digit prefix</text:p>
          </table:table-cell>
          <table:table-cell office:value-type="string">
            <text:p>0-9 numerical characters</text:p>
          </table:table-cell>
          <table:table-cell office:value-type="string">
            <text:p>English, German, French, Italian</text:p>
          </table:table-cell>
          <table:table-cell office:value-type="string">
            <text:p>Yes</text:p>
          </table:table-cell>
          <table:table-cell office:value-type="string">
            <text:p>25 years</text:p>
          </table:table-cell>
          <table:table-cell office:value-type="string">
            <text:p>Organizations (legal persons, partnerships, sole propietor-ships and their branch\noffices) registered in the business register and legal or natural persons not registered\nin the business register.</text:p>
          </table:table-cell>
          <table:table-cell office:value-type="string">
            <text:p>EDIRA recommendations for coding in syntaxes used for e-commerce and e-\ngovernment, e.g. <text:s/>EDIFACT, ebXML</text:p>
          </table:table-cell>
          <table:table-cell office:value-type="string">
            <text:p>CH-CCI EDIRA code</text:p>
          </table:table-cell>
          <table:table-cell office:value-type="string">
            <text:p>EDIRA Association, c/o Zurich chamber of commerce, Bleicherweg 5, P. <text:s/>O. Box\n4031, 8022 Zurich - Tel: +411 217 4050 - Fax: +411 217 4051, Otto Mueller\nOttoMueller-omueller@zurichcci.ch, Andre Mesropian amesropi@club-internet-fr</text:p>
          </table:table-cell>
          <table:table-cell office:value-type="string">
            <text:p>Mar 1995/ Amended Jan 2001/ Amended Jun 2002</text:p>
          </table:table-cell>
          <table:table-cell office:value-type="string">
            <text:p>ICD code 0085 originally issued to Zurich Chamber of Commerce on behalf of the\nSwiss Chamber of Commerce however it was never used. <text:s/>The rights and obligations\nfor the scheme were transferred to Swisskey, Ltd.; the Swiss Chambers of\ncommerce are shareholders of Swisskey Ltd.; Swisskey had been using the scheme\nsince 1998. Swisskey has ceased its operation on 30th June 2001; all identifiers\nissued by Swisskey started with 100. <text:s/>They were used in X.509-certficates which are</text:p>
          </table:table-cell>
          <table:table-cell table:number-columns-repeated="3"/>
          <table:table-cell table:style-name="ce3" table:number-columns-repeated="16363"/>
        </table:table-row>
        <table:table-row table:style-name="ro1" table:visibility="filter">
          <table:table-cell office:value-type="float" office:value="86">
            <text:p>86</text:p>
          </table:table-cell>
          <table:table-cell table:style-name="ce4" office:value-type="string">
            <text:p>true</text:p>
          </table:table-cell>
          <table:table-cell table:number-columns-repeated="2" office:value-type="string">
            <text:p>United States Council for International Business (USCIB) Scheme, (EDIRA compliant)</text:p>
          </table:table-cell>
          <table:table-cell/>
          <table:table-cell office:value-type="string">
            <text:p>United States Council for Internationa Business (USCIB), 1212 Avenue of the\nAmericas, USA New York, NY 10036, Contact person: Mr Peter ROBINSON, Tel:\n+1212 354 4851, Fax: +1212 575 0327</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 registered\norganization (mandatory part of the identifier; 6 digits), C: numerical value used by\nthe registered organization (free part; 6 digits), D: numerical check digit calculated by\nthe registered organization; (2 digits), Check digit computation, The check digit is\nmodular 97 computed on ABC as one number.</text:p>
          </table:table-cell>
          <table:table-cell office:value-type="string">
            <text:p>None</text:p>
          </table:table-cell>
          <table:table-cell table:number-columns-repeated="4"/>
          <table:table-cell office:value-type="string">
            <text:p>Organization highest level, The United States Council for International Business will\nregister at their highest level: Organizations (legal persons, partnerships, sole\nproprietor-ships and their branch offices) registered in the business register or\norganizations (legal or natural persons) not registered in the business register.</text:p>
          </table:table-cell>
          <table:table-cell office:value-type="string">
            <text:p>EDIRA recommendations for coding in EDIFACT and other EDI syntaxes.</text:p>
          </table:table-cell>
          <table:table-cell/>
          <table:table-cell office:value-type="string">
            <text:p>Association Francaise de Normalisation: AFNOR</text:p>
          </table:table-cell>
          <table:table-cell table:style-name="ce4" office:value-type="string">
            <text:p>Mar 1995</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87">
            <text:p>87</text:p>
          </table:table-cell>
          <table:table-cell table:style-name="ce4" office:value-type="string">
            <text:p>false</text:p>
          </table:table-cell>
          <table:table-cell office:value-type="string">
            <text:p>National Federation of Chambers of Commerce &amp; Industry of Belgium, Scheme (EDIRA compliant)</text:p>
          </table:table-cell>
          <table:table-cell office:value-type="string">
            <text:p>National Federation of Chambers of Commerce &amp; Industry of Belgium, Scheme\n(EDIRA compliant)</text:p>
          </table:table-cell>
          <table:table-cell/>
          <table:table-cell office:value-type="string">
            <text:p>National Federartion of Chambers of Commerce &amp; Industry of, Belgium Avenue des\nArts 1-2. B 10, BE 1040 Brussels, Contact person: Mr Michael PEEREMAN, Tel:\n+322-217-3671, Fax: +322-217-4634</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 registered\norganization (mandatory part of the identifier; 6 digits), C: numerical value used by\nthe registered organization (free part; 6 digits), D: numerical check digit calculated by\nthe registered organization; (2 digits), Check digit computation, The check digit is\nmodular 97 computed on ABC as one number.</text:p>
          </table:table-cell>
          <table:table-cell office:value-type="string">
            <text:p>None</text:p>
          </table:table-cell>
          <table:table-cell table:number-columns-repeated="4"/>
          <table:table-cell office:value-type="string">
            <text:p>Organization highest level, The National Federation of Chambers of Commerce and\nIndustry will register at their highest level. <text:s/>Organizations (legal persons,\npartnerships, sole proprietor-ships and their branch offices) registered in the business\nregister or organizations (legal or natural persons) not registered in the business</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Mar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88">
            <text:p>88</text:p>
          </table:table-cell>
          <table:table-cell table:style-name="ce4" office:value-type="string">
            <text:p>true</text:p>
          </table:table-cell>
          <table:table-cell table:number-columns-repeated="2" office:value-type="string">
            <text:p>GLN, Global Location Number</text:p>
          </table:table-cell>
          <table:table-cell office:value-type="string">
            <text:p>The GS1 identification key used to identify physical locations or\nparties. The key comprises a GS1 Company Prefix, location\nreference, and check digit.</text:p>
          </table:table-cell>
          <table:table-cell office:value-type="string">
            <text:p>GS1\navenue Louise 326\nB-1050 Brussels\nBelgium\nTel: +32 495 52 9444\nFax : +32 2 788 7899\nContact: Henri Barthel\nEmail: henri.barthel@gs1.org</text:p>
          </table:table-cell>
          <table:table-cell/>
          <table:table-cell office:value-type="string">
            <text:p>None.</text:p>
          </table:table-cell>
          <table:table-cell table:number-columns-repeated="4"/>
          <table:table-cell office:value-type="string">
            <text:p>Global Location Numbers are available to any public or private\norganization in the world.</text:p>
          </table:table-cell>
          <table:table-cell office:value-type="string">
            <text:p>The Global Location Number, or GLN, is used to identify locations\nand legal entities. Locations can be a physical place such as a\nwarehouse, a storage cabinet or even a specific shelf within a\nstore; they can be a legal entity such as a company, or division of a\ncompany; or they can be a function that takes place within a legal\nentity, such as the accounting department of a company or the\npediatric ward of a hospital.</text:p>
          </table:table-cell>
          <table:table-cell office:value-type="string">
            <text:p>EAN location code</text:p>
          </table:table-cell>
          <table:table-cell office:value-type="string">
            <text:p>GS1\navenue Louise 326\nB-1050 Brussels\nBelgium\nTel: +32 495 52 9444\nFax : +32 2 788 7899\nContact: Henri Barthel\nEmail: henri.barthel@gs1.org</text:p>
          </table:table-cell>
          <table:table-cell office:value-type="string">
            <text:p>1995-04</text:p>
          </table:table-cell>
          <table:table-cell office:value-type="string">
            <text:p>Updated 2010-04.\nUpdated 2020-04-09: Change contact info, organizations covered,\nnotes on use.</text:p>
          </table:table-cell>
          <table:table-cell/>
          <table:table-cell office:value-type="string">
            <text:p>The GLN has a fixed length of 13 digits.\nThe last digit is a Check Digit calculated from all other digits to\nprovide extra security.</text:p>
          </table:table-cell>
          <table:table-cell office:value-type="string">
            <text:p>2020-04-09 04:58:53 UTC</text:p>
          </table:table-cell>
          <table:table-cell table:style-name="ce3" table:number-columns-repeated="16363"/>
        </table:table-row>
        <table:table-row table:style-name="ro1" table:visibility="filter">
          <table:table-cell office:value-type="float" office:value="89">
            <text:p>89</text:p>
          </table:table-cell>
          <table:table-cell table:style-name="ce4" office:value-type="string">
            <text:p>true</text:p>
          </table:table-cell>
          <table:table-cell table:number-columns-repeated="2" office:value-type="string">
            <text:p>The Association of British Chambers of Commerce Ltd. <text:s/>Scheme, (EDIRA compliant)</text:p>
          </table:table-cell>
          <table:table-cell/>
          <table:table-cell office:value-type="string">
            <text:p>The Association of British Chambers of Commerce Ltd. <text:s/>9, Tufton Street,\nWestminster, LONDON, SW1P 3QB, Contact person: Mrs Elizabeth Boyd-Adams,\nTel: +44 71 222 1555, Fax: +44 71 799 2202, E-mail X400 G=Elizabeth, S=Boyd-\nAdams, O= ABCC, A=BT, C=GB</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 registered\norganization (mandatory part of the identifier; 6 digits), C: numerical value used by\nthe registered organization (free part; 6 digits), D: numerical check digit calculated by\nthe registered organization; (2 digits), Check digit computation, The check digit is\nmodular 97 computed on ABC as one number.</text:p>
          </table:table-cell>
          <table:table-cell office:value-type="string">
            <text:p>None</text:p>
          </table:table-cell>
          <table:table-cell table:number-columns-repeated="4"/>
          <table:table-cell office:value-type="string">
            <text:p>Organization highest level, The Association of British Chambers or Commerce Ltd\nwill register at their highest level. <text:s/>Organizations (legal persons, partnerships, sole\nproprietor-ships and their branch offices) registered in the business register (states's\nSecretary of State or equivalent) or organizations (legal or natural persons) not\nregistered in the business register.</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Jun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0">
            <text:p>90</text:p>
          </table:table-cell>
          <table:table-cell table:style-name="ce4" office:value-type="string">
            <text:p>true</text:p>
          </table:table-cell>
          <table:table-cell table:number-columns-repeated="2" office:value-type="string">
            <text:p>Internet IP addressing - ISO 6523 ICD encoding</text:p>
          </table:table-cell>
          <table:table-cell/>
          <table:table-cell office:value-type="string">
            <text:p>Internet Assigned Numbers Authority, c/o Joyce K. <text:s/>Reynolds, USC - Information\nSciences Institute, 4676 Admiralty Way, Marina del Rey, California 90292-6695,\nUSA, E-mail: iana @ isi.edu, Phone: +1 310-822-1511</text:p>
          </table:table-cell>
          <table:table-cell office:value-type="string">
            <text:p>1) ICD, Organization Code, 1-14 characters, Organization name, up to 250\ncharacters, 2) None, as the whole message has a checking mechanism</text:p>
          </table:table-cell>
          <table:table-cell office:value-type="string">
            <text:p>As per ISO 6523: 1984 clause 4</text:p>
          </table:table-cell>
          <table:table-cell table:number-columns-repeated="4"/>
          <table:table-cell office:value-type="string">
            <text:p>Any organization in the Internet environment. <text:s/>This program encompasses\norganizations with upwards of 30 million users throughout the world.</text:p>
          </table:table-cell>
          <table:table-cell/>
          <table:table-cell office:value-type="string">
            <text:p>The ICD code will also form the Initial Domain Part of the OSI network addressing\nand naming tree as specified in ISO 8348, Annex A.</text:p>
          </table:table-cell>
          <table:table-cell office:value-type="string">
            <text:p>ISO/IEC JTC 1/SC 6</text:p>
          </table:table-cell>
          <table:table-cell table:style-name="ce4" office:value-type="string">
            <text:p>Jul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1">
            <text:p>91</text:p>
          </table:table-cell>
          <table:table-cell table:style-name="ce4" office:value-type="string">
            <text:p>true</text:p>
          </table:table-cell>
          <table:table-cell table:number-columns-repeated="2" office:value-type="string">
            <text:p>Cisco Sysytems / OSI Network</text:p>
          </table:table-cell>
          <table:table-cell/>
          <table:table-cell office:value-type="string">
            <text:p>Cisco Systems, 170 W. Tasman Drive, San Jose, CA 95134, USA, Phone + 1 408\n526 4000, Fax + 1 408 426 4100</text:p>
          </table:table-cell>
          <table:table-cell office:value-type="string">
            <text:p>1) Three fields, First field = ICD, Second field = Organization Code, 1-14 characters,\nThird field = Organization Name, up to 150 characters, 2)</text:p>
          </table:table-cell>
          <table:table-cell office:value-type="string">
            <text:p>None, except that all fields are left justified</text:p>
          </table:table-cell>
          <table:table-cell table:number-columns-repeated="4"/>
          <table:table-cell office:value-type="string">
            <text:p>Any organization that participates in a Cisco Systems / OSI networking environment.\nThis program encompasses organizations throughout the world.</text:p>
          </table:table-cell>
          <table:table-cell/>
          <table:table-cell office:value-type="string">
            <text:p>The ICD will also form the Initial Domain Part of the OSI networking addressing and\nnaming tree as specified in Addendum 2 to ISO 8348.</text:p>
          </table:table-cell>
          <table:table-cell office:value-type="string">
            <text:p>American National Standards Institute (ANSI) - USA</text:p>
          </table:table-cell>
          <table:table-cell table:style-name="ce4" office:value-type="string">
            <text:p>Nov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2">
            <text:p>92</text:p>
          </table:table-cell>
          <table:table-cell table:style-name="ce4" office:value-type="string">
            <text:p>true</text:p>
          </table:table-cell>
          <table:table-cell table:number-columns-repeated="2" office:value-type="string">
            <text:p>Not to be assigned (see additional comments)</text:p>
          </table:table-cell>
          <table:table-cell table:number-columns-repeated="2"/>
          <table:table-cell office:value-type="string">
            <text:p>1), 2)</text:p>
          </table:table-cell>
          <table:table-cell table:number-columns-repeated="10"/>
          <table:table-cell office:value-type="string">
            <text:p>This was originally allocated to the Danish Chamber of Commerce but due to a\nconflict with the UN/ECE codes they have been reallocated ICD 0096.</text:p>
          </table:table-cell>
          <table:table-cell table:number-columns-repeated="3"/>
          <table:table-cell table:style-name="ce3" table:number-columns-repeated="16363"/>
        </table:table-row>
        <table:table-row table:style-name="ro1" table:visibility="filter">
          <table:table-cell office:value-type="float" office:value="93">
            <text:p>93</text:p>
          </table:table-cell>
          <table:table-cell table:style-name="ce4" office:value-type="string">
            <text:p>true</text:p>
          </table:table-cell>
          <table:table-cell table:number-columns-repeated="2" office:value-type="string">
            <text:p>Revenue Canada Business Number Registration (EDIRA compliant)</text:p>
          </table:table-cell>
          <table:table-cell/>
          <table:table-cell office:value-type="string">
            <text:p>Revenue Canada, 123 Slater Street, Ottawa, ON K1A OL8, Signatory name,\nRoderick G. <text:s/>Quiney, Director-General, Contact address, 25 McArthur, Tower C, 7th\nFloor, Ottawa, Ontario CANADA K1A OL8, Tel + 1 613 941 5007, Fax + 1 613 941</text:p>
          </table:table-cell>
          <table:table-cell office:value-type="string">
            <text:p>Character repertoire, The BN contains a 15 character number (e.g. <text:s/>"12345 6789\nRC0001"), Characters are restricted to the numeric 0-9 and the alphabetic A-z. <text:s/>The\nBN is fixed length. <text:s/>Length of the registered organization id, The length is up to 15\ncharacters. Each field if used, has a fixed length. <text:s/>Subdivisions of registered\norganization id, The identifier is sub-divided into up to 3 fixed length fields. <text:s/>The\nRegistration Number consisting of nine numeric digits may be in inherited from its\nGoods and Services Tax (GST) number or may be allocated from unused BN number\nspace. The Program Identifier consists of two character alphabetic code. <text:s/>The four\nProgram Identifiers already allocated are "RC" (corporate income tax), "RM"\n(import/export duties), "RP" (payroll source deductions) and "RT" (goods and service\ntax). <text:s/>Two potential Program Identifiers already reserved are "VS" (vendor/supplier of\ngoods and services to government) and "VC", (consignee as government destination\n/accounting point). <text:s/>The Reference Number within a particular government program\nconsists of four numeric digits. The use of an (organization-free part( is possible at\nthe user's will, but is not specified as part of the registration scheme. <text:s/>Check\ncharacter, The BN is a 15 character broken into a 9 digit root followed by a 6\ncharacter account identifier. <text:s/>The last digit of the 9 root is the check digit using\nMOD10.</text:p>
          </table:table-cell>
          <table:table-cell office:value-type="string">
            <text:p>To facilitate user consultation, the BN is displayed as three components, separated\nby a space.</text:p>
          </table:table-cell>
          <table:table-cell table:number-columns-repeated="4"/>
          <table:table-cell office:value-type="string">
            <text:p>The BN is a numbering system whose purpose is to uniquely identify private and\npublic sector entities, i.e. registrants, government programs and operating entity(ies).</text:p>
          </table:table-cell>
          <table:table-cell/>
          <table:table-cell office:value-type="string">
            <text:p>EDIRA recommendations for coding in EDIFACT and other EDI systems.</text:p>
          </table:table-cell>
          <table:table-cell office:value-type="string">
            <text:p>Association Francaise de Normalisation: AFNOR</text:p>
          </table:table-cell>
          <table:table-cell table:style-name="ce4" office:value-type="string">
            <text:p>Nov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4">
            <text:p>94</text:p>
          </table:table-cell>
          <table:table-cell table:style-name="ce4" office:value-type="string">
            <text:p>true</text:p>
          </table:table-cell>
          <table:table-cell table:number-columns-repeated="2" office:value-type="string">
            <text:p>DEUTSCHER INDUSTRIE- UND HANDELSTAG (DIHT) Scheme (EDIRA compliant)</text:p>
          </table:table-cell>
          <table:table-cell/>
          <table:table-cell office:value-type="string">
            <text:p>Deutscher Industrie -und Handelstag (DIHT), Adenauerallee 148, D - 53113 Bonn,\nContact person: Ute Quink-Ermst, Tel: + 49 228 104 102, Fax: + 49 228 104 158</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The Deutscher Industrie -und Handelstag will register at\ntheir, highest level. <text:s/>Organizations (legal persons, partnerships, sole proprietor-ships\nand their branch offices) registered in the business register or organizations (legal or\nnatural persons) not registered in the business register.</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Nov 1995</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5">
            <text:p>95</text:p>
          </table:table-cell>
          <table:table-cell table:style-name="ce4" office:value-type="string">
            <text:p>true</text:p>
          </table:table-cell>
          <table:table-cell table:number-columns-repeated="2" office:value-type="string">
            <text:p>Hewlett - Packard Company Internal AM Network</text:p>
          </table:table-cell>
          <table:table-cell/>
          <table:table-cell office:value-type="string">
            <text:p>Hewlett - Packard Company, 3000 Hanover Street, Palo Alto CA 94304, USA, Phone\n+1 415 424 3600, Fax +1 415 424 3632</text:p>
          </table:table-cell>
          <table:table-cell office:value-type="string">
            <text:p>1) Format includes 2 fields: First field = ICD, 2) Second field = Domain specific part</text:p>
          </table:table-cell>
          <table:table-cell office:value-type="string">
            <text:p>None, except that all fields are left justified</text:p>
          </table:table-cell>
          <table:table-cell table:number-columns-repeated="4"/>
          <table:table-cell office:value-type="string">
            <text:p>Hewlett - Packard site ATM networks. <text:s/>This encompasses Hewlett - Packard sites\nthroughout the world.</text:p>
          </table:table-cell>
          <table:table-cell/>
          <table:table-cell office:value-type="string">
            <text:p>The ICD will also form part of the Initial Domain part of the OSI network addressing\nand naming tree as specified in Addendum 2 to ISO 8348</text:p>
          </table:table-cell>
          <table:table-cell office:value-type="string">
            <text:p>American National Standards Institute (ANSI) - USA</text:p>
          </table:table-cell>
          <table:table-cell table:style-name="ce4" office:value-type="string">
            <text:p>Dec 1995</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96">
            <text:p>96</text:p>
          </table:table-cell>
          <table:table-cell table:style-name="ce4" office:value-type="string">
            <text:p>false</text:p>
          </table:table-cell>
          <table:table-cell office:value-type="string">
            <text:p>DANISH CHAMBER OF COMMERCE Scheme (EDIRA compliant)</text:p>
          </table:table-cell>
          <table:table-cell office:value-type="string">
            <text:p>The Danish Business Authority - P-number (DK:P)</text:p>
          </table:table-cell>
          <table:table-cell office:value-type="string">
            <text:p>The P-number (DK:P) that represents a physical production unit of\na Danish company</text:p>
          </table:table-cell>
          <table:table-cell office:value-type="string">
            <text:p>The Danish Business Authority\nLangelinie Alle 17\nDK-2100 Copenhagen Ø\nDenmark\nAtt. Nemhandel\nTel: +45 35 29 10 00\nE-mail: erst@erst.dk</text:p>
          </table:table-cell>
          <table:table-cell/>
          <table:table-cell office:value-type="string">
            <text:p>10 digits, no space or other separator</text:p>
          </table:table-cell>
          <table:table-cell office:value-type="string">
            <text:p>Digits 0,1,2,3,4,5,6,7,8,9</text:p>
          </table:table-cell>
          <table:table-cell office:value-type="string">
            <text:p>Only digits</text:p>
          </table:table-cell>
          <table:table-cell office:value-type="string">
            <text:p>No</text:p>
          </table:table-cell>
          <table:table-cell office:value-type="string">
            <text:p>N/A</text:p>
          </table:table-cell>
          <table:table-cell office:value-type="string">
            <text:p>The P-number is registered in the Danish Business Registry\n(CVR), which are managed by the Danish Business Authority</text:p>
          </table:table-cell>
          <table:table-cell office:value-type="string">
            <text:p>The scheme with ICD code + P-number will be used to identify\nDanish companies that are parties to or referenced in electronic\ntransactions such as electronic invoicing or other B2B exchanges.</text:p>
          </table:table-cell>
          <table:table-cell office:value-type="string">
            <text:p>The P-number is registered in the Danish Business Registry\n(CVR), which are managed by the Danish Business Authority</text:p>
          </table:table-cell>
          <table:table-cell office:value-type="string">
            <text:p>Dansk Standard (DS)\n(Danish Standards Foundation)\nGöteborg Plads 1\nDK-2150 Nordhavn\nDenmark</text:p>
          </table:table-cell>
          <table:table-cell office:value-type="string">
            <text:p>1995-11</text:p>
          </table:table-cell>
          <table:table-cell table:number-columns-repeated="2"/>
          <table:table-cell office:value-type="string">
            <text:p>10 digits eg. 1234567890\nN/A\nN/A</text:p>
          </table:table-cell>
          <table:table-cell office:value-type="string">
            <text:p>2024-07-01 07:14:30 UTC</text:p>
          </table:table-cell>
          <table:table-cell table:style-name="ce3" table:number-columns-repeated="16363"/>
        </table:table-row>
        <table:table-row table:style-name="ro1" table:visibility="filter">
          <table:table-cell office:value-type="float" office:value="97">
            <text:p>97</text:p>
          </table:table-cell>
          <table:table-cell table:style-name="ce4" office:value-type="string">
            <text:p>true</text:p>
          </table:table-cell>
          <table:table-cell table:number-columns-repeated="2" office:value-type="string">
            <text:p>FTI - Ediforum Italia, (EDIRA compliant)</text:p>
          </table:table-cell>
          <table:table-cell/>
          <table:table-cell office:value-type="string">
            <text:p>FTI - Ediforum Italia, Viale Lazio, 21, 20135 Milano - ITALY, Contact person: Mr\nGiorgio PACIFICI, Tel: + 39 2 545 61 20, Fax: + 39 2 551 35 44, E-mail:\nFTI@mbox.cosi.it</text:p>
          </table:table-cell>
          <table:table-cell office:value-type="string">
            <text:p>Structure of EDI identifier, Character repertoire, The EDI identifier consists of digits\nonly. <text:s/>The identifier has a fixed length. <text:s/>No separators are required. <text:s/>Structure:\n[1234567] [123] [1] [12345], min 11- max 16, &lt; &gt;, A B C D, A: numerical value (7\ndigits) assigned by Uffico Provinciale IVA (local branch of Ministry of Finance); B:\nnumerical value a (3 digits) identifying the County; C: numerical check digit (1 digit);\nD: optional numerical value (up to 5 digits0 used by the registered organization (free\npart). Check digit computation, The check digit algorithm is the one published in the\nGazzetta Ufficiale no 345 of December 29 1976.</text:p>
          </table:table-cell>
          <table:table-cell office:value-type="string">
            <text:p>None</text:p>
          </table:table-cell>
          <table:table-cell table:number-columns-repeated="4"/>
          <table:table-cell office:value-type="string">
            <text:p>FTI - Ediforum Italia will register at their highest level.</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Feb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8">
            <text:p>98</text:p>
          </table:table-cell>
          <table:table-cell table:style-name="ce4" office:value-type="string">
            <text:p>true</text:p>
          </table:table-cell>
          <table:table-cell table:number-columns-repeated="2" office:value-type="string">
            <text:p>CHAMBER OF COMMERCE TEL AVIV-JAFFA Scheme (EDIRA compliant)</text:p>
          </table:table-cell>
          <table:table-cell/>
          <table:table-cell office:value-type="string">
            <text:p>Chamber of Commerce Tel Aviv-Jaffa, 84 Hahashmonaim Street, Tel Aviv 67011,\nISRAEL, Contact person: Mr Zvi AMIT, General Manager, Tel: +972 3 563 1010, Fax:\n+972 3 561 9025</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The Chamber of Commerce Tel Aviv-Jaffa will register at\nthe highest level: Organizations (legal persons, partnerships, sole proprietor-ships\nand their branch offices) registered in the business register or organizations (legal or\nnatural persons) not registered in the business register.</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Feb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99">
            <text:p>99</text:p>
          </table:table-cell>
          <table:table-cell table:style-name="ce4" office:value-type="string">
            <text:p>true</text:p>
          </table:table-cell>
          <table:table-cell table:number-columns-repeated="2" office:value-type="string">
            <text:p>Siemens Supervisory Systems Network</text:p>
          </table:table-cell>
          <table:table-cell/>
          <table:table-cell office:value-type="string">
            <text:p>Siemens AG, ON S, Ruppert-Mayer-Str. <text:s/>44, D-81359 Munchen, Germany, Tel: +49\n89 722 23555, Fax: +49 89 722 26473</text:p>
          </table:table-cell>
          <table:table-cell office:value-type="string">
            <text:p>1) cccc (ICD), 2) No check digits as in general the whole message has a checking\nmechanism</text:p>
          </table:table-cell>
          <table:table-cell office:value-type="string">
            <text:p>None</text:p>
          </table:table-cell>
          <table:table-cell table:number-columns-repeated="4"/>
          <table:table-cell office:value-type="string">
            <text:p>Any company or organization using Siemens Supervisory Systems and willing to\naccept Siemens ON Service as their registration authority for the Supervisory\nSystems Network. <text:s/>This network encompasses companies and organizations around</text:p>
          </table:table-cell>
          <table:table-cell/>
          <table:table-cell office:value-type="string">
            <text:p>The ICD code will form the initial part of OSI Network addressing and naming tree as\ndepicted in Addendum 2 to ISO 8348 (Network layer addressing). <text:s/>These addresses\nwill uniquely identify systems with Siemens Supervisory Systems Network and to the\noutside world.</text:p>
          </table:table-cell>
          <table:table-cell office:value-type="string">
            <text:p>Deutsches Institut fur Normung e.V (DIN)</text:p>
          </table:table-cell>
          <table:table-cell table:style-name="ce4" office:value-type="string">
            <text:p>Jul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0">
            <text:p>100</text:p>
          </table:table-cell>
          <table:table-cell table:style-name="ce4" office:value-type="string">
            <text:p>true</text:p>
          </table:table-cell>
          <table:table-cell table:number-columns-repeated="2" office:value-type="string">
            <text:p>PNG_ICD Scheme</text:p>
          </table:table-cell>
          <table:table-cell/>
          <table:table-cell office:value-type="string">
            <text:p>GPT Limited, Public Networks Group, New Century Park, P O Box 53, Coventry,\nCV3 1HJ, Tel. <text:s/>01203-562-000. <text:s/>(Contact - 'Strategy/Customer Network Services').</text:p>
          </table:table-cell>
          <table:table-cell office:value-type="string">
            <text:p>1) ICD (4 characters), 2) Organization Code comprising 4 fields with a total of 10\ncharacters. No check digits are used in the code.</text:p>
          </table:table-cell>
          <table:table-cell office:value-type="string">
            <text:p>None.</text:p>
          </table:table-cell>
          <table:table-cell table:number-columns-repeated="4"/>
          <table:table-cell office:value-type="string">
            <text:p>Telecommunications organizations worldwide using the PNG_ICD scheme and\nrequiring a globally unique organization code.</text:p>
          </table:table-cell>
          <table:table-cell/>
          <table:table-cell office:value-type="string">
            <text:p>As per annex A &amp; B of ISO 8348.</text:p>
          </table:table-cell>
          <table:table-cell office:value-type="string">
            <text:p>DIN (Deutsches Institut fur Normung) NI, Burggrafen Strasse 6, Berlin.</text:p>
          </table:table-cell>
          <table:table-cell table:style-name="ce4" office:value-type="string">
            <text:p>Sep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1">
            <text:p>101</text:p>
          </table:table-cell>
          <table:table-cell table:style-name="ce4" office:value-type="string">
            <text:p>true</text:p>
          </table:table-cell>
          <table:table-cell table:number-columns-repeated="2" office:value-type="string">
            <text:p>South African Code Allocation</text:p>
          </table:table-cell>
          <table:table-cell/>
          <table:table-cell office:value-type="string">
            <text:p>Thawte Consulting, 33 Protea Way, Durbanville 7550, South Africa</text:p>
          </table:table-cell>
          <table:table-cell office:value-type="string">
            <text:p>1) Sequence of digits, 2)</text:p>
          </table:table-cell>
          <table:table-cell office:value-type="string">
            <text:p>No special formatting, plain text digits</text:p>
          </table:table-cell>
          <table:table-cell table:number-columns-repeated="4"/>
          <table:table-cell office:value-type="string">
            <text:p>South African companies, close corporations, State entities and other organizations.</text:p>
          </table:table-cell>
          <table:table-cell/>
          <table:table-cell office:value-type="string">
            <text:p>None</text:p>
          </table:table-cell>
          <table:table-cell office:value-type="string">
            <text:p>South African Bureau of Standards (SABS)</text:p>
          </table:table-cell>
          <table:table-cell table:style-name="ce4" office:value-type="string">
            <text:p>Oct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2">
            <text:p>102</text:p>
          </table:table-cell>
          <table:table-cell table:style-name="ce4" office:value-type="string">
            <text:p>true</text:p>
          </table:table-cell>
          <table:table-cell table:number-columns-repeated="2" office:value-type="string">
            <text:p>HEAG</text:p>
          </table:table-cell>
          <table:table-cell/>
          <table:table-cell office:value-type="string">
            <text:p>Hessische Elektrizitats-AG, Jagertorstrasse 207, 64289 Darmstadt, Germany,\nTechnical Contact : Peter Giesendorf Tel 049 6151 709 2528, Gerd schmidt Tel 049\n6151 709 2547, Andreas Prels Tel 049 6151 709 2529, Fax 049 6151 709 2420</text:p>
          </table:table-cell>
          <table:table-cell office:value-type="string">
            <text:p>1) cccc(ICD), 2) no check digits</text:p>
          </table:table-cell>
          <table:table-cell office:value-type="string">
            <text:p>None</text:p>
          </table:table-cell>
          <table:table-cell table:number-columns-repeated="4"/>
          <table:table-cell office:value-type="string">
            <text:p>Any company or organization that is part of the HEAG Holding group and all\ncustomers.</text:p>
          </table:table-cell>
          <table:table-cell/>
          <table:table-cell office:value-type="string">
            <text:p>None</text:p>
          </table:table-cell>
          <table:table-cell office:value-type="string">
            <text:p>Deutsches Institut fur Normung e.V. <text:s/>(DIN)</text:p>
          </table:table-cell>
          <table:table-cell table:style-name="ce4" office:value-type="string">
            <text:p>Oct 19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3">
            <text:p>103</text:p>
          </table:table-cell>
          <table:table-cell table:style-name="ce4" office:value-type="string">
            <text:p>true</text:p>
          </table:table-cell>
          <table:table-cell table:number-columns-repeated="2" office:value-type="string">
            <text:p>(Not Assigned)</text:p>
          </table:table-cell>
          <table:table-cell office:value-type="string">
            <text:p>(Reserved for later allocation)</text:p>
          </table:table-cell>
          <table:table-cell/>
          <table:table-cell office:value-type="string">
            <text:p>1), 2)</text:p>
          </table:table-cell>
          <table:table-cell table:number-columns-repeated="10"/>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4">
            <text:p>104</text:p>
          </table:table-cell>
          <table:table-cell table:style-name="ce4" office:value-type="string">
            <text:p>true</text:p>
          </table:table-cell>
          <table:table-cell table:number-columns-repeated="2" office:value-type="string">
            <text:p>BT - ICD Coding System</text:p>
          </table:table-cell>
          <table:table-cell/>
          <table:table-cell office:value-type="string">
            <text:p>Tony Holmes, pp 9.4, 207 Old Street, London, EC1V 9NR, Tel: +44 171 250 6981</text:p>
          </table:table-cell>
          <table:table-cell office:value-type="string">
            <text:p>1) Format includes 2 fields: First field = ICD (4 decimal digits), Second field =\nDomain specific part, 2) None</text:p>
          </table:table-cell>
          <table:table-cell office:value-type="string">
            <text:p>None - all fields are left justified</text:p>
          </table:table-cell>
          <table:table-cell table:number-columns-repeated="4"/>
          <table:table-cell office:value-type="string">
            <text:p>The coding system will be used to provide ATM End System Addresses (AESAs)\nbased on ICD format NSAP addresses. <text:s/>These addresses will be used to identify\nUser Network Interfaces to ATM networks as specified by the ATM Forum UNI\nspecifications. BT will use these addresses internally and to provide customers with\nnon- geographic private AESAs.</text:p>
          </table:table-cell>
          <table:table-cell/>
          <table:table-cell office:value-type="string">
            <text:p>The ICD code will also form part of the Initial Domain Part of OSI Network Addresses\nas specified in Annex A of ISO/IEC 8348: 1993</text:p>
          </table:table-cell>
          <table:table-cell office:value-type="string">
            <text:p>BSI</text:p>
          </table:table-cell>
          <table:table-cell table:style-name="ce4" office:value-type="string">
            <text:p>Dec 96</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5">
            <text:p>105</text:p>
          </table:table-cell>
          <table:table-cell table:style-name="ce4" office:value-type="string">
            <text:p>true</text:p>
          </table:table-cell>
          <table:table-cell table:number-columns-repeated="2" office:value-type="string">
            <text:p>Portuguese Chamber of Commerce and Industry Scheme (EDIRA compliant)</text:p>
          </table:table-cell>
          <table:table-cell/>
          <table:table-cell office:value-type="string">
            <text:p>Portuguese Chamber of Commerce and Industry, Rua das Portas de Santo Antao,\n89, PT 1194 Lisboa Codex, Contact person: Mr Antonio REGUENGOS, Tel: +351 1\n342 4111, Fax: +351 1 342 4304, E-mail (X.400) c=pt;a=marconi-\nsva;p=email400;0=acl-ccip;s=drc; 0u=drc</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The Portuguese Chamber of Commerce and Industry will\nregister at the highest level: Organizations (legal persons, partnerships, sole\nproprietor-ships and their branch offices) registered in the appropriate business\nregisters (state's Secretary of State or equivalent) or organizations (legal or natural\npersons) not registered in the business registers.</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06">
            <text:p>106</text:p>
          </table:table-cell>
          <table:table-cell table:style-name="ce4" office:value-type="string">
            <text:p>false</text:p>
          </table:table-cell>
          <table:table-cell office:value-type="string">
            <text:p>Vereniging van Kamers van Koophandel en Fabrieken in Nederland (Association of Chambers of Commerce and Industry in the Netherlands), Scheme (EDIRA compliant)</text:p>
          </table:table-cell>
          <table:table-cell office:value-type="string">
            <text:p>Vereniging van Kamers van Koophandel en Fabrieken in Nederland (Association of\nChambers of Commerce and Industry in the Netherlands), Scheme (EDIRA compliant)</text:p>
          </table:table-cell>
          <table:table-cell/>
          <table:table-cell office:value-type="string">
            <text:p>Vereniging van Kamers van Koophandel en Fabrieken in Nederland Watermolenlaan,\n1, NL 3447 GT Woeden, Contact person: Drs. <text:s/>G. C. KNOOP, Tel: +31 348 42 69\n11, Fax: +31 348 42 12 31</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Vereniging van Kamers van Koophandel en Fabrieken in\nNederland will register at the highest level: Organizations (legal persons,\npartnerships, sole proprietor-ships and their branch offices) registered in the\nappropriate business registers (state's Secretary of State or equivalent) or\norganizations (legal or natural persons) not registered in the business registers.</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07">
            <text:p>107</text:p>
          </table:table-cell>
          <table:table-cell table:style-name="ce4" office:value-type="string">
            <text:p>false</text:p>
          </table:table-cell>
          <table:table-cell office:value-type="string">
            <text:p>Association of Swedish Chambers of Commerce and Industry Scheme (EDIRA compliant)</text:p>
          </table:table-cell>
          <table:table-cell office:value-type="string">
            <text:p>Association of Swedish Chambers of Commerce and Industry Scheme (EDIRA\ncompliant)</text:p>
          </table:table-cell>
          <table:table-cell/>
          <table:table-cell office:value-type="string">
            <text:p>Association of Swedish Chambers of Commerce and Industry, P O Box 16050, SE\n10321 Stockholm, Sweden, Contact person: Mr Tell HERMANSON, Tel: +46 8 613\n1800, Fax: +46 8 411 2432, E-mail: stock@chamber.se</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Association of Swedish Chambers of Commerce and\nIndustry will register at the highest level: Organizations (legal persons, partnerships,\nsole proprietor-ships and their branch offices) registered in the appropriate business\nregisters (state's Secretary of State or equivalent) or organizations (legal or natural\npersons) not registered in the business registers.</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8">
            <text:p>108</text:p>
          </table:table-cell>
          <table:table-cell table:style-name="ce4" office:value-type="string">
            <text:p>true</text:p>
          </table:table-cell>
          <table:table-cell table:number-columns-repeated="2" office:value-type="string">
            <text:p>Australian Chambers of Commerce and Industry Scheme (EDIRA compliant)</text:p>
          </table:table-cell>
          <table:table-cell/>
          <table:table-cell office:value-type="string">
            <text:p>Australian Chambers of Commerce and Industry, P O Box E 14, Queen Victoria\nTerrace, AU Canberra ACT 2600, Australia, Contact person: Mr Brent DAVIS, Tel:\n+61 6 273 23 11, Fax: +61 6 273 31 96</text:p>
          </table:table-cell>
          <table:table-cell office:value-type="string">
            <text:p>Character repertoire, The EDI identifier consists of digits only. <text:s/>The identifier has a\nfixed length. <text:s/>No separators are required. <text:s/>Structure: [123] [123456] [123456] [12],\n17, &lt; &gt;, A B C D, A: numerical value allocated by the RA to the regional sub-\nauthority, (3 digits), B: numerical value allocated by the sub-authority to the\nregistered, organization (mandatory part of the identifier; 6 digits), C: numerical value\nused by the registered organization (free part; 6 digits), D: numerical check digit\ncalculated by the registered organization; (2 digits), Check digit computation, The\ncheck digit is modular 97 computed on ABC as one number.</text:p>
          </table:table-cell>
          <table:table-cell office:value-type="string">
            <text:p>None</text:p>
          </table:table-cell>
          <table:table-cell table:number-columns-repeated="4"/>
          <table:table-cell office:value-type="string">
            <text:p>Organization highest level, Australian Chambers of Commerce and Industry will\nregister at the highest level: Organizations (legal persons, partnerships, sole\nproprietor-ships and their branch offices) registered in the appropriate business\nregisters (state's Secretary of State or equivalent) or organizations (legal or natural\npersons) not registered in the business registers.</text:p>
          </table:table-cell>
          <table:table-cell/>
          <table:table-cell office:value-type="string">
            <text:p>EDIRA recommendations for coding in EDIFACT and other EDI syntaxes.</text:p>
          </table:table-cell>
          <table:table-cell office:value-type="string">
            <text:p>Association Francaise de Normalisation: AFNOR</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09">
            <text:p>109</text:p>
          </table:table-cell>
          <table:table-cell table:style-name="ce4" office:value-type="string">
            <text:p>true</text:p>
          </table:table-cell>
          <table:table-cell table:number-columns-repeated="2" office:value-type="string">
            <text:p>BellSouth ICD AESA (ATM End System Address)</text:p>
          </table:table-cell>
          <table:table-cell/>
          <table:table-cell office:value-type="string">
            <text:p>BellSouth Corporation, 1155 Peachtree Street NE, Atlanta, GA 30309, Contact:\nRobert V. <text:s/>Epley, Tel: + 404-332-2216, Fax: + 404-420-8477</text:p>
          </table:table-cell>
          <table:table-cell office:value-type="string">
            <text:p>Field, #bytes, Name, Notes: <text:s/>1, 1, Authority and Format Identifier, =0x47; 2, 2, ICD;\n3, 10, Higher Order Domain Specific Part, BellSouth administered; 4, 6, End System\nIdentifier, End user field; 5, 1, Selector, End user field; This structure conforms to\nthe ICD AESA specified in User-Network (UNI), Specification Version 3.1 and ATM\nUser-Network Interface (UNI) Signalling, Specification Version 4.0 (af-sig-0061.000).\nBoth by the ATM Forum.</text:p>
          </table:table-cell>
          <table:table-cell office:value-type="string">
            <text:p>None</text:p>
          </table:table-cell>
          <table:table-cell table:number-columns-repeated="4"/>
          <table:table-cell office:value-type="string">
            <text:p>Any BellSouth customer (individual or company) needing an ATM address, or block\nof ATM addresses, initially in the southern USA, but possibly worldwide. <text:s/>These\naddresses should be reachable by non-BellSouth ATM users via interconnecting\nATM carriers.</text:p>
          </table:table-cell>
          <table:table-cell/>
          <table:table-cell office:value-type="string">
            <text:p>Use to form globally unique BellSouth ICD ATM End System Addresses (AESAs)</text:p>
          </table:table-cell>
          <table:table-cell office:value-type="string">
            <text:p>American National Standards Institute (ANSI) - USA</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0">
            <text:p>110</text:p>
          </table:table-cell>
          <table:table-cell table:style-name="ce4" office:value-type="string">
            <text:p>true</text:p>
          </table:table-cell>
          <table:table-cell table:number-columns-repeated="2" office:value-type="string">
            <text:p>Bell Atlantic</text:p>
          </table:table-cell>
          <table:table-cell/>
          <table:table-cell office:value-type="string">
            <text:p>Bell Atlantic, 1310 N. <text:s/>Courthouse Rd. <text:s/>3rd Floor, Arlington, VA 22201, Tel: +703-\n974-1510, Fax: +703-974-0616</text:p>
          </table:table-cell>
          <table:table-cell office:value-type="string">
            <text:p>Format includes 2 fields : First field = ICD, Second field = Domain Specific Part</text:p>
          </table:table-cell>
          <table:table-cell office:value-type="string">
            <text:p>None, except that all fields are left justified</text:p>
          </table:table-cell>
          <table:table-cell table:number-columns-repeated="4"/>
          <table:table-cell office:value-type="string">
            <text:p>Any organization or company that utilizes Bell Atlantic's ATM-based services (e.g.\nCell Relay Service). <text:s/>As a service provider Bell Atlantic wishes to assign globally\nunique addresses to its customers.</text:p>
          </table:table-cell>
          <table:table-cell/>
          <table:table-cell office:value-type="string">
            <text:p>The ICD Code will also form part of the Initial Domain Part of the OSI network\naddressing as specified in Addendum 2 to ISO 8348.</text:p>
          </table:table-cell>
          <table:table-cell office:value-type="string">
            <text:p>American National Standards Institute (ANSI) - USA</text:p>
          </table:table-cell>
          <table:table-cell table:style-name="ce4" office:value-type="string">
            <text:p>Jan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1">
            <text:p>111</text:p>
          </table:table-cell>
          <table:table-cell table:style-name="ce4" office:value-type="string">
            <text:p>true</text:p>
          </table:table-cell>
          <table:table-cell table:number-columns-repeated="2" office:value-type="string">
            <text:p>Object Identifiers</text:p>
          </table:table-cell>
          <table:table-cell/>
          <table:table-cell office:value-type="string">
            <text:p>Institute of Electrical and Electronics Engineers, PO Box 1331, 445 Hoes Lane,\nPiscataway, NJ 08855, USA</text:p>
          </table:table-cell>
          <table:table-cell office:value-type="string">
            <text:p>SMPTE 298M Universal Labels for Unique Identification, of Digital Data an ISO/ITU\nbased identifier hierarchy registration system.</text:p>
          </table:table-cell>
          <table:table-cell office:value-type="string">
            <text:p>None</text:p>
          </table:table-cell>
          <table:table-cell table:number-columns-repeated="4"/>
          <table:table-cell office:value-type="string">
            <text:p>IEEE, including RAC (registration authority committee) and other sub-entities</text:p>
          </table:table-cell>
          <table:table-cell/>
          <table:table-cell office:value-type="string">
            <text:p>Primary application is SMPTE 298M Universal Labels. <text:s/>Other applications may also\nbe supported.</text:p>
          </table:table-cell>
          <table:table-cell office:value-type="string">
            <text:p>American National Standards Institute (ANSI)</text:p>
          </table:table-cell>
          <table:table-cell table:style-name="ce4" office:value-type="string">
            <text:p>May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2">
            <text:p>112</text:p>
          </table:table-cell>
          <table:table-cell table:style-name="ce4" office:value-type="string">
            <text:p>true</text:p>
          </table:table-cell>
          <table:table-cell table:number-columns-repeated="2" office:value-type="string">
            <text:p>ISO register for Standards producing Organizations</text:p>
          </table:table-cell>
          <table:table-cell/>
          <table:table-cell office:value-type="string">
            <text:p>International Organization for Standardization (ISO), 1 rue de Varembe, Case Postale\n56, CH 1211 Geneve 20, SWITZERLAND</text:p>
          </table:table-cell>
          <table:table-cell office:value-type="string">
            <text:p>1) Numeric sequential, 2)</text:p>
          </table:table-cell>
          <table:table-cell office:value-type="string">
            <text:p>None</text:p>
          </table:table-cell>
          <table:table-cell table:number-columns-repeated="4"/>
          <table:table-cell office:value-type="string">
            <text:p>Any organization, at its highest level, producing standards that need to be referenced\nby a Technical Committee or other body of ISO or of another international\norganization working in the area of standardization.</text:p>
          </table:table-cell>
          <table:table-cell/>
          <table:table-cell office:value-type="string">
            <text:p>None</text:p>
          </table:table-cell>
          <table:table-cell office:value-type="string">
            <text:p>Association Francaise de Normalisation (AFNOR)</text:p>
          </table:table-cell>
          <table:table-cell office:value-type="string">
            <text:p>May 1997/Amended May 1999</text:p>
          </table:table-cell>
          <table:table-cell office:value-type="string">
            <text:p>This system is intended to be used among others by TC 184 for referencing standard\nproducing bodies within the components library standards.</text:p>
          </table:table-cell>
          <table:table-cell table:number-columns-repeated="3"/>
          <table:table-cell table:style-name="ce3" table:number-columns-repeated="16363"/>
        </table:table-row>
        <table:table-row table:style-name="ro1" table:visibility="filter">
          <table:table-cell office:value-type="float" office:value="113">
            <text:p>113</text:p>
          </table:table-cell>
          <table:table-cell table:style-name="ce4" office:value-type="string">
            <text:p>true</text:p>
          </table:table-cell>
          <table:table-cell table:number-columns-repeated="2" office:value-type="string">
            <text:p>OriginNet</text:p>
          </table:table-cell>
          <table:table-cell/>
          <table:table-cell office:value-type="string">
            <text:p>Origin BV, Groenewoudse weg 1, 5621 BA Eindhoven, The Netherlands, Tel: +31\n4027 87295, Fax: +31 4027 89081</text:p>
          </table:table-cell>
          <table:table-cell office:value-type="string">
            <text:p>Format includes 2 fields, First field: ICD, Second field: Domain Specific Part</text:p>
          </table:table-cell>
          <table:table-cell office:value-type="string">
            <text:p>None, except all fields left justified</text:p>
          </table:table-cell>
          <table:table-cell table:number-columns-repeated="4"/>
          <table:table-cell office:value-type="string">
            <text:p>Any organization or company that utilizes Origin's ATM based services. <text:s/>As a service\nprovider Origin wishes to be able to assign unique addresses to its customers.</text:p>
          </table:table-cell>
          <table:table-cell/>
          <table:table-cell office:value-type="string">
            <text:p>The ICD code will also form part of the Initial Domain Part of the OSI network\naddressing as specified in addendum 2 to ISO 8348.</text:p>
          </table:table-cell>
          <table:table-cell office:value-type="string">
            <text:p>NNI (Nederlands Normalisatie Instituut)</text:p>
          </table:table-cell>
          <table:table-cell table:style-name="ce4" office:value-type="string">
            <text:p>May 19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4">
            <text:p>114</text:p>
          </table:table-cell>
          <table:table-cell table:style-name="ce4" office:value-type="string">
            <text:p>true</text:p>
          </table:table-cell>
          <table:table-cell table:number-columns-repeated="2" office:value-type="string">
            <text:p>Check Point Software Technologies</text:p>
          </table:table-cell>
          <table:table-cell/>
          <table:table-cell office:value-type="string">
            <text:p>Check Point Software Technologies Ltd, 3A Jabotinski st. <text:s/>Diamond Tower, Ramat-\nGan 52520, ISRAEL, Tel: +972 3613 1833, Fax: +972 3575 9256</text:p>
          </table:table-cell>
          <table:table-cell office:value-type="string">
            <text:p>1) Format includes 3 fields: First field: ICD, 4 decimal digits, Second field:\nOrganization Code, 1-14 characters, Third field: Organization Name, up to 150\ncharacters, 2) No check digits</text:p>
          </table:table-cell>
          <table:table-cell office:value-type="string">
            <text:p>None, except that all fields are left justified</text:p>
          </table:table-cell>
          <table:table-cell table:number-columns-repeated="4"/>
          <table:table-cell office:value-type="string">
            <text:p>Check Point Software Technologies subdivisions and customers</text:p>
          </table:table-cell>
          <table:table-cell/>
          <table:table-cell office:value-type="string">
            <text:p>The ICD will also form part of the Initial Domain part of the OSI network addressing\nand naming tree as specified in Addendum 2 to ISO 8349</text:p>
          </table:table-cell>
          <table:table-cell office:value-type="string">
            <text:p>Standards Institution of Israel (SII)</text:p>
          </table:table-cell>
          <table:table-cell table:style-name="ce4" office:value-type="string">
            <text:p>Jun 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5">
            <text:p>115</text:p>
          </table:table-cell>
          <table:table-cell table:style-name="ce4" office:value-type="string">
            <text:p>true</text:p>
          </table:table-cell>
          <table:table-cell table:number-columns-repeated="2" office:value-type="string">
            <text:p>Pacific Bell Data Communications Network</text:p>
          </table:table-cell>
          <table:table-cell/>
          <table:table-cell office:value-type="string">
            <text:p>Pacific Bell, Broadband Strategy and Engineering, 2600 Camino Ramon, Room\n1S200BB, San Ramon, CA 94583, USA, Phone: +510-823-3578, Fax: +520-867-</text:p>
          </table:table-cell>
          <table:table-cell office:value-type="string">
            <text:p>An OSI network address, which consists of the IDP, with subfields AFI and ICD,\nfollowed by the Domain Specific Part. <text:s/>No check digits are used.</text:p>
          </table:table-cell>
          <table:table-cell office:value-type="string">
            <text:p>None</text:p>
          </table:table-cell>
          <table:table-cell table:number-columns-repeated="4"/>
          <table:table-cell office:value-type="string">
            <text:p>Any organization or company that participates in the Pacific Bell Data\nCommunications Network.</text:p>
          </table:table-cell>
          <table:table-cell/>
          <table:table-cell office:value-type="string">
            <text:p>The ICD code will also form the Initial Domain Part of the OSI network addressing\nand naming tree as specified in ISO 8348.</text:p>
          </table:table-cell>
          <table:table-cell office:value-type="string">
            <text:p>American National Standards Institute (ANSI)- USA</text:p>
          </table:table-cell>
          <table:table-cell table:style-name="ce4" office:value-type="string">
            <text:p>Jun 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6">
            <text:p>116</text:p>
          </table:table-cell>
          <table:table-cell table:style-name="ce4" office:value-type="string">
            <text:p>true</text:p>
          </table:table-cell>
          <table:table-cell table:number-columns-repeated="2" office:value-type="string">
            <text:p>PSS Object Identifiers</text:p>
          </table:table-cell>
          <table:table-cell/>
          <table:table-cell office:value-type="string">
            <text:p>PSS (Postal Security Services), c/o Finland Post Ltd, Products, Electronic\nMessaging, P.O. Box 702, FIN-00100 POSTI, FINLAND Tel: +358 204 511, Fax:</text:p>
          </table:table-cell>
          <table:table-cell office:value-type="string">
            <text:p>1) As defined in ISO 6523, clause 3.1, 2) Check digits, none</text:p>
          </table:table-cell>
          <table:table-cell office:value-type="string">
            <text:p>As defined in ISO 6523, clause 4.2</text:p>
          </table:table-cell>
          <table:table-cell table:number-columns-repeated="4"/>
          <table:table-cell office:value-type="string">
            <text:p>All member organizations of PSS. <text:s/>Currently Finland Post Ltd., Norway Post, Post\nDenmark, Sweden Post Ltd., <text:s/>PostGEM and their associated companies.</text:p>
          </table:table-cell>
          <table:table-cell/>
          <table:table-cell office:value-type="string">
            <text:p>A) In the SIO the organization name will normally be omitted, B) The code is\nprimarily intended for the registration of Object Identifiers according to ISO/IEC 8824:\nLevel 1: iso (1), Level 2: identified organization (3), Level 3: PSS (xxxx), Level 4 and\nhigher: defined by PSS conventions</text:p>
          </table:table-cell>
          <table:table-cell office:value-type="string">
            <text:p>Finish Standards Association, SFS</text:p>
          </table:table-cell>
          <table:table-cell table:style-name="ce4" office:value-type="string">
            <text:p>Jul 1997</text:p>
          </table:table-cell>
          <table:table-cell office:value-type="string">
            <text:p>PSS (Postal Security Services) is a grouping of Postal companies offering security\nservices in telecommunication. <text:s/>Finland Post Ltd. Acts as a co-ordinator of\nregistration of common OIDs.</text:p>
          </table:table-cell>
          <table:table-cell table:number-columns-repeated="3"/>
          <table:table-cell table:style-name="ce3" table:number-columns-repeated="16363"/>
        </table:table-row>
        <table:table-row table:style-name="ro1" table:visibility="filter">
          <table:table-cell office:value-type="float" office:value="117">
            <text:p>117</text:p>
          </table:table-cell>
          <table:table-cell table:style-name="ce4" office:value-type="string">
            <text:p>true</text:p>
          </table:table-cell>
          <table:table-cell table:number-columns-repeated="2" office:value-type="string">
            <text:p>STENTOR-ICD CODING SYSTEM</text:p>
          </table:table-cell>
          <table:table-cell/>
          <table:table-cell office:value-type="string">
            <text:p>B. Sambasivan, Stentor Resource Centre Inc. <text:s/>Room 480, 160 Elgin St. <text:s/>Ottowa,\nOntario K1G 3JA, Canada, Tel.# + 1 613 781 7458 Fax.# + 1 613 781 6454</text:p>
          </table:table-cell>
          <table:table-cell office:value-type="string">
            <text:p>1) Format includes 2 fields. <text:s/>First field - ICD (4 decimal digital), Second field -\nDomain Specific Part, 2) None</text:p>
          </table:table-cell>
          <table:table-cell office:value-type="string">
            <text:p>None</text:p>
          </table:table-cell>
          <table:table-cell table:number-columns-repeated="4"/>
          <table:table-cell office:value-type="string">
            <text:p>The coding system will be used within Stentor's ATM network to identify ICD NSAP\nend points.</text:p>
          </table:table-cell>
          <table:table-cell/>
          <table:table-cell office:value-type="string">
            <text:p>The ICD code will be used to form the Initial Domain part of the OSI Network Address\nas specified in Annex A of ISO/IEC 8348:1993</text:p>
          </table:table-cell>
          <table:table-cell office:value-type="string">
            <text:p>Standards Council of Canada (SCC)</text:p>
          </table:table-cell>
          <table:table-cell table:style-name="ce4" office:value-type="string">
            <text:p>Aug 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8">
            <text:p>118</text:p>
          </table:table-cell>
          <table:table-cell table:style-name="ce4" office:value-type="string">
            <text:p>true</text:p>
          </table:table-cell>
          <table:table-cell table:number-columns-repeated="2" office:value-type="string">
            <text:p>ATM-Network ZN'96</text:p>
          </table:table-cell>
          <table:table-cell/>
          <table:table-cell office:value-type="string">
            <text:p>Deutsche Telekom AG, AM Kavalleriesand 3, 64295 Darmstadt</text:p>
          </table:table-cell>
          <table:table-cell office:value-type="string">
            <text:p>ICD Format, (4 characters)</text:p>
          </table:table-cell>
          <table:table-cell office:value-type="string">
            <text:p>--none--</text:p>
          </table:table-cell>
          <table:table-cell table:number-columns-repeated="4"/>
          <table:table-cell office:value-type="string">
            <text:p>--none at present time--</text:p>
          </table:table-cell>
          <table:table-cell/>
          <table:table-cell office:value-type="string">
            <text:p>--none--</text:p>
          </table:table-cell>
          <table:table-cell office:value-type="string">
            <text:p>DIN-NI</text:p>
          </table:table-cell>
          <table:table-cell table:style-name="ce4" office:value-type="string">
            <text:p>Aug 97</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19">
            <text:p>119</text:p>
          </table:table-cell>
          <table:table-cell table:style-name="ce4" office:value-type="string">
            <text:p>true</text:p>
          </table:table-cell>
          <table:table-cell table:number-columns-repeated="2" office:value-type="string">
            <text:p>MCI / OSI Network</text:p>
          </table:table-cell>
          <table:table-cell/>
          <table:table-cell office:value-type="string">
            <text:p>MCI Telecommunications Corporation, Technical Standards Management, Dept.\n1225/107, 2400 N. <text:s/>Glenville Dr. <text:s/>Richardson, TX 75082, USA, Phone\n+1.972.918.5630, Fax +1.972.918.6038</text:p>
          </table:table-cell>
          <table:table-cell office:value-type="string">
            <text:p>1) Three fields, First Field = ICD, Second Field = Organization Code, 1-14 digits,\nThird Field = Organization Name, up to 250 digits</text:p>
          </table:table-cell>
          <table:table-cell office:value-type="string">
            <text:p>None, except that all fields are left justified.</text:p>
          </table:table-cell>
          <table:table-cell table:number-columns-repeated="4"/>
          <table:table-cell office:value-type="string">
            <text:p>Any organization in a MCI / OSI networking environment. <text:s/>This program\nencompasses organizations throughout the world.</text:p>
          </table:table-cell>
          <table:table-cell/>
          <table:table-cell office:value-type="string">
            <text:p>The ICD code will also form the Initial Domain Part of the OSI network addressing\nand naming tree as specified in Addendum 2 to ISO 8348.</text:p>
          </table:table-cell>
          <table:table-cell office:value-type="string">
            <text:p>American National Standards Institute (ANSI) - USA</text:p>
          </table:table-cell>
          <table:table-cell table:style-name="ce4" office:value-type="string">
            <text:p>Aug 1997</text:p>
          </table:table-cell>
          <table:table-cell table:number-columns-repeated="4"/>
          <table:table-cell table:style-name="ce3" table:number-columns-repeated="16363"/>
        </table:table-row>
        <table:table-row table:style-name="ro1" table:visibility="filter">
          <table:table-cell office:value-type="float" office:value="120">
            <text:p>120</text:p>
          </table:table-cell>
          <table:table-cell table:style-name="ce4" office:value-type="string">
            <text:p>true</text:p>
          </table:table-cell>
          <table:table-cell table:number-columns-repeated="2" office:value-type="string">
            <text:p>Advantis</text:p>
          </table:table-cell>
          <table:table-cell/>
          <table:table-cell office:value-type="string">
            <text:p>Advantis, Charles M. <text:s/>Reiss, 231 N. Martingdale Rd, Schaumbur, Ill, USA, 60173-\n2254, Phone: 847-240-8504, Fax: 847-240-3864</text:p>
          </table:table-cell>
          <table:table-cell office:value-type="string">
            <text:p>The format includes three fields: First field: ICD, 4 digits, Second field: Organization\ncode, 1-14 digits, Third field: Organizational name up to 250 digits</text:p>
          </table:table-cell>
          <table:table-cell office:value-type="string">
            <text:p>None</text:p>
          </table:table-cell>
          <table:table-cell table:number-columns-repeated="4"/>
          <table:table-cell office:value-type="string">
            <text:p>This ICD structure will be used for ATM customers of Advantis. <text:s/>This would also be\nused for all managed devices provided by Advantis around the world in the LAN,\nCampus and WAN.</text:p>
          </table:table-cell>
          <table:table-cell/>
          <table:table-cell office:value-type="string">
            <text:p>None</text:p>
          </table:table-cell>
          <table:table-cell office:value-type="string">
            <text:p>American National Standards Institute (ANSI) - USA</text:p>
          </table:table-cell>
          <table:table-cell table:style-name="ce4" office:value-type="string">
            <text:p>Oct 97</text:p>
          </table:table-cell>
          <table:table-cell office:value-type="string">
            <text:p>This ICD number will be used to identify ATM devices that are attached to our ATM\nservice. Typically this world wide ATM service would be offered to Fortune 100\ncustomers, like Sears, who want a managed ATM solution or who require full ATM\ncampus to campus, outsourcing. <text:s/>The addressing components would include Host or\nother device, LAN, Campus, and global WAN nodes.</text:p>
          </table:table-cell>
          <table:table-cell table:number-columns-repeated="3"/>
          <table:table-cell table:style-name="ce3" table:number-columns-repeated="16363"/>
        </table:table-row>
        <table:table-row table:style-name="ro1" table:visibility="filter">
          <table:table-cell office:value-type="float" office:value="121">
            <text:p>121</text:p>
          </table:table-cell>
          <table:table-cell table:style-name="ce4" office:value-type="string">
            <text:p>true</text:p>
          </table:table-cell>
          <table:table-cell table:number-columns-repeated="2" office:value-type="string">
            <text:p>Affable Software Data Interchange Codes</text:p>
          </table:table-cell>
          <table:table-cell/>
          <table:table-cell office:value-type="string">
            <text:p>Affable Software Corporation, 6239 Thome Avenue, Burnaby, British Columbia,\nCanada- V3N 2V2, Contact: Eric Kolotyluk Tel: +1-604 522-1201</text:p>
          </table:table-cell>
          <table:table-cell office:value-type="string">
            <text:p>1) format: XXXX/AFC, example: 0000/AFC, 2) none</text:p>
          </table:table-cell>
          <table:table-cell office:value-type="string">
            <text:p>None</text:p>
          </table:table-cell>
          <table:table-cell table:number-columns-repeated="4"/>
          <table:table-cell office:value-type="string">
            <text:p>Organizations using Affable Software applications and data standards</text:p>
          </table:table-cell>
          <table:table-cell/>
          <table:table-cell office:value-type="string">
            <text:p>The ICD code will form the initial part of the naming tree for applications and data\nstandards supported by Affable Software, forming the initial part of the OBJECT\nIDENTIFIER tree.</text:p>
          </table:table-cell>
          <table:table-cell office:value-type="string">
            <text:p>Standards Council of Canada, 45 O'Connor Street- Suite 1200, Ottawa, Ontario K1P\n6N7, Canada, Tel + 1-613-238-3222 Fax: +1-613-395-4564</text:p>
          </table:table-cell>
          <table:table-cell table:style-name="ce4" office:value-type="string">
            <text:p>Feb 19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2">
            <text:p>122</text:p>
          </table:table-cell>
          <table:table-cell table:style-name="ce4" office:value-type="string">
            <text:p>true</text:p>
          </table:table-cell>
          <table:table-cell table:number-columns-repeated="2" office:value-type="string">
            <text:p>BB-DATA GmbH</text:p>
          </table:table-cell>
          <table:table-cell/>
          <table:table-cell office:value-type="string">
            <text:p>BB-DATA GmbH, Brunnestrasse 11, 13355 Berlin, Germany, Contact: Dirk\nHaegebarth, Tel: +49 30 2455 4353, Fax; +49 30 2455 7201</text:p>
          </table:table-cell>
          <table:table-cell office:value-type="string">
            <text:p>cccc(ICD)</text:p>
          </table:table-cell>
          <table:table-cell office:value-type="string">
            <text:p>None</text:p>
          </table:table-cell>
          <table:table-cell table:number-columns-repeated="4"/>
          <table:table-cell office:value-type="string">
            <text:p>The BB-Data is a Service Provider for the Bankgesellschaft Berlin and subsidiary\ncompanies</text:p>
          </table:table-cell>
          <table:table-cell/>
          <table:table-cell office:value-type="string">
            <text:p>None</text:p>
          </table:table-cell>
          <table:table-cell office:value-type="string">
            <text:p>DIN-NI</text:p>
          </table:table-cell>
          <table:table-cell table:style-name="ce4" office:value-type="string">
            <text:p>Feb 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3">
            <text:p>123</text:p>
          </table:table-cell>
          <table:table-cell table:style-name="ce4" office:value-type="string">
            <text:p>true</text:p>
          </table:table-cell>
          <table:table-cell table:number-columns-repeated="2" office:value-type="string">
            <text:p>BASF Company ATM-Network</text:p>
          </table:table-cell>
          <table:table-cell/>
          <table:table-cell office:value-type="string">
            <text:p>BASF Computer Services GmbH, Carl-Bosch-Str. <text:s/>38, 67056 Ludwigshafen,\nGermany, (Contact: BCS/NET Tel. <text:s/>+ 49621 60 49323)</text:p>
          </table:table-cell>
          <table:table-cell office:value-type="string">
            <text:p>1) ICD (International Code Designator), 2) Organization code, comprising 4 fields with\na total of, 10 characters</text:p>
          </table:table-cell>
          <table:table-cell office:value-type="string">
            <text:p>None</text:p>
          </table:table-cell>
          <table:table-cell table:number-columns-repeated="4"/>
          <table:table-cell office:value-type="string">
            <text:p>Any organization part of the BASF Company requiring a unique organization code</text:p>
          </table:table-cell>
          <table:table-cell/>
          <table:table-cell office:value-type="string">
            <text:p>As specified in ISO 8348</text:p>
          </table:table-cell>
          <table:table-cell office:value-type="string">
            <text:p>DIN (Deutsches Institut fur Norung e.V.), Burggrafenstr. <text:s/>6, D 10787 Berlin</text:p>
          </table:table-cell>
          <table:table-cell table:style-name="ce4" office:value-type="string">
            <text:p>Feb 98</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24">
            <text:p>124</text:p>
          </table:table-cell>
          <table:table-cell table:style-name="ce4" office:value-type="string">
            <text:p>false</text:p>
          </table:table-cell>
          <table:table-cell office:value-type="string">
            <text:p>IOTA Identifiers for Organizations for Telecommunications Addressing using the ICD system format defined in ISO/IEC 8348</text:p>
          </table:table-cell>
          <table:table-cell office:value-type="string">
            <text:p>IOTA Identifiers for Organizations for Telecommunications Addressing using the ICD\nsystem format defined in ISO/IEC 8348</text:p>
          </table:table-cell>
          <table:table-cell/>
          <table:table-cell office:value-type="string">
            <text:p>DISC, British Standards Institution, 389 Chiswick High Road, London W4 4AL, UK</text:p>
          </table:table-cell>
          <table:table-cell office:value-type="string">
            <text:p>1) The four digit fixed length, 2) A fixed length six digit number in the range 000001 to\n999999. <text:s/>Values will be allocated sequentially by the Issuing Organization, starting\nat 001001. <text:s/>The range 000001 to 001000 is reserved in case it is required for special\npurposes.</text:p>
          </table:table-cell>
          <table:table-cell office:value-type="string">
            <text:p>The organization identifier is intended for use as a fixed length six digit number\npadded to length where necessary with non significant zeros. <text:s/>However, it may be\nused as appropriate for the particular application. <text:s/>In particular it may be used as a\nbinary value omitting numerically non significant zeros.</text:p>
          </table:table-cell>
          <table:table-cell table:number-columns-repeated="4"/>
          <table:table-cell office:value-type="string">
            <text:p>Any organization requiring an identifier for use in constructing telecommunications\naddresses, e.g. <text:s/>ATM addresses, in accordance with the ISO 6523 ICD Format as\nspecified in ISO/IEC 8348. <text:s/>Identifiers may also be used for other purposes including\nthe creation of object identifier component values using the identified-organization as\nspecified in ISO/IEC 8824-1.</text:p>
          </table:table-cell>
          <table:table-cell/>
          <table:table-cell office:value-type="string">
            <text:p>The identifiers issued under this scheme are specifically intended for use as a\ncomponent in the construction of telecommunications addresses using the ISO 6523\nFormat as specified in ISO/IEC 8348. <text:s/>However, at the discretion of the user they\nmay be employed for other purposes including the formation of other types of\ntelecommunications addresses and OSI object identifiers.</text:p>
          </table:table-cell>
          <table:table-cell office:value-type="string">
            <text:p>DIN (Deutsches Institut fur Normung) NI, Burggrafenstrasse 6, Berlin</text:p>
          </table:table-cell>
          <table:table-cell table:style-name="ce4" office:value-type="string">
            <text:p>Apr 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5">
            <text:p>125</text:p>
          </table:table-cell>
          <table:table-cell table:style-name="ce4" office:value-type="string">
            <text:p>true</text:p>
          </table:table-cell>
          <table:table-cell table:number-columns-repeated="2" office:value-type="string">
            <text:p>Henkel Corporate Network (H-Net)</text:p>
          </table:table-cell>
          <table:table-cell/>
          <table:table-cell office:value-type="string">
            <text:p>Henkel KgaA, Dep: SIS/BC-Networks, 40191 Dusseldorf, Germany, Contact:\nChristopher Heidler Uwe Wirtz, Tel: + 49 211 797 9400 Tel: +49 211 797 5500, Fax:\n+ 49 211 798 19400 Fax: +49 211 798 1110</text:p>
          </table:table-cell>
          <table:table-cell office:value-type="string">
            <text:p>1) ICD (4 characters), 2) Organization code, comprising 4 fields with a total of 10\ncharacters, No check digits are used in the code</text:p>
          </table:table-cell>
          <table:table-cell office:value-type="string">
            <text:p>None</text:p>
          </table:table-cell>
          <table:table-cell table:number-columns-repeated="4"/>
          <table:table-cell office:value-type="string">
            <text:p>World-wide Henkel affiliated companies using the Henkel Corporate Network (H-Net)\nand requiring a globally unique organization code</text:p>
          </table:table-cell>
          <table:table-cell/>
          <table:table-cell office:value-type="string">
            <text:p>As specified in ISO 8348</text:p>
          </table:table-cell>
          <table:table-cell office:value-type="string">
            <text:p>DIN (Deutsches Institut fur Normung) NI, Buggrafenstrasse 6, Berlin, Germany</text:p>
          </table:table-cell>
          <table:table-cell table:style-name="ce4" office:value-type="string">
            <text:p>Mar 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6">
            <text:p>126</text:p>
          </table:table-cell>
          <table:table-cell table:style-name="ce4" office:value-type="string">
            <text:p>true</text:p>
          </table:table-cell>
          <table:table-cell table:number-columns-repeated="2" office:value-type="string">
            <text:p>GTE/OSI Network</text:p>
          </table:table-cell>
          <table:table-cell/>
          <table:table-cell office:value-type="string">
            <text:p>GTE, Industry Standards, HQW02J85, 700 Hidden Ridge, Irving, TX 75038, USA,\nPhone: + 972 718 6291, Fax: + 972 718 4393</text:p>
          </table:table-cell>
          <table:table-cell office:value-type="string">
            <text:p>1) ICD, 2) Organization Code, 1-14 characters, 3) Organization name, up to 250\ncharacters</text:p>
          </table:table-cell>
          <table:table-cell office:value-type="string">
            <text:p>None, except all fields are left justified</text:p>
          </table:table-cell>
          <table:table-cell table:number-columns-repeated="4"/>
          <table:table-cell office:value-type="string">
            <text:p>Any organizations in a GTE/OSI networking environment. <text:s/>This program\nencompasses organizations throughout the world.</text:p>
          </table:table-cell>
          <table:table-cell/>
          <table:table-cell office:value-type="string">
            <text:p>The ICD will also form the Initial Domain part of the OSI network addressing and\nnaming tree as specified in Addendum 2 to ISO 8348.</text:p>
          </table:table-cell>
          <table:table-cell office:value-type="string">
            <text:p>American National Standards Institute (ANSI)- USA</text:p>
          </table:table-cell>
          <table:table-cell table:style-name="ce4" office:value-type="string">
            <text:p>May 19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7">
            <text:p>127</text:p>
          </table:table-cell>
          <table:table-cell table:style-name="ce4" office:value-type="string">
            <text:p>true</text:p>
          </table:table-cell>
          <table:table-cell table:number-columns-repeated="2" office:value-type="string">
            <text:p>Dresdner Bank Corporate Network</text:p>
          </table:table-cell>
          <table:table-cell/>
          <table:table-cell office:value-type="string">
            <text:p>Dresdner Bank AG, IT-Kommunikationssysteme, Windmuehlstr. <text:s/>14, 60329 Frankfurt\nam Main, Germany, Contact: Peter Radig, Tel: + 49 69 263 7243, Fax: + 49 69 263\n5510, Email: Peter.Radig@Dresdner-Bank.com</text:p>
          </table:table-cell>
          <table:table-cell office:value-type="string">
            <text:p>ICD (4 characters)</text:p>
          </table:table-cell>
          <table:table-cell office:value-type="string">
            <text:p>None</text:p>
          </table:table-cell>
          <table:table-cell table:number-columns-repeated="4"/>
          <table:table-cell office:value-type="string">
            <text:p>1. All national and international offices, branches and subsidiaries of the Dresdner\nBank Group. 2. <text:s/>All customers of the Dresdner Bank Corporate Network</text:p>
          </table:table-cell>
          <table:table-cell/>
          <table:table-cell office:value-type="string">
            <text:p>None</text:p>
          </table:table-cell>
          <table:table-cell office:value-type="string">
            <text:p>Deutsches Institut fur Normung e.V. <text:s/>(DIN)</text:p>
          </table:table-cell>
          <table:table-cell table:style-name="ce4" office:value-type="string">
            <text:p>Jul 19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28">
            <text:p>128</text:p>
          </table:table-cell>
          <table:table-cell table:style-name="ce4" office:value-type="string">
            <text:p>true</text:p>
          </table:table-cell>
          <table:table-cell table:number-columns-repeated="2" office:value-type="string">
            <text:p>BCNR (Swiss Clearing Bank Number)</text:p>
          </table:table-cell>
          <table:table-cell/>
          <table:table-cell office:value-type="string">
            <text:p>Telekurs AG, Hardturmstrasse 201, CH - 8021 Zurich, Switzerland Tel +41.1.279.2111</text:p>
          </table:table-cell>
          <table:table-cell office:value-type="string">
            <text:p>1) n..6, 2) Minimum of 4 numeric characters</text:p>
          </table:table-cell>
          <table:table-cell office:value-type="string">
            <text:p>None</text:p>
          </table:table-cell>
          <table:table-cell table:number-columns-repeated="4"/>
          <table:table-cell office:value-type="string">
            <text:p>Swiss banking institutions</text:p>
          </table:table-cell>
          <table:table-cell/>
          <table:table-cell office:value-type="string">
            <text:p>Code for the identification of a Swiss clearing bank as a sender and/or receiver of an\nelectronic message.</text:p>
          </table:table-cell>
          <table:table-cell office:value-type="string">
            <text:p>S.W.I.F.T. <text:s/>sc (Society for Worldwide Interbank Financial Telecommunication sc)</text:p>
          </table:table-cell>
          <table:table-cell office:value-type="string">
            <text:p>Jul 98/Amended Sep 2000</text:p>
          </table:table-cell>
          <table:table-cell office:value-type="string">
            <text:p>Change to ICD name and notes on use of code. Sept 2000.</text:p>
          </table:table-cell>
          <table:table-cell table:number-columns-repeated="3"/>
          <table:table-cell table:style-name="ce3" table:number-columns-repeated="16363"/>
        </table:table-row>
        <table:table-row table:style-name="ro1" table:visibility="filter">
          <table:table-cell office:value-type="float" office:value="129">
            <text:p>129</text:p>
          </table:table-cell>
          <table:table-cell table:style-name="ce4" office:value-type="string">
            <text:p>true</text:p>
          </table:table-cell>
          <table:table-cell table:number-columns-repeated="2" office:value-type="string">
            <text:p>BPI (Swiss Business Partner Identification) code</text:p>
          </table:table-cell>
          <table:table-cell/>
          <table:table-cell office:value-type="string">
            <text:p>Telekurs AG, Hardturmstrasse 201, CH - 8021 Zurich, Switzerland Tel +41.1.279.2111</text:p>
          </table:table-cell>
          <table:table-cell office:value-type="string">
            <text:p>1) an..6, 2) None</text:p>
          </table:table-cell>
          <table:table-cell office:value-type="string">
            <text:p>None</text:p>
          </table:table-cell>
          <table:table-cell table:number-columns-repeated="4"/>
          <table:table-cell office:value-type="string">
            <text:p>Swiss non-clearing banking institutions or corporates</text:p>
          </table:table-cell>
          <table:table-cell/>
          <table:table-cell office:value-type="string">
            <text:p>Code for the identification of a corporate or a Swiss non-clearing bank as a sender\nand/or receiver of an electronic message.</text:p>
          </table:table-cell>
          <table:table-cell office:value-type="string">
            <text:p>S.W.I.F.T. <text:s/>sc (Society for Worldwide Interbank, Financial Telecommunication sc)</text:p>
          </table:table-cell>
          <table:table-cell office:value-type="string">
            <text:p>Jul 1998/ Amended Sep 2000</text:p>
          </table:table-cell>
          <table:table-cell office:value-type="string">
            <text:p>Change to ICD name description of organisations covered by the code and notes on\nuse of code. <text:s/>Sept 2000.</text:p>
          </table:table-cell>
          <table:table-cell table:number-columns-repeated="3"/>
          <table:table-cell table:style-name="ce3" table:number-columns-repeated="16363"/>
        </table:table-row>
        <table:table-row table:style-name="ro1" table:visibility="filter">
          <table:table-cell office:value-type="float" office:value="130">
            <text:p>130</text:p>
          </table:table-cell>
          <table:table-cell table:style-name="ce4" office:value-type="string">
            <text:p>true</text:p>
          </table:table-cell>
          <table:table-cell table:number-columns-repeated="2" office:value-type="string">
            <text:p>Directorates of the European Commission</text:p>
          </table:table-cell>
          <table:table-cell/>
          <table:table-cell office:value-type="string">
            <text:p>European Commission, Information Directorate, Data Transmission Service, Rue de\nla Loi, 200, B-1049 Brussels, Belgium</text:p>
          </table:table-cell>
          <table:table-cell office:value-type="string">
            <text:p>1) ICD 4 digits, 2) None</text:p>
          </table:table-cell>
          <table:table-cell office:value-type="string">
            <text:p>None</text:p>
          </table:table-cell>
          <table:table-cell table:number-columns-repeated="4"/>
          <table:table-cell office:value-type="string">
            <text:p>General Directorates of the European Commission</text:p>
          </table:table-cell>
          <table:table-cell/>
          <table:table-cell office:value-type="string">
            <text:p>The code will be used for the generation of ATM network addresses in the context of\nEC's private ATM network, interconnecting all of EC's directorates across Europe</text:p>
          </table:table-cell>
          <table:table-cell office:value-type="string">
            <text:p>IBN - Belgium</text:p>
          </table:table-cell>
          <table:table-cell table:style-name="ce4" office:value-type="string">
            <text:p>Aug 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1">
            <text:p>131</text:p>
          </table:table-cell>
          <table:table-cell table:style-name="ce4" office:value-type="string">
            <text:p>true</text:p>
          </table:table-cell>
          <table:table-cell table:number-columns-repeated="2" office:value-type="string">
            <text:p>Code for the Identification of National Organizations</text:p>
          </table:table-cell>
          <table:table-cell/>
          <table:table-cell office:value-type="string">
            <text:p>China National Organization Code Registration Authority, Center (CNRAC), No 46.\nEast Door, Dewai Yu Zhong Xi Li, Xicheng District, Beijing, P.R. <text:s/>of China, 100029,\nTel. <text:s/>+ 86 10 6202 4549, Fax. <text:s/>+ 86 10 6202 4513</text:p>
          </table:table-cell>
          <table:table-cell office:value-type="string">
            <text:p>1) ICD (International Code Designator), 2) Organization Code, comprising 2 fields with\na total of 9 characters. 8 number or character body code and 1 number or character\ncheck code.</text:p>
          </table:table-cell>
          <table:table-cell office:value-type="string">
            <text:p>None</text:p>
          </table:table-cell>
          <table:table-cell table:number-columns-repeated="4"/>
          <table:table-cell office:value-type="string">
            <text:p>Any organization requiring an identifier for use in informationized management of\nNation.</text:p>
          </table:table-cell>
          <table:table-cell/>
          <table:table-cell office:value-type="string">
            <text:p>None</text:p>
          </table:table-cell>
          <table:table-cell office:value-type="string">
            <text:p>China State Bureau of Quality &amp; Technical Supervision (CSBTS), 4 Zhicun Road,\nHaidian District, P.O. <text:s/>Box 8010, Beijing, China, 100088, ISO/IEC China National\nCommittee, Fax. <text:s/>+8610 6203 3737</text:p>
          </table:table-cell>
          <table:table-cell table:style-name="ce4" office:value-type="string">
            <text:p>Sept 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2">
            <text:p>132</text:p>
          </table:table-cell>
          <table:table-cell table:style-name="ce4" office:value-type="string">
            <text:p>true</text:p>
          </table:table-cell>
          <table:table-cell table:number-columns-repeated="2" office:value-type="string">
            <text:p>Certicom Object Identifiers</text:p>
          </table:table-cell>
          <table:table-cell/>
          <table:table-cell office:value-type="string">
            <text:p>Certicom Corp, Suite 1050, 1400 Fashion Island Blvd, San Mateo, CA 94404, U.S.A.\nTel: 650 312 7960, Fax: 650 312 7969</text:p>
          </table:table-cell>
          <table:table-cell office:value-type="string">
            <text:p>Two fields : First field - ICD, Second field - Sequence of digits</text:p>
          </table:table-cell>
          <table:table-cell office:value-type="string">
            <text:p>None</text:p>
          </table:table-cell>
          <table:table-cell table:number-columns-repeated="4"/>
          <table:table-cell office:value-type="string">
            <text:p>Certicom, its subdivisions, its customers, and any organization using Certicom's\ncryptographic services and products. <text:s/>Such customers and organizations include;\ndomestic and foreign companies, state entities, and standards groups.</text:p>
          </table:table-cell>
          <table:table-cell/>
          <table:table-cell office:value-type="string">
            <text:p>The ICD is primarily intended for registration of Object Identifiers in accordance with\nISO/IEC 8824 (ASN.1) to be used for the registration of the following: a) Application\nlayer protocols, b) Cryptographic protocols, c) Data formats of keying information, d)\nInformation objects pertaining to data exchange, The OID structure and the inclusion\ntherein of the ICD is as follows: Level 1: iso (1), Level 2: identified-organization (3),\nLevel 3: certicom (xxxx), Level 4 and higher: Defined by Certicom</text:p>
          </table:table-cell>
          <table:table-cell office:value-type="string">
            <text:p>American National Standards Institute (ANSI) - USA</text:p>
          </table:table-cell>
          <table:table-cell table:style-name="ce4" office:value-type="string">
            <text:p>Nov 1998</text:p>
          </table:table-cell>
          <table:table-cell office:value-type="string">
            <text:p>The Issuing Organization within Certicom shall be Certicom, Research. <text:s/>The contact\nis John O. Goyo (jgoyo@certicom.com), who may be reached at 905-501-3850</text:p>
          </table:table-cell>
          <table:table-cell table:number-columns-repeated="3"/>
          <table:table-cell table:style-name="ce3" table:number-columns-repeated="16363"/>
        </table:table-row>
        <table:table-row table:style-name="ro1" table:visibility="filter">
          <table:table-cell office:value-type="float" office:value="133">
            <text:p>133</text:p>
          </table:table-cell>
          <table:table-cell table:style-name="ce4" office:value-type="string">
            <text:p>true</text:p>
          </table:table-cell>
          <table:table-cell table:number-columns-repeated="2" office:value-type="string">
            <text:p>TC68 OID</text:p>
          </table:table-cell>
          <table:table-cell/>
          <table:table-cell office:value-type="string">
            <text:p>ISO TC68, Banking and Related Financial Services, c/o American Bankers'\nAssociation, 1120 Connecticut Ave, N.W. <text:s/>Washington, DC 20036, USA, Tel: 1-\n(202) 663 5284, Fax: 1- (202) 828 4540</text:p>
          </table:table-cell>
          <table:table-cell office:value-type="string">
            <text:p>1) Three fields, First field = ICD, Second field = Member Country Code, 1-14\ncharacters, Third field = Number of Standard</text:p>
          </table:table-cell>
          <table:table-cell office:value-type="string">
            <text:p>None</text:p>
          </table:table-cell>
          <table:table-cell table:number-columns-repeated="4"/>
          <table:table-cell office:value-type="string">
            <text:p>ISO Technical Committee 68 and member bodies</text:p>
          </table:table-cell>
          <table:table-cell/>
          <table:table-cell office:value-type="string">
            <text:p>The ICD code will form the Initial Domain Part of the OSI network addressing and\nnaming tree as specified in Addendum 2 to ISO 8348.</text:p>
          </table:table-cell>
          <table:table-cell office:value-type="string">
            <text:p>American National Standards Institute (ANSI)</text:p>
          </table:table-cell>
          <table:table-cell table:style-name="ce4" office:value-type="string">
            <text:p>Dec 1998</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4">
            <text:p>134</text:p>
          </table:table-cell>
          <table:table-cell table:style-name="ce4" office:value-type="string">
            <text:p>true</text:p>
          </table:table-cell>
          <table:table-cell table:number-columns-repeated="2" office:value-type="string">
            <text:p>Infonet Services Corporation</text:p>
          </table:table-cell>
          <table:table-cell/>
          <table:table-cell office:value-type="string">
            <text:p>Infonet NV/SA, Av. Louise 350 Box 3, 1050 Brussels, Belgium, Attn: Mr Mircea\nPisica - Senior System Engineer, E-mail: Mircia_Pisica@infonet.com, Tel: +322 627\n3900, Fax: +322 646 1308</text:p>
          </table:table-cell>
          <table:table-cell office:value-type="string">
            <text:p>1) ICD Code- 4 digits, Organization code - up to 14 characters, Organization name -\nup to 250 characters, 2) No check digits needed</text:p>
          </table:table-cell>
          <table:table-cell office:value-type="string">
            <text:p>None- all fields are left justified</text:p>
          </table:table-cell>
          <table:table-cell table:number-columns-repeated="4"/>
          <table:table-cell office:value-type="string">
            <text:p>The coding system will be used to provide ATM End System Addresses (AESAs)\nbased on ICD format NSAP addresses. <text:s/>These addresses will be used to identify\nUser Network Interfaces to ATM networks as specified by the ATM forum UNI\nspecifications. <text:s/>Infonet will use these addresses internally and to provide customers\nwith non-geographic private AESAs.</text:p>
          </table:table-cell>
          <table:table-cell/>
          <table:table-cell office:value-type="string">
            <text:p>The ICD code forms the initial part of the OSI network addressing and tree as\ndepicted in Addendum 2 of ISO 8348 (Network Layer, Addressing). <text:s/>Infonet intends to\nuse these addresses to uniquely identify systems within INFONET and to the\noutside world.</text:p>
          </table:table-cell>
          <table:table-cell office:value-type="string">
            <text:p>Institut Belge de Normalisation (IBN)- Belgium</text:p>
          </table:table-cell>
          <table:table-cell table:style-name="ce4" office:value-type="string">
            <text:p>Jan 199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5">
            <text:p>135</text:p>
          </table:table-cell>
          <table:table-cell table:style-name="ce4" office:value-type="string">
            <text:p>true</text:p>
          </table:table-cell>
          <table:table-cell table:number-columns-repeated="2" office:value-type="string">
            <text:p>SIA Object Identifiers</text:p>
          </table:table-cell>
          <table:table-cell/>
          <table:table-cell office:value-type="string">
            <text:p>SIA-Società Interbancaria per l'Automazione S.p.A. Viale Certosa, 218, I-20156\nMilano, ITALIA, Tel. <text:s/>+39-02-3005.1, Fax: +39-02-38003333</text:p>
          </table:table-cell>
          <table:table-cell office:value-type="string">
            <text:p>First field: ICD: 4 digits, Second field: sequence of digits</text:p>
          </table:table-cell>
          <table:table-cell office:value-type="string">
            <text:p>None.</text:p>
          </table:table-cell>
          <table:table-cell table:number-columns-repeated="4"/>
          <table:table-cell office:value-type="string">
            <text:p>SIA is a company owned (as of Feb 99) by Bank of Italy (Italy's Central Bank) and\nthe Association of Italian Bankers (ABI), plus a number of other banks. <text:s/>SIA's\nmission is that of delivering infrastructural data transportation security and\nprocessing services to the whole community of Italian banks and financial\ncompanies. <text:s/>SIA runs the Italian national interbank network and the gateway to the\nSWIFT international network; SIA develops and manages the applications and\nsystems supporting electronic financial markets for the negotiation of government\nbonds and derivatives. <text:s/>SIA, also runs the Root CA (ISO 9594-8 certification\nauthority) within the Italian bankers' public key infrastructure (PKI). <text:s/>For more\ninformation please visit SIA's web site at http://www.sia.it</text:p>
          </table:table-cell>
          <table:table-cell/>
          <table:table-cell office:value-type="string">
            <text:p>The code is primarily intended for the registration of Object Identifiers according to\nISO 8824/8825: Level 1: iso (1), Level 2: identified-organization (3), Level 3: SIA SpA\n(0135), Level 4: and higher: (defined by SIA conventions), The contact person is Ing.\nAdriano Santoni (email: santoni@sia.it)</text:p>
          </table:table-cell>
          <table:table-cell office:value-type="string">
            <text:p>UNI, Ente Nazionale Italiano di Unificazione, Via Battistotti Sassi 11/B, Milan I-\n20133, Italy, Tel: +39-02-70024-1, Fax: +39-02-70106149, Contact person: Mr. Mike\nGanoza (e-mail: mike.ganoza@uni.unicei.it)</text:p>
          </table:table-cell>
          <table:table-cell table:style-name="ce4" office:value-type="string">
            <text:p>Mar 199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6">
            <text:p>136</text:p>
          </table:table-cell>
          <table:table-cell table:style-name="ce4" office:value-type="string">
            <text:p>true</text:p>
          </table:table-cell>
          <table:table-cell table:number-columns-repeated="2" office:value-type="string">
            <text:p>Cable &amp; Wireless Global ATM End-System Address Plan</text:p>
          </table:table-cell>
          <table:table-cell/>
          <table:table-cell office:value-type="string">
            <text:p>Cable &amp; Wireless Global Business Inc. <text:s/>8230 Boon Boulevard, Vienna, Virginia\n22182, USA</text:p>
          </table:table-cell>
          <table:table-cell office:value-type="string">
            <text:p>1) ICD 4 digits, 2)</text:p>
          </table:table-cell>
          <table:table-cell office:value-type="string">
            <text:p>None</text:p>
          </table:table-cell>
          <table:table-cell table:number-columns-repeated="4"/>
          <table:table-cell office:value-type="string">
            <text:p>Cable &amp; Wireless global group of companies (including but not limited to: CWC in the\nUK, CWUSA in the USA, Hong Kong Telecom in Hong Kong, CW OPTUS in</text:p>
          </table:table-cell>
          <table:table-cell/>
          <table:table-cell office:value-type="string">
            <text:p>The code will be used in the provision of a consistent global plan for the generation of\nATM AESA addresses across the Cable &amp; Wireless group of companies. <text:s/>The plan\nwill be utilised internal to Cable &amp; Wireless and to provide customers with non-\ngeographic addresses.</text:p>
          </table:table-cell>
          <table:table-cell office:value-type="string">
            <text:p>ANSI</text:p>
          </table:table-cell>
          <table:table-cell table:style-name="ce4" office:value-type="string">
            <text:p>Jun 199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7">
            <text:p>137</text:p>
          </table:table-cell>
          <table:table-cell table:style-name="ce4" office:value-type="string">
            <text:p>true</text:p>
          </table:table-cell>
          <table:table-cell table:number-columns-repeated="2" office:value-type="string">
            <text:p>Global AESA scheme</text:p>
          </table:table-cell>
          <table:table-cell office:value-type="string">
            <text:p>Construct and Administer AESAs, Routing of ATM switched connections</text:p>
          </table:table-cell>
          <table:table-cell office:value-type="string">
            <text:p>Global One, Park Atrium, Rue des Colonies, 11, B-1000 Brussels, Belgium, Tel +\n322 545 2000 Fax + 322 545 2005</text:p>
          </table:table-cell>
          <table:table-cell office:value-type="string">
            <text:p>1) Field, 1 Authority and Format Identifier, 2 ICD, 3 Higher Order Domain Specific\nPart Assigned by Global One</text:p>
          </table:table-cell>
          <table:table-cell table:number-columns-repeated="2" office:value-type="string">
            <text:p>As specified by ATM Forum User Specification Version 4.0 &amp; 3.1</text:p>
          </table:table-cell>
          <table:table-cell office:value-type="string">
            <text:p>English</text:p>
          </table:table-cell>
          <table:table-cell office:value-type="string">
            <text:p>Upon agreement or per request of the specific organisation</text:p>
          </table:table-cell>
          <table:table-cell office:value-type="string">
            <text:p>The minimum period elapsed will depend on the terms of agreement with the specific\norganisation and will be determined, taking into account the technical, <text:s/>administrative\nand regulatory issues. <text:s/>It is expected to vary from an hour up to six months.</text:p>
          </table:table-cell>
          <table:table-cell office:value-type="string">
            <text:p>Any organisation or company that utilises Global One's ATM Services worldwide\nGlobal one national and international switching equipment</text:p>
          </table:table-cell>
          <table:table-cell office:value-type="string">
            <text:p>Use to from globally unique Global One ICD AESAs</text:p>
          </table:table-cell>
          <table:table-cell/>
          <table:table-cell office:value-type="string">
            <text:p>Association Frances de Normalisation (AFNOR) - FRANCE</text:p>
          </table:table-cell>
          <table:table-cell table:style-name="ce4" office:value-type="string">
            <text:p>Dec 199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8">
            <text:p>138</text:p>
          </table:table-cell>
          <table:table-cell table:style-name="ce4" office:value-type="string">
            <text:p>true</text:p>
          </table:table-cell>
          <table:table-cell table:number-columns-repeated="2" office:value-type="string">
            <text:p>France Telecom ATM End System Address Plan</text:p>
          </table:table-cell>
          <table:table-cell office:value-type="string">
            <text:p>The coding system will be used to provide ATM End System Addresses based on\nICD format NSAP addresses. <text:s/>These addresses will be used to uniquely identify User\nNetwork Interfaces to ATM networks as specified by the ATM Forum UNI\nspecifications. <text:s/>France telecom will also use these addresses Internally and to\nprovide worldwide customers with non- Geographic private AESAs. <text:s/>These global\naddresses should be Reachable by non-France Telecom ATM users via\nInterconnecting ATM carriers.</text:p>
          </table:table-cell>
          <table:table-cell office:value-type="string">
            <text:p>France Telecom, BRX/DAP/AFC, 6 place d'Alleray, 75505 Paris Cedex 15, France,\nTel + 331 4444 2775 Fax + 331 4444 2437, e-mail: alain.bidron@francetelecom.fr</text:p>
          </table:table-cell>
          <table:table-cell office:value-type="string">
            <text:p>Field, #bytes, Name; 1, 1, Authority and Format Identifier (0x47); 2, 2, ICD; 3, 10,\nHigher Order Domain Specific Part (administered by France Telecom; 4, 6, End\nSystem Identifier (End user field); 5, 1, Selector (End user field)</text:p>
          </table:table-cell>
          <table:table-cell office:value-type="string">
            <text:p>None- all fields are left justified</text:p>
          </table:table-cell>
          <table:table-cell office:value-type="string">
            <text:p>Fields are binary encoded. <text:s/>For a field of length N, the range will be from 0 to 2N-1</text:p>
          </table:table-cell>
          <table:table-cell office:value-type="string">
            <text:p>English</text:p>
          </table:table-cell>
          <table:table-cell office:value-type="string">
            <text:p>No</text:p>
          </table:table-cell>
          <table:table-cell office:value-type="string">
            <text:p>Technically one hour; administratively three weeks ageing period</text:p>
          </table:table-cell>
          <table:table-cell office:value-type="string">
            <text:p>These addresses will be used to uniquely identify User Network Interfaces to ATM\nnetworks as specified by ATM ForumUNI specifications. <text:s/>France Telecom will also\nuse these addresses internally and to provide worldwide customers with non-\ngeographic private AESAs.</text:p>
          </table:table-cell>
          <table:table-cell office:value-type="string">
            <text:p>The ICD Code will also form part of the Initial Domain Part of the OSI network\naddressing as specified in Addendum 2 to ISO 8348</text:p>
          </table:table-cell>
          <table:table-cell/>
          <table:table-cell office:value-type="string">
            <text:p>Association Frances de Normalisation (AFNOR) - FRANCE</text:p>
          </table:table-cell>
          <table:table-cell table:style-name="ce4" office:value-type="string">
            <text:p>Dec 1999</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39">
            <text:p>139</text:p>
          </table:table-cell>
          <table:table-cell table:style-name="ce4" office:value-type="string">
            <text:p>true</text:p>
          </table:table-cell>
          <table:table-cell table:number-columns-repeated="2" office:value-type="string">
            <text:p>Savvis Communications AESA:.</text:p>
          </table:table-cell>
          <table:table-cell office:value-type="string">
            <text:p>Global Addressing of Savvis ATM Switches and any direct customer ATM networks\nfor implementation of PNNI</text:p>
          </table:table-cell>
          <table:table-cell office:value-type="string">
            <text:p>Savvis Communications, Contact: Gary Rubel, 717 Office Parkway, St Louis, MO\n63141-7115, Tel: - +314-468-4104 (Direct), +314-468-7030 (Main), Fax: - +314-468-\n7050</text:p>
          </table:table-cell>
          <table:table-cell office:value-type="string">
            <text:p>First Field = ICD (0x47), Second Field = Domain Specific Part (0x124), Third Field =\nOrganisation ID (3 bytes), Fourth Field = Domain Specific Part (7 bytes), The Domain\nSpecific will be used to for assigning ATM, Addresses according to ATM Forum\nUNI3.1/4.0 and PNNI 1.0, Specifications</text:p>
          </table:table-cell>
          <table:table-cell office:value-type="string">
            <text:p>None</text:p>
          </table:table-cell>
          <table:table-cell table:number-columns-repeated="4"/>
          <table:table-cell office:value-type="string">
            <text:p>Any Savvis ATM network element needing ATM addresses as well as customer\ndevices requiring AESAs. <text:s/>Savvis has network POPs in the US and Europe and will\nbe expanding to Asia.</text:p>
          </table:table-cell>
          <table:table-cell office:value-type="string">
            <text:p>Used to form a globally unique Savvis ICD ATM End System Address</text:p>
          </table:table-cell>
          <table:table-cell/>
          <table:table-cell office:value-type="string">
            <text:p>American National Standards Institute (ANSI) - USA</text:p>
          </table:table-cell>
          <table:table-cell table:style-name="ce4" office:value-type="string">
            <text:p>Jan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0">
            <text:p>140</text:p>
          </table:table-cell>
          <table:table-cell table:style-name="ce4" office:value-type="string">
            <text:p>true</text:p>
          </table:table-cell>
          <table:table-cell table:number-columns-repeated="2" office:value-type="string">
            <text:p>Toshiba Organizations, Partners, And Suppliers' (TOPAS) Code</text:p>
          </table:table-cell>
          <table:table-cell office:value-type="string">
            <text:p>The purpose of this coding system is to identify organizations world-wide that have\nbusiness or technical transactions with Toshiba Corporation in terms of ISO 13584\nParts Library standard based electronic catalogue interchange service. <text:s/>The\ninterchange is not limited to those between a member organization and Toshiba\nCorporation. <text:s/>Interchanges between member organizations based on the organization\nidentifier of this coding system are also in scope. Reference to this organization\nidentification code in other business transactions is also allowed</text:p>
          </table:table-cell>
          <table:table-cell office:value-type="string">
            <text:p>Toshiba Corporation, 1-1 Shibaura, 1-Chome, Minato-Ku, Tokyo, 105-8001, Japan.\nRequest for a TOPAS Code, Attention to: TOPAS Administration, Technology\nPlanning, Division, Person Responsible: Dr. <text:s/>Akinobu Kasami, Corporate Executive\nVice President and Director, Contact Person for this application and technical\nissues: Mr. Hiroshi Murayama, Human Interface Laboratory, Toshiba Corporate\nResearch and Development Centre, Address: 1, Komukai Toshiba-cho, Saiwai-ku,\nKawasaki-shi, 212-8582, Japan, Email: hiroshi.murayama@toshiba.co.jp, TEL :(+81)\n44-549-2397 FAX: (+81) 44-520-1308</text:p>
          </table:table-cell>
          <table:table-cell office:value-type="string">
            <text:p>1. ICD 4 digits, Organization Identifier, Organization Part Identifier, 4. <text:s/>OPIS -----1\ncharacter, 1) Up to 35 characters. <text:s/>2) No check character required</text:p>
          </table:table-cell>
          <table:table-cell office:value-type="string">
            <text:p>No display requirement</text:p>
          </table:table-cell>
          <table:table-cell office:value-type="string">
            <text:p>ISO10646: cells 00 to 7F of row 00 of plane 00 of group 00 i.e. <text:s/>identical to\n"EXPRESS characters set" defined in ISO-10303 -11 "The EXPRESS Language\nReference Manual", section 7.1</text:p>
          </table:table-cell>
          <table:table-cell office:value-type="string">
            <text:p>English, Japanese, French</text:p>
          </table:table-cell>
          <table:table-cell office:value-type="string">
            <text:p>It supports organization parts</text:p>
          </table:table-cell>
          <table:table-cell office:value-type="string">
            <text:p>1 day after the withdrawal</text:p>
          </table:table-cell>
          <table:table-cell office:value-type="string">
            <text:p>1) Organizations in the world that have business or technical transactions with\nToshiba Corporation and registered as member organizations of the coding system\nfor ISO 13584 Parts Library standard based electronic data interchange, 2) Toshiba\nCorporation and its affiliates world-wide</text:p>
          </table:table-cell>
          <table:table-cell office:value-type="string">
            <text:p>Reference to this organization identifier in other business transactions is also\npossible provided the organizations concerned are registered as members of the</text:p>
          </table:table-cell>
          <table:table-cell office:value-type="string">
            <text:p>TOPAS may be construed as "Toshiba Organizations, Partners, and Suppliers",\npreferred to be pronounces as "topaz [topa:z]"</text:p>
          </table:table-cell>
          <table:table-cell office:value-type="string">
            <text:p>ISO TC184/SC4 Secretariat is at: National Institute Of Standards and Technology,\n100 Bureau Drive, Gaithersburg, MD 20899-0001,USA. <text:s/>For this application contact\nto: SC4 Chair: Mr. <text:s/>Richard Wandmacher, adr: General Motors, Mail Code: 483-616-\n705, 16 East Judson Street, Pontiac, MI 48232-2205,USA,\ndick.wandmacher@gm.com &lt;dick.wandmacher@gm.com&gt;</text:p>
          </table:table-cell>
          <table:table-cell table:style-name="ce4" office:value-type="string">
            <text:p>Jan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1">
            <text:p>141</text:p>
          </table:table-cell>
          <table:table-cell table:style-name="ce4" office:value-type="string">
            <text:p>true</text:p>
          </table:table-cell>
          <table:table-cell table:number-columns-repeated="2" office:value-type="string">
            <text:p>NATO Commercial and Government Entity system</text:p>
          </table:table-cell>
          <table:table-cell office:value-type="string">
            <text:p>To identify all Commercial and Governmental entities that provide material and/or\nservices to the Armed Forces of the NATO nations and several non-NATO nations\n(Sponsored) around the world. This information is used by NATO and Sponsored\nnations' Logisticians to identify Commercial and Government Entities they deal with.\nThis Information is used by all functions of Logistics support such as Acquisition,\nSourcing, EDI, Re-Provisioning, Material Management, etc.</text:p>
          </table:table-cell>
          <table:table-cell office:value-type="string">
            <text:p>NATO Group of National Director on Codification (AC/135), NATO Maintenance and\nSupply Agency, 11 Rue de la Gare, L-8302 Capellen, G. <text:s/>D. Luxembourg, Attn:\nSecretary to AC/145, LZ-C Programme</text:p>
          </table:table-cell>
          <table:table-cell office:value-type="string">
            <text:p>1) This code consists of: Three alpha and/or numeric characters prefixed and suffixed\nby a numeral, for Canada and the United States, or: Three alpha and/or numeric\ncharacters either prefixed by one significant alpha character and suffixed by one\nnumeral or suffixed by one significant alpha character and prefixed by one numeral\nfor the other user countries/organizations. <text:s/>2) None</text:p>
          </table:table-cell>
          <table:table-cell office:value-type="string">
            <text:p>None</text:p>
          </table:table-cell>
          <table:table-cell office:value-type="string">
            <text:p>The NCAGE Code is limited to alphabetic (A-Z) and numeric (0-9) characters. <text:s/>The\nNCAGE Code is of fixed length.</text:p>
          </table:table-cell>
          <table:table-cell office:value-type="string">
            <text:p>Usually English or French but could be the language of any of the user nations.</text:p>
          </table:table-cell>
          <table:table-cell office:value-type="string">
            <text:p>The NCAGE system does not support identification of organization parts.</text:p>
          </table:table-cell>
          <table:table-cell office:value-type="string">
            <text:p>NCAGE codes are not reused once assigned.</text:p>
          </table:table-cell>
          <table:table-cell office:value-type="string">
            <text:p>The following types of organizations/functions are eligible for NCAGE Code\nassignment; however a NCAGE Code should not be assigned unless it is required:\nManufacturing organizations that are obtained. <text:s/>Government or commercial\norganizations that control the design of items but not necessarily manufacture nor\nsell them directly. <text:s/>Manufacturing organizations that produce items of industrial\nproduction equipment and whose items are published in industrial plant equipment\nhandbooks. <text:s/>Distributors who are sources of supply in their own country for items\nproduced by manufacturers located in their own or in any foreign country.\nGovernment agencies that manufacture items entering the supply system of an\nindividual NATO country or control the design of such items without actually\nmanufacturing them. <text:s/>Manufacturers who supply materials for incorporation into the\nproducts of manufacturers who provide drawings of these products. <text:s/>Organizations\nconnected with the development of national or international standards / specifications\nor related documents. <text:s/>NATO Production or Logistics Organizations- NPLO- or\nNATO Agencies who act as design activities and provide standards, specifications or\ndrawings containing information qualified for item identification purpose. <text:s/>Providers of\nservice working in the field of logistics (repair shops, carriers...) but not providing\nitems of production they referenced in their system.</text:p>
          </table:table-cell>
          <table:table-cell office:value-type="string">
            <text:p>Determination of the real source for an item of supply is one of the most important\nprerequisites for proper application of the Uniform System of Item Identification within\nNATO. <text:s/>It is the source where documentation will be obtained from and its location\nnormally gives advice for codification responsibility. <text:s/>Within the NATO Codification\nSystem the term Manufacturer covers the whole range of possible sources of\ntechnical data for items entering the supply chains or participating, countries. <text:s/>The\nprimary use of manufacturers coding is in ADP operations related to support\nmanagement programs such as material management codification, standardization,\netc.</text:p>
          </table:table-cell>
          <table:table-cell office:value-type="string">
            <text:p>- NCAGE; - NATO Code of Manufacturers</text:p>
          </table:table-cell>
          <table:table-cell office:value-type="string">
            <text:p>ISO/TC 184/SC 4</text:p>
          </table:table-cell>
          <table:table-cell table:style-name="ce4" office:value-type="string">
            <text:p>Mar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2">
            <text:p>142</text:p>
          </table:table-cell>
          <table:table-cell table:style-name="ce4" office:value-type="string">
            <text:p>true</text:p>
          </table:table-cell>
          <table:table-cell table:number-columns-repeated="2" office:value-type="string">
            <text:p>SECETI Object Identifiers</text:p>
          </table:table-cell>
          <table:table-cell office:value-type="string">
            <text:p>The function as the 'Application Centre' for the Italian National Interbank Network,\nhaving been authorized by the Bank of Italy, and the Italian Banking Association to\noperate in that capacity. <text:s/>The scheme is intended for the registration of object\nidentifiers according to ISO 8824 and ISO 8825</text:p>
          </table:table-cell>
          <table:table-cell office:value-type="string">
            <text:p>Servizi Centralizzati SECETI S.p.A. <text:s/>Via Zurigo, 3-20147 Milano, ITALY, Tel: +39-02-\n48310.1, Fax: +39-02-48310206</text:p>
          </table:table-cell>
          <table:table-cell office:value-type="string">
            <text:p>1) First field: ICD: 4 digits, Second field: sequence of digits</text:p>
          </table:table-cell>
          <table:table-cell office:value-type="string">
            <text:p>None</text:p>
          </table:table-cell>
          <table:table-cell table:number-columns-repeated="4"/>
          <table:table-cell office:value-type="string">
            <text:p>SECETI S.p.A.- 100% owned by the Central Institute of Italian Popular Banks - is a\nleading company fully entitled by the Bank of Italy and the Italian Banking\nAssociation to operate as 'Application Centre' of the National Interbank Network. <text:s/>As\nsuch, SECETI provides a very extensive range of specialized services to the Italian\nbanks running, for about 200 of them, direct connections to the bank system\nprocedures (payments, check truncation, debit/credit cards processing,...). <text:s/>These\nservices include outsourcing services and, for most of their corporate customers,\nhigh security centralized links to the whole bank system. <text:s/>SECETI is the Italian\nleading supplier of specialized software Products which allow banks full\naccomplishment of both Bank of Italy and European Central Bank norms and\nregulations, monitoring and surveillance. <text:s/>Web site at http:www.seceti.it</text:p>
          </table:table-cell>
          <table:table-cell office:value-type="string">
            <text:p>The code is primarily intended for the registration of Object Identifiers according to\nISO 8824/8825, Level 1: ISO (), Level 2: identified -organization (), Level 3: SECETI\nS.p.A. (), Level 4: and higher: (defined by SECETI conventions), The contact person\nis Dr. Elvezio Montesarchio, e-mail: elvezio.montesarchio@seceti.it</text:p>
          </table:table-cell>
          <table:table-cell/>
          <table:table-cell office:value-type="string">
            <text:p>UNI, Ente Nazionale Italiano di Unificazione, Via Battistotti Sassi 11/B, Milan I-\n20133, Italy, Tel: +39-02-70024 399, Fax: +39-02-70106149, Contact person: Mr.\nMike Ganoza, (e-mail: mike.ganoza@uni.unicei.it)</text:p>
          </table:table-cell>
          <table:table-cell table:style-name="ce4" office:value-type="string">
            <text:p>Mar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3">
            <text:p>143</text:p>
          </table:table-cell>
          <table:table-cell table:style-name="ce4" office:value-type="string">
            <text:p>true</text:p>
          </table:table-cell>
          <table:table-cell table:number-columns-repeated="2" office:value-type="string">
            <text:p>EINESTEINet AG</text:p>
          </table:table-cell>
          <table:table-cell office:value-type="string">
            <text:p>Initially the Network covers the geographical area of Germany with the intention of\nexpanding into all the European countries</text:p>
          </table:table-cell>
          <table:table-cell office:value-type="string">
            <text:p>EINSTEINet AG, Ramskamt 71-75, 25337 Elmshorn, Germany, Contact: Jörg Peeck\nor Michael Wiesmann, Tel: + 49 4121 403 000, Email: j.peeck@einstenet.de /\nm.wiesmeann@einsteinet.de</text:p>
          </table:table-cell>
          <table:table-cell office:value-type="string">
            <text:p>2 digit authority and format identifier X'47', 2 digit authority and format identifier, 4\ndigit international code designator (ICD), 20 digit domain definition based upon\ngeographic location, No check characters</text:p>
          </table:table-cell>
          <table:table-cell office:value-type="string">
            <text:p>No display requirements</text:p>
          </table:table-cell>
          <table:table-cell office:value-type="string">
            <text:p>The letters a to z, the digits 0 to 9</text:p>
          </table:table-cell>
          <table:table-cell office:value-type="string">
            <text:p>English</text:p>
          </table:table-cell>
          <table:table-cell office:value-type="string">
            <text:p>None</text:p>
          </table:table-cell>
          <table:table-cell office:value-type="string">
            <text:p>The minimum period elapsed will depend on the terms of of agreement with the\nspecific organization and will be determined by the technical and administrative\nissues. It is expected to vary from one week to six months.</text:p>
          </table:table-cell>
          <table:table-cell office:value-type="string">
            <text:p>EINSTEINet's objective is to become the first Application Service Provider serving the\nmiddle size companies in Germany and then expand throughout Europe.</text:p>
          </table:table-cell>
          <table:table-cell office:value-type="string">
            <text:p>EINSTEINet's goal is to provide Application Services using an ATM network to\ncustomers located throughout Europe. <text:s/>The need for the international ATM address\nstructure is to serve EINSTENet's customers with consistent ATM addresses from\nend-to-end.</text:p>
          </table:table-cell>
          <table:table-cell/>
          <table:table-cell office:value-type="string">
            <text:p>Deutsches Institut Für Normung e.V. <text:s/>(DIN)</text:p>
          </table:table-cell>
          <table:table-cell table:style-name="ce4" office:value-type="string">
            <text:p>Aug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4">
            <text:p>144</text:p>
          </table:table-cell>
          <table:table-cell table:style-name="ce4" office:value-type="string">
            <text:p>true</text:p>
          </table:table-cell>
          <table:table-cell table:number-columns-repeated="2" office:value-type="string">
            <text:p>DoDAAC (Department of Defense Activity Address Code)</text:p>
          </table:table-cell>
          <table:table-cell office:value-type="string">
            <text:p>A code assigned to uniquely identify all military units in the United States\nDepartment of Defense.</text:p>
          </table:table-cell>
          <table:table-cell office:value-type="string">
            <text:p>DoD (Unites States Department of Defense), Defense Logistics Management\nStandards Office, DLMSO (J-763), Suite 1834, 8725 John J. <text:s/>Kingman Road, Fort\nBelvoir, VA 22060-6217, USA, Contact: Mr Jackie Carter, Tel: +1 703 767 0684 fax:\n+1 703 767 0161, e-mail: jackie_carter@dlmso.hq.dla.mil</text:p>
          </table:table-cell>
          <table:table-cell office:value-type="string">
            <text:p>1) 6 alphanumeric character string. <text:s/>No significance is applied to any character in the\nstring, 2) None</text:p>
          </table:table-cell>
          <table:table-cell office:value-type="string">
            <text:p>Single group of six characters</text:p>
          </table:table-cell>
          <table:table-cell/>
          <table:table-cell office:value-type="string">
            <text:p>English</text:p>
          </table:table-cell>
          <table:table-cell table:number-columns-repeated="2"/>
          <table:table-cell office:value-type="string">
            <text:p>All military units in the United States Department of Defense</text:p>
          </table:table-cell>
          <table:table-cell office:value-type="string">
            <text:p>None</text:p>
          </table:table-cell>
          <table:table-cell/>
          <table:table-cell office:value-type="string">
            <text:p>Logistics Management Institute, 2000 Corporate Ridge, McLean, VA 22102-78025,\nUSA, Contact: Paul Jensen, Tel: +1 703 917 7164, Fax: +1 703 917 7518, E-mail:\npjensen@lml.org</text:p>
          </table:table-cell>
          <table:table-cell table:style-name="ce4" office:value-type="string">
            <text:p>Sep 2000</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45">
            <text:p>145</text:p>
          </table:table-cell>
          <table:table-cell table:style-name="ce4" office:value-type="string">
            <text:p>false</text:p>
          </table:table-cell>
          <table:table-cell office:value-type="string">
            <text:p>DGCP (Direction Gnrale de la Comptabilit Publique)administrative accounting identification scheme</text:p>
          </table:table-cell>
          <table:table-cell office:value-type="string">
            <text:p>DGCP (Direction Générale de la Comptabilité Publique)administrative accounting\nidentification scheme</text:p>
          </table:table-cell>
          <table:table-cell office:value-type="string">
            <text:p>Code assigned by the French public accounting office</text:p>
          </table:table-cell>
          <table:table-cell office:value-type="string">
            <text:p>DGCP (Direction Générale de la Comptabilité Publique), 139 Rue de Bercy, 75572\nParis Cedex 12, France</text:p>
          </table:table-cell>
          <table:table-cell office:value-type="string">
            <text:p>1) 10 characters, first 4 characters are 'DCGP' following by 6 digits to identify an\nadministrative accounting unit, 2) None</text:p>
          </table:table-cell>
          <table:table-cell office:value-type="string">
            <text:p>Single group of ten characters</text:p>
          </table:table-cell>
          <table:table-cell/>
          <table:table-cell office:value-type="string">
            <text:p>French</text:p>
          </table:table-cell>
          <table:table-cell table:number-columns-repeated="2"/>
          <table:table-cell office:value-type="string">
            <text:p>Covers all administrative units of the Direction Générale de la Comptabilité Publique</text:p>
          </table:table-cell>
          <table:table-cell office:value-type="string">
            <text:p>None</text:p>
          </table:table-cell>
          <table:table-cell/>
          <table:table-cell office:value-type="string">
            <text:p>Sema Group/EDIFRANCE, 16 rue Barbés, 92126 Montrouge Cedex, France,\nContact: Mr Mike Conroy, Tel: +331 6987 7699, Fax: +331 6987 9642, E-mail:\nmichael.convoy@wanadoo.fr</text:p>
          </table:table-cell>
          <table:table-cell table:style-name="ce4" office:value-type="string">
            <text:p>Sep 2000</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46">
            <text:p>146</text:p>
          </table:table-cell>
          <table:table-cell table:style-name="ce4" office:value-type="string">
            <text:p>false</text:p>
          </table:table-cell>
          <table:table-cell office:value-type="string">
            <text:p>DGI (Direction Gnrale des Impots) code</text:p>
          </table:table-cell>
          <table:table-cell office:value-type="string">
            <text:p>DGI (Direction Générale des Impots) code</text:p>
          </table:table-cell>
          <table:table-cell office:value-type="string">
            <text:p>French taxation authority</text:p>
          </table:table-cell>
          <table:table-cell office:value-type="string">
            <text:p>DGI (Direction Générale des Impots), Bureau G2, Teledoc 971, 92 Allee de Bercy,\n75574 Paris Cedex 12, France</text:p>
          </table:table-cell>
          <table:table-cell office:value-type="string">
            <text:p>Various structures, 1) Dependant on structure, 2) None</text:p>
          </table:table-cell>
          <table:table-cell office:value-type="string">
            <text:p>Dependant on structure</text:p>
          </table:table-cell>
          <table:table-cell/>
          <table:table-cell office:value-type="string">
            <text:p>French</text:p>
          </table:table-cell>
          <table:table-cell table:number-columns-repeated="2"/>
          <table:table-cell office:value-type="string">
            <text:p>Any taxpayer in France</text:p>
          </table:table-cell>
          <table:table-cell office:value-type="string">
            <text:p>None</text:p>
          </table:table-cell>
          <table:table-cell/>
          <table:table-cell office:value-type="string">
            <text:p>EDIFICAS, 153 rue de Courcelles, F 75017 Paris, France, Contact: Mr Michel\nLesourd, Tel: +331 4415 6000, Fax: +331 4415 9005, E-mail: mlesourd@wanadoo.fr</text:p>
          </table:table-cell>
          <table:table-cell table:style-name="ce4" office:value-type="string">
            <text:p>Sep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7">
            <text:p>147</text:p>
          </table:table-cell>
          <table:table-cell table:style-name="ce4" office:value-type="string">
            <text:p>true</text:p>
          </table:table-cell>
          <table:table-cell table:number-columns-repeated="2" office:value-type="string">
            <text:p>Standard Company Code</text:p>
          </table:table-cell>
          <table:table-cell office:value-type="string">
            <text:p>Partner identification code which is registered with JIPDEC.</text:p>
          </table:table-cell>
          <table:table-cell office:value-type="string">
            <text:p>JIPDEC\nRoppongi First Building, 9-9 Roppongi 1-chome, Minato-ku\nTokyo,\n106-0032 Japan\nPhone: +81-3-5860-7551\nFacsimile: +81-3-5573-0560\ne-mail: kcode@jipdec.or.jp</text:p>
          </table:table-cell>
          <table:table-cell/>
          <table:table-cell office:value-type="string">
            <text:p>12 characters preceded with 4 digit ICD code</text:p>
          </table:table-cell>
          <table:table-cell office:value-type="string">
            <text:p>Numeric characters (0,1,2,3,4,5,6,7,8,9) and/or upper-case,\nalphabetic characters</text:p>
          </table:table-cell>
          <table:table-cell office:value-type="string">
            <text:p>Japanese</text:p>
          </table:table-cell>
          <table:table-cell office:value-type="string">
            <text:p>Standard Company Code includes provisions for organization part\n(department, division, branch, etc.)</text:p>
          </table:table-cell>
          <table:table-cell office:value-type="string">
            <text:p>6 years</text:p>
          </table:table-cell>
          <table:table-cell office:value-type="string">
            <text:p>Joint stock corporation (Company), Incorporated company\n(Limited), Limited partnership, Unlimited partnership, Juridical\nfoundation, Corporate body, Medical corporation, Educational,\ninstitution, Religious body, Co-operative, Local public body,\nGovernmental organization</text:p>
          </table:table-cell>
          <table:table-cell office:value-type="string">
            <text:p>None</text:p>
          </table:table-cell>
          <table:table-cell office:value-type="string">
            <text:p>JIPDEC code</text:p>
          </table:table-cell>
          <table:table-cell office:value-type="string">
            <text:p>JIPDEC\nRoppongi First Building, 9-9 Roppongi 1-chome, Minato-ku\nTokyo,\n106-0032 Japan\nPhone: +81-3-5860-7551\nFacsimile: +81-3-5573-0560\ne-mail: kcode@jipdec.or.jp</text:p>
          </table:table-cell>
          <table:table-cell office:value-type="string">
            <text:p>2000-09</text:p>
          </table:table-cell>
          <table:table-cell office:value-type="string">
            <text:p>Updated issuing organization contact info</text:p>
          </table:table-cell>
          <table:table-cell/>
          <table:table-cell office:value-type="string">
            <text:p>12 characters (fixed length), First 6 characters identify an\norganization, Last 6 characters identify an organization part\nNone.</text:p>
          </table:table-cell>
          <table:table-cell office:value-type="string">
            <text:p>2022-09-07 02:15:05 UTC</text:p>
          </table:table-cell>
          <table:table-cell table:style-name="ce3" table:number-columns-repeated="16363"/>
        </table:table-row>
        <table:table-row table:style-name="ro1">
          <table:table-cell office:value-type="float" office:value="148">
            <text:p>148</text:p>
          </table:table-cell>
          <table:table-cell table:style-name="ce4" office:value-type="string">
            <text:p>false</text:p>
          </table:table-cell>
          <table:table-cell office:value-type="string">
            <text:p>ITU (International Telecommunications Union)Data Network Identification Codes (DNIC)</text:p>
          </table:table-cell>
          <table:table-cell office:value-type="string">
            <text:p>ITU (International Telecommunications Union)Data Network Identification Codes\n(DNIC)</text:p>
          </table:table-cell>
          <table:table-cell office:value-type="string">
            <text:p>Data Network Identification Codes assigned by the ITU.</text:p>
          </table:table-cell>
          <table:table-cell office:value-type="string">
            <text:p>ITU (International Telecommunications Union), Telecommunication Standardization\nBureau (TSB), Place des Nations, CH-1211 Geneva 20, Switzerland Tel: +4122 730\n5222, Fax: +4122 730 5853, E-mail: geng-sheng.li@itu.int, Web: www.itu.int,\nwww.itu.int/itudoc/itu-t/ob-lists</text:p>
          </table:table-cell>
          <table:table-cell office:value-type="string">
            <text:p>1) 4 numeric digits, First three digits represent the country, Fourth digit represents\nthe actual data network within the Country (for countries with many public networks\nmultiple country codes exist). <text:s/>Up to 10 additional characters can be appended by\nthe individual data networks to specify a network address within their network. <text:s/>2)</text:p>
          </table:table-cell>
          <table:table-cell office:value-type="string">
            <text:p>Two groups, Group 1 = three digits, Group 2 = one digit</text:p>
          </table:table-cell>
          <table:table-cell/>
          <table:table-cell office:value-type="string">
            <text:p>English</text:p>
          </table:table-cell>
          <table:table-cell table:number-columns-repeated="2"/>
          <table:table-cell office:value-type="string">
            <text:p>Any organisation connected to a public data network (such as X.25 packet switching\nnetwork).</text:p>
          </table:table-cell>
          <table:table-cell office:value-type="string">
            <text:p>None</text:p>
          </table:table-cell>
          <table:table-cell/>
          <table:table-cell office:value-type="string">
            <text:p>Logistics Management Institute, 2000 Corporate Ridge, McLean, VA 22102-78025,\nUSA, Contact: Paul Jensen, Tel: +1 703 917 7164, Fax: +1 703 917 7518, E-mail:\npjensen@lml.org</text:p>
          </table:table-cell>
          <table:table-cell table:style-name="ce4" office:value-type="string">
            <text:p>Sep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49">
            <text:p>149</text:p>
          </table:table-cell>
          <table:table-cell table:style-name="ce4" office:value-type="string">
            <text:p>true</text:p>
          </table:table-cell>
          <table:table-cell table:number-columns-repeated="2" office:value-type="string">
            <text:p>Global Business Identifier</text:p>
          </table:table-cell>
          <table:table-cell office:value-type="string">
            <text:p>For a company's ability to obtain complete and accurate information about potential\nsuppliers</text:p>
          </table:table-cell>
          <table:table-cell office:value-type="string">
            <text:p>ResolveNet (IOM) Ltd, Atlantic House, 2nd Floor, Circular Road, Douglas, Isle of Man\nIMI ISQ, UK, Laura J Jany, Tel: 001 610 625 4160 Fax; 001 610 625 4180</text:p>
          </table:table-cell>
          <table:table-cell office:value-type="string">
            <text:p>9999-9999-9999, 1) 12 Characters; no significance, 2) There are no check characters</text:p>
          </table:table-cell>
          <table:table-cell office:value-type="string">
            <text:p>9999-9999-999</text:p>
          </table:table-cell>
          <table:table-cell office:value-type="string">
            <text:p>0-9 for all 12 characters</text:p>
          </table:table-cell>
          <table:table-cell office:value-type="string">
            <text:p>English</text:p>
          </table:table-cell>
          <table:table-cell office:value-type="string">
            <text:p>No</text:p>
          </table:table-cell>
          <table:table-cell office:value-type="string">
            <text:p>25 years</text:p>
          </table:table-cell>
          <table:table-cell office:value-type="string">
            <text:p>All organization of one or more individuals that sells goods or services</text:p>
          </table:table-cell>
          <table:table-cell office:value-type="string">
            <text:p>Used to identify and designate in electronic commerce</text:p>
          </table:table-cell>
          <table:table-cell office:value-type="string">
            <text:p>GBI</text:p>
          </table:table-cell>
          <table:table-cell office:value-type="string">
            <text:p>EDIRA Association, c/o Zurich Chamber of Commerce, Bleicherweg 5- Box 4031,\nCH-8022 Zurich, Tel: +41 1 217 4050 Fax: +41 1 217 4051, e-mail:</text:p>
          </table:table-cell>
          <table:table-cell table:style-name="ce4" office:value-type="string">
            <text:p>Oct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0">
            <text:p>150</text:p>
          </table:table-cell>
          <table:table-cell table:style-name="ce4" office:value-type="string">
            <text:p>true</text:p>
          </table:table-cell>
          <table:table-cell table:number-columns-repeated="2" office:value-type="string">
            <text:p>Madge Networks Ltd- ICD ATM Addressing Scheme</text:p>
          </table:table-cell>
          <table:table-cell office:value-type="string">
            <text:p>The code will be used as part of an ATM NSAP addressing scheme for the\nestablishment of PVC and SPVC connections</text:p>
          </table:table-cell>
          <table:table-cell office:value-type="string">
            <text:p>Madge Networks, Wexham Springs, Framewood Road, Wexham, Slough, SL3 6PJ,\nTel: +44 1753 661 575 Fax: + 44 1753 661 114 e-mail: steve.irving@madge.co</text:p>
          </table:table-cell>
          <table:table-cell office:value-type="string">
            <text:p>40 digit ATM NSAP address, 1) Field Digits Purpose, 1 2 AFI (= 47), 2 4 ICD, 3 20\nHO-DSP, 4 12 ESI, 5 2 Selector, 2) None</text:p>
          </table:table-cell>
          <table:table-cell office:value-type="string">
            <text:p>None- fields are left justified</text:p>
          </table:table-cell>
          <table:table-cell/>
          <table:table-cell office:value-type="string">
            <text:p>English</text:p>
          </table:table-cell>
          <table:table-cell office:value-type="string">
            <text:p>Yes</text:p>
          </table:table-cell>
          <table:table-cell office:value-type="string">
            <text:p>10 years</text:p>
          </table:table-cell>
          <table:table-cell office:value-type="string">
            <text:p>The scheme will be used by Madge.web which is a part of Madge Networks providing\nglobal managed networking services</text:p>
          </table:table-cell>
          <table:table-cell office:value-type="string">
            <text:p>Addressing for Madge Networks global ATM network and the connections of any\nMadge Customers requiring the allocation of ATM addresses from Madge Networks.</text:p>
          </table:table-cell>
          <table:table-cell/>
          <table:table-cell office:value-type="string">
            <text:p>IST/6</text:p>
          </table:table-cell>
          <table:table-cell table:style-name="ce4" office:value-type="string">
            <text:p>Oct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1">
            <text:p>151</text:p>
          </table:table-cell>
          <table:table-cell table:style-name="ce4" office:value-type="string">
            <text:p>true</text:p>
          </table:table-cell>
          <table:table-cell table:number-columns-repeated="2" office:value-type="string">
            <text:p>Australian Business Number (ABN) Scheme</text:p>
          </table:table-cell>
          <table:table-cell office:value-type="string">
            <text:p>The ABN will be a unique identifier for a business to interact with Government\n(Commonwealth, State and Local) throughout, Australia and is the supporting\nnumber for the Goods and Service Tax (GST). <text:s/>The Legislation covering the use of\nABN, (see notes on use) will have application throughout the Commonwealth of</text:p>
          </table:table-cell>
          <table:table-cell office:value-type="string">
            <text:p>Australian Taxation Office, 140 Creek Street, Brisbane Q 4000, AUSTRALIA. <text:s/>Postal\nAddress: GPO Box 8022, Brisbane Q 4000, AUSTRALIA</text:p>
          </table:table-cell>
          <table:table-cell office:value-type="string">
            <text:p>The ABN is an 11 digit numeric identifier. <text:s/>The first two digits are check digits\ncalculated using a modulus 89 of the weighted digits. <text:s/>The first digit of the number is\nguaranteed to be non-zero by adding 10 to the modulus (so the first two digits range\nfrom 10 through to 99). <text:s/>For companies the last 9 digits are identical to their existing\nAustralian Company Number (CAN) which includes a single trailing check digit. <text:s/>For\nother entities the digits are randomly allocated but are guaranteed to fail the CAN\ncheck. This allows the Australian Securities and Investment Commission (ASIC) to\ncontinue allocating CAN during a transition period. <text:s/>The valid characters are numeric\ndigits 0-9.</text:p>
          </table:table-cell>
          <table:table-cell office:value-type="string">
            <text:p>It is displayed as follows: -, XX XXX XXX XXX</text:p>
          </table:table-cell>
          <table:table-cell table:number-columns-repeated="4"/>
          <table:table-cell office:value-type="string">
            <text:p>The purpose of the ABN is to uniquely identify business entities in Australia.\nBusiness entities in the scheme include: Organisations incorporated under law\nincluding Companies. <text:s/>Coding Scheme: Unincorporated organisations including\nTrusts, Partnerships, Charities, Unincorporated Associations, Sole Traders and\nGovernment bodies, The ABN will only be allocated to entities who are carrying on an\nenterprise of some form. <text:s/>It will not be allocated to hobbyists for example. The\nprimary application area will be both business to business and business to\ngovernment interactions. <text:s/>The ABN is the identification number to be used for GST\ncompliance of business to business interactions and is required to be quoted on\ninvoices. <text:s/>The ABN will also become the single identifier for business to government\ninteractions providing a one-stop-shop for changes to business identification details.</text:p>
          </table:table-cell>
          <table:table-cell office:value-type="string">
            <text:p>The ABN is established by: A New Tax System (Australian, Business Number) Act\n1999, enacted by the Australian Parliament. The scheme is expected to last for at\nleast 100 Years without reallocation of identification numbers. <text:s/>The ABN is specified\nin English.</text:p>
          </table:table-cell>
          <table:table-cell/>
          <table:table-cell office:value-type="string">
            <text:p>Standards Australia, (Standards Professional Services), GPO Box 5429, Sydney\nNSW 2135, AUSTRALIA</text:p>
          </table:table-cell>
          <table:table-cell table:style-name="ce4" office:value-type="string">
            <text:p>Dec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2">
            <text:p>152</text:p>
          </table:table-cell>
          <table:table-cell table:style-name="ce4" office:value-type="string">
            <text:p>true</text:p>
          </table:table-cell>
          <table:table-cell table:number-columns-repeated="2" office:value-type="string">
            <text:p>Edira Scheme Identifier Code</text:p>
          </table:table-cell>
          <table:table-cell office:value-type="string">
            <text:p>For the unambiguous identification of registration scheme used in e-commerce (not\nto be used for the identification of organizations)</text:p>
          </table:table-cell>
          <table:table-cell office:value-type="string">
            <text:p>EDIRA Association, c/o Zurich chamber of commerce, Bleicherweg 5, P. <text:s/>O. Box\n4031, CH-8022 Zurich, Switzerland Otto Mueller OttoMueller-omueller@zurichcci.ch,\nPhone + 411 217 4050; Fax + 411 217 4051, Andre Mesropian, EDIRA Executive\nDirector, Phone/Fax: +33 1 6023 0504, E-mail: amesropi@club-internet-fr</text:p>
          </table:table-cell>
          <table:table-cell office:value-type="string">
            <text:p>99999; greater than 10000, 5 characters; no significance, no check characters</text:p>
          </table:table-cell>
          <table:table-cell office:value-type="string">
            <text:p>99999; group of 5 digits</text:p>
          </table:table-cell>
          <table:table-cell office:value-type="string">
            <text:p>0-9 for all 5 characters</text:p>
          </table:table-cell>
          <table:table-cell office:value-type="string">
            <text:p>English</text:p>
          </table:table-cell>
          <table:table-cell office:value-type="string">
            <text:p>No</text:p>
          </table:table-cell>
          <table:table-cell office:value-type="string">
            <text:p>25 years</text:p>
          </table:table-cell>
          <table:table-cell office:value-type="string">
            <text:p>Organizations which buy and sell goods or services</text:p>
          </table:table-cell>
          <table:table-cell office:value-type="string">
            <text:p>The code is used to designate unambiguously schemes used in e-commerce to\nspecify any entity but organizations</text:p>
          </table:table-cell>
          <table:table-cell/>
          <table:table-cell office:value-type="string">
            <text:p>EDIRA Association, c/o Zurich chamber of commerce, Bleicherweg 5, P. <text:s/>O. Box\n4031, 8022 Zurich - Tel: +411 217 4050 - Fax: +411 217 4051, Otto Mueller\nOttoMueller-omueller@zurichcci.ch, Andre Mesropian amesropi@club-internet-fr</text:p>
          </table:table-cell>
          <table:table-cell table:style-name="ce4" office:value-type="string">
            <text:p>Dec 2000</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3">
            <text:p>153</text:p>
          </table:table-cell>
          <table:table-cell table:style-name="ce4" office:value-type="string">
            <text:p>true</text:p>
          </table:table-cell>
          <table:table-cell table:number-columns-repeated="2" office:value-type="string">
            <text:p>Concert Global Network Services ICD AESA</text:p>
          </table:table-cell>
          <table:table-cell office:value-type="string">
            <text:p>Global Addressing of the Concert ATM switches and any direct customer ATM\nnetworks for implementation of PNNI. <text:s/>It will also be used for any attached carrier\nATM networks.</text:p>
          </table:table-cell>
          <table:table-cell office:value-type="string">
            <text:p>Concert Global Network Services Ltd, Sir John Swan Building, 26 Victoria Street,\nHamilton, HM12 Bermuda, Contact: John Haynes, Tel: +44 (0) 20 7876 4225, Fax:\n+44 (0) 20 7876 4419, E-mail: john.haynes@concert.com</text:p>
          </table:table-cell>
          <table:table-cell office:value-type="string">
            <text:p>Field, Name; 1, Authority and Format Identifier; 2, ICD; 3, Higher order domain\nspecific part as assigned by Concert. <text:s/>This structure conforms to the ICD AESA\nspecified in the User- Network (UNI) specification Version 3.1 and ATM User Network\n(UNI) Signalling Specification 4.0. <text:s/>It also conforms with PNNI 1.0 standard. <text:s/>All\nthese standards are defined by ATM Forum.</text:p>
          </table:table-cell>
          <table:table-cell office:value-type="string">
            <text:p>As specified by ATM Forum User Specification Version 4.0 &amp;, 3.1.</text:p>
          </table:table-cell>
          <table:table-cell office:value-type="string">
            <text:p>As specified by ATM Forum User Specification Version 4.0 &amp; 3.1.</text:p>
          </table:table-cell>
          <table:table-cell office:value-type="string">
            <text:p>English</text:p>
          </table:table-cell>
          <table:table-cell office:value-type="string">
            <text:p>Upon agreement or per request of the specific organization</text:p>
          </table:table-cell>
          <table:table-cell office:value-type="string">
            <text:p>The minimum period elapsed will depend on the terms of agreement with the specific\norganization and will be determined taking into account the technical administrative\nand regulatory issues.</text:p>
          </table:table-cell>
          <table:table-cell office:value-type="string">
            <text:p>Any Concert ATM network element needing ATM addresses as well as customer\ndevices requiring AESA's. <text:s/>These addresses should be reachable by non-Concert\nATM users via inter-connected carrier ATM networks.</text:p>
          </table:table-cell>
          <table:table-cell office:value-type="string">
            <text:p>Used to form globally unique Concert ICD ATM End System Addresses (AESA's)</text:p>
          </table:table-cell>
          <table:table-cell/>
          <table:table-cell office:value-type="string">
            <text:p>American National Standards Institute (ANSI), 1819 L Street, NW, Washington D.C.\n20036, USA, Tel: + 212 642 4975, Fax: + 212-730-1346, E-mail:</text:p>
          </table:table-cell>
          <table:table-cell table:style-name="ce4" office:value-type="string">
            <text:p>Feb 200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4">
            <text:p>154</text:p>
          </table:table-cell>
          <table:table-cell table:style-name="ce4" office:value-type="string">
            <text:p>true</text:p>
          </table:table-cell>
          <table:table-cell table:number-columns-repeated="2" office:value-type="string">
            <text:p>Identification number of economic subjects: (ICO)</text:p>
          </table:table-cell>
          <table:table-cell office:value-type="string">
            <text:p>Unique identification of economic subjects for all administrative purposes</text:p>
          </table:table-cell>
          <table:table-cell office:value-type="string">
            <text:p>Czech Statistical Office, Sokolovská 142, 186 04 Praha 8- Karlin, Czech Republic,\nMr Staniv Palas, Tel: + 420 274 0525 75, Fax: + 420 268 326 80, e-mail:\npalas@qw.czso.cz</text:p>
          </table:table-cell>
          <table:table-cell office:value-type="string">
            <text:p>Form of representation: nnnnnnn.n, nnnnnnn - serial number, - - - - - - - n code\nnumber, Permissible values: 00000001 to 99999994, 1) 8 characters (fixed length), 2)\nCheck digit: 8th character</text:p>
          </table:table-cell>
          <table:table-cell office:value-type="string">
            <text:p>ICO is written as one 8th digits number</text:p>
          </table:table-cell>
          <table:table-cell/>
          <table:table-cell office:value-type="string">
            <text:p>Czech</text:p>
          </table:table-cell>
          <table:table-cell table:number-columns-repeated="2"/>
          <table:table-cell office:value-type="string">
            <text:p>All legal persons and a natural person who is an entrepreneur according to a special\nActs.</text:p>
          </table:table-cell>
          <table:table-cell office:value-type="string">
            <text:p>The identification number ICO is used in the Czech Republic mainly in all\nadministrative acts (tax system, banking system, statistics. etc.)</text:p>
          </table:table-cell>
          <table:table-cell/>
          <table:table-cell office:value-type="string">
            <text:p>Czech Standards Institute, Director if International Relations Department, Biskupsy\nDvur 5, 110 02 Praha 1 - Nove Mesto Mrs Buresova Zdenka, Tel: + 420 221 802 100,\nFax + 420 221 802 311, e-mail: zdenka.buresova@csni.cz</text:p>
          </table:table-cell>
          <table:table-cell table:style-name="ce4" office:value-type="string">
            <text:p>May 2001</text:p>
          </table:table-cell>
          <table:table-cell office:value-type="string">
            <text:p>Assigning of identification numbers is organized by Czech Statistical office,\nCommercial courts, Trade offices and some ministries (cultural, interior)</text:p>
          </table:table-cell>
          <table:table-cell table:number-columns-repeated="3"/>
          <table:table-cell table:style-name="ce3" table:number-columns-repeated="16363"/>
        </table:table-row>
        <table:table-row table:style-name="ro1" table:visibility="filter">
          <table:table-cell office:value-type="float" office:value="155">
            <text:p>155</text:p>
          </table:table-cell>
          <table:table-cell table:style-name="ce4" office:value-type="string">
            <text:p>true</text:p>
          </table:table-cell>
          <table:table-cell table:number-columns-repeated="2" office:value-type="string">
            <text:p>Global Crossing AESA (ATM End System Address)</text:p>
          </table:table-cell>
          <table:table-cell office:value-type="string">
            <text:p>Construction, administration and implementation of a scalable AESA schema for\nrouting if ATM switched connections.</text:p>
          </table:table-cell>
          <table:table-cell office:value-type="string">
            <text:p>Global Crossing Ltd, Wessex House, 45 Reid Street, Hamilton HM-12, Bermuda,\nContact: Joseph DeVita, Global Crossing Ltd, 1 Bausch &amp; Lomb Place, Suite 400,\nRochester, NY 14604 USA, Tel: + 1 716 777 1093, Fax: + 1 716 546 4387</text:p>
          </table:table-cell>
          <table:table-cell office:value-type="string">
            <text:p>1) AFI -Authority and Format Identifier, 2) ICD - International Code Designator, 3)\nHODSP - Higher Order Domain Specific Part. <text:s/>Structure conforms to ATM Forum UNI\nSignalling Specifications 3.1/4.0</text:p>
          </table:table-cell>
          <table:table-cell office:value-type="string">
            <text:p>Fields will be presented left justified</text:p>
          </table:table-cell>
          <table:table-cell/>
          <table:table-cell office:value-type="string">
            <text:p>English</text:p>
          </table:table-cell>
          <table:table-cell table:number-columns-repeated="2"/>
          <table:table-cell office:value-type="string">
            <text:p>Any company or organization participating in the Global Crossing network including\nGlobal Crossing Companies, affiliates and customers</text:p>
          </table:table-cell>
          <table:table-cell office:value-type="string">
            <text:p>ICD will be used as a component of the IDP (Initial Domain Part) for OSI addressing</text:p>
          </table:table-cell>
          <table:table-cell/>
          <table:table-cell office:value-type="string">
            <text:p>American National Standards Institute (ANSI), 1819 L Street, NW, Washington D.C.\n20036, USA, Tel: + 1 212 642 4975, Fax: + 1 212 730 1346, e-mail:\nmgonzale@ansi.org</text:p>
          </table:table-cell>
          <table:table-cell table:style-name="ce4" office:value-type="string">
            <text:p>Sep 200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6">
            <text:p>156</text:p>
          </table:table-cell>
          <table:table-cell table:style-name="ce4" office:value-type="string">
            <text:p>true</text:p>
          </table:table-cell>
          <table:table-cell table:number-columns-repeated="2" office:value-type="string">
            <text:p>AUNA</text:p>
          </table:table-cell>
          <table:table-cell office:value-type="string">
            <text:p>Telecommunication network of operators in the AUNA Group</text:p>
          </table:table-cell>
          <table:table-cell office:value-type="string">
            <text:p>AUNA, Dept: Dirección corporativa dr red, Responsibility: Ana Isabel Fernández\nHernádez, Paeso Castellana 83-85. <text:s/>28046- Madrid (Spain). <text:s/>Tel: +34 91 202 5808,\nFax: +34 91 202 5173</text:p>
          </table:table-cell>
          <table:table-cell office:value-type="string">
            <text:p>1) CCCC (ICD), 2) Organization Code</text:p>
          </table:table-cell>
          <table:table-cell office:value-type="string">
            <text:p>None</text:p>
          </table:table-cell>
          <table:table-cell table:number-columns-repeated="4"/>
          <table:table-cell office:value-type="string">
            <text:p>This would be AUNA and its associated Companies both nationally and internationally</text:p>
          </table:table-cell>
          <table:table-cell office:value-type="string">
            <text:p>This code shall be used as an element of NSAP addressing</text:p>
          </table:table-cell>
          <table:table-cell/>
          <table:table-cell office:value-type="string">
            <text:p>AENOR- Spain</text:p>
          </table:table-cell>
          <table:table-cell table:style-name="ce4" office:value-type="string">
            <text:p>Sep 2001</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7">
            <text:p>157</text:p>
          </table:table-cell>
          <table:table-cell table:style-name="ce4" office:value-type="string">
            <text:p>true</text:p>
          </table:table-cell>
          <table:table-cell table:number-columns-repeated="2" office:value-type="string">
            <text:p>ATM interconnection with the Dutch KPN Telecom</text:p>
          </table:table-cell>
          <table:table-cell office:value-type="string">
            <text:p>ITO Drager Net</text:p>
          </table:table-cell>
          <table:table-cell office:value-type="string">
            <text:p>Informatie en Communicatie Technologie Organisatie, Odijkerweg 25, 3972 NE\nDriebergen, Contact: A Knol - Head DCB, Tel: + 31 (0) 343 534 500, Fax: + 31 (0)\n343 534 999</text:p>
          </table:table-cell>
          <table:table-cell office:value-type="string">
            <text:p>1) ICD Code- 4 digits, 2) None</text:p>
          </table:table-cell>
          <table:table-cell office:value-type="string">
            <text:p>None</text:p>
          </table:table-cell>
          <table:table-cell table:number-columns-repeated="4"/>
          <table:table-cell office:value-type="string">
            <text:p>Government departments using the ITO carrier network. <text:s/>The coding system will be\nused to provide ATM End System Addresses (AESAs) based on ICD format NSAP\naddresses.</text:p>
          </table:table-cell>
          <table:table-cell office:value-type="string">
            <text:p>The ICD code also form the initial part of the OSI network addressing scheme\n(Addendum 2 of ISO 8384)</text:p>
          </table:table-cell>
          <table:table-cell/>
          <table:table-cell office:value-type="string">
            <text:p>NEN, Postbus 5059, 2600 GB Delft, The Netherlands, Contact: Mr L M J Visser, Tel:\n+3115 269 0100 Fax: +3115 269 0242, E-mail: louis.visser@nen.nl</text:p>
          </table:table-cell>
          <table:table-cell table:style-name="ce4" office:value-type="string">
            <text:p>Dec 2001</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58">
            <text:p>158</text:p>
          </table:table-cell>
          <table:table-cell table:style-name="ce4" office:value-type="string">
            <text:p>false</text:p>
          </table:table-cell>
          <table:table-cell office:value-type="string">
            <text:p>Identification number of economic subject (ICO) Act on State Statistics of 29 November 2001, <text:s/>27</text:p>
          </table:table-cell>
          <table:table-cell office:value-type="string">
            <text:p>Identification number of economic subject (ICO) Act on State Statistics of 29\nNovember 2001, § 27</text:p>
          </table:table-cell>
          <table:table-cell office:value-type="string">
            <text:p>The unique identification of economic subjects (legal persons and natural persons-\nentrepreneurs) used for registration</text:p>
          </table:table-cell>
          <table:table-cell office:value-type="string">
            <text:p>Slovak Statistical Office, Mileticova 3, 824 67 Bratislava, Slovak Republic, Mr Ivan\nLieskovský, tel.: + 421 2 502 36 250, Fax: + 421 2 5556 1541, email:\nivan.lieskovsky@statistics.sk</text:p>
          </table:table-cell>
          <table:table-cell office:value-type="string">
            <text:p>1) 8 characters (fixed length), 2) Check character: 8th digit</text:p>
          </table:table-cell>
          <table:table-cell office:value-type="string">
            <text:p>ICO is written as one 8-digits number</text:p>
          </table:table-cell>
          <table:table-cell/>
          <table:table-cell office:value-type="string">
            <text:p>Slovak</text:p>
          </table:table-cell>
          <table:table-cell table:number-columns-repeated="2"/>
          <table:table-cell office:value-type="string">
            <text:p>All legal persons and natural persons as entrepreneurs or perform other earning\nactivities according to special acts</text:p>
          </table:table-cell>
          <table:table-cell office:value-type="string">
            <text:p>The identification number ICO is used in Slovakia in almost all administrative acts\n(tax system, banking system, statistics, etc.)</text:p>
          </table:table-cell>
          <table:table-cell/>
          <table:table-cell office:value-type="string">
            <text:p>Slovak Standards Institution, International Co-operation Department, Karloveská 63,\nP.O.Box 246, 840 00 Bratislava, Mrs Lubica Pernecka, tel.: + 421 2 602 94 589 Fax:\n+ 421 2 654 11 888, e-mail: pernecka@sutn.gov.sk</text:p>
          </table:table-cell>
          <table:table-cell table:style-name="ce4" office:value-type="string">
            <text:p>Feb 2002</text:p>
          </table:table-cell>
          <table:table-cell office:value-type="string">
            <text:p>None</text:p>
          </table:table-cell>
          <table:table-cell table:number-columns-repeated="3"/>
          <table:table-cell table:style-name="ce3" table:number-columns-repeated="16363"/>
        </table:table-row>
        <table:table-row table:style-name="ro1" table:visibility="filter">
          <table:table-cell office:value-type="float" office:value="159">
            <text:p>159</text:p>
          </table:table-cell>
          <table:table-cell table:style-name="ce4" office:value-type="string">
            <text:p>true</text:p>
          </table:table-cell>
          <table:table-cell table:number-columns-repeated="2" office:value-type="string">
            <text:p>ACTALIS Object Identifiers</text:p>
          </table:table-cell>
          <table:table-cell office:value-type="string">
            <text:p>The code is primarily intended for the registration of Object Identifiers (OIDs)\naccording to ISO 8824/8825: Level 1: iso (1), Level 2: identified-organization (3), Level\n3: ACTALIS SpA (0159), Level 4 and higher: (defined by ACTALIS)</text:p>
          </table:table-cell>
          <table:table-cell office:value-type="string">
            <text:p>ACTALIS S.p.A. <text:s/>Via Taramelli, 26, 20124 Milano, ITALY, Tel: + 39 2 6084 1. <text:s/>The\ntechnical contact point is Ing. <text:s/>Adriano Santoni (email: adriano.santoni@sia.it; will be\nadriano.santoni@actalis.it after April 2002)</text:p>
          </table:table-cell>
          <table:table-cell office:value-type="string">
            <text:p>First field: ICD: 4 digits, Second field: sequence of digits</text:p>
          </table:table-cell>
          <table:table-cell office:value-type="string">
            <text:p>None</text:p>
          </table:table-cell>
          <table:table-cell table:number-columns-repeated="4"/>
          <table:table-cell office:value-type="string">
            <text:p>ACTALIS S.p.A. <text:s/>(www.actalis.it) is a company held by SIA S.p.A. <text:s/>(www.sia.it) and\nSSB (www.ssb.it), founded in December 2001, whose mission is to design, build,\nmanage and market products, systems and services in the field of information\nsecurity, with particular focus on PKI-based solutions (digital signatures, smartcards,\ntime stamping). <text:s/>Professional services are also offered, for consultancy in the fields\nof infrastructural and organizational security (network security, intrusion detection,\nvulnerability assessment, security policies and plans, Information Security\nManagement Systems, BS7799, etc). <text:s/>ACTALIS operates at both local and\ninternational level.</text:p>
          </table:table-cell>
          <table:table-cell office:value-type="string">
            <text:p>See "Intended purpose/application area"</text:p>
          </table:table-cell>
          <table:table-cell/>
          <table:table-cell office:value-type="string">
            <text:p>UNINFO, Corso Galileo Ferraris, 93, 10128 TORINO, Italy, Tel: +39-011 501027, Fax:\n+39-011 501837, Contact person: Carla Sirocchi (sirocchi@uninfo.polito.it)</text:p>
          </table:table-cell>
          <table:table-cell table:style-name="ce4" office:value-type="string">
            <text:p>Feb 2002</text:p>
          </table:table-cell>
          <table:table-cell office:value-type="string">
            <text:p>None</text:p>
          </table:table-cell>
          <table:table-cell table:number-columns-repeated="3"/>
          <table:table-cell table:style-name="ce3" table:number-columns-repeated="16363"/>
        </table:table-row>
        <table:table-row table:style-name="ro1">
          <table:table-cell office:value-type="float" office:value="160">
            <text:p>160</text:p>
          </table:table-cell>
          <table:table-cell table:style-name="ce4" office:value-type="string">
            <text:p>false</text:p>
          </table:table-cell>
          <table:table-cell office:value-type="string">
            <text:p>GTIN -Global Trade Item Number</text:p>
          </table:table-cell>
          <table:table-cell office:value-type="string">
            <text:p>GTIN - Global Trade Item Number</text:p>
          </table:table-cell>
          <table:table-cell office:value-type="string">
            <text:p>The GTIN is a globally unique identifier of trade items. A trade item\nis any item (product or service) upon which there is a need to\nretrieve pre-defined information and that may be priced, ordered or\ninvoiced at any point in any supply chain</text:p>
          </table:table-cell>
          <table:table-cell office:value-type="string">
            <text:p>GS1\navenue Louise 326\nB-1050 Brussels\nBelgium\nTel: +32 495 52 9444\nFax : +32 2 788 7899\nContact: Henri Barthel\nEmail: henri.barthel@gs1.org</text:p>
          </table:table-cell>
          <table:table-cell/>
          <table:table-cell office:value-type="string">
            <text:p>None</text:p>
          </table:table-cell>
          <table:table-cell table:number-columns-repeated="3"/>
          <table:table-cell office:value-type="string">
            <text:p>4 years</text:p>
          </table:table-cell>
          <table:table-cell office:value-type="string">
            <text:p>Any organization that needs to identify uniquely its products or\nservices can use the GTIN</text:p>
          </table:table-cell>
          <table:table-cell office:value-type="string">
            <text:p>The GTIN identification scheme is used by millions of organizations\nin the world. It is widely in the consumer goods, health care and\nother industries to identify items and packages. The GTIN can be\nrepresented in a standard bar code or RFID data carrier.</text:p>
          </table:table-cell>
          <table:table-cell office:value-type="string">
            <text:p>EAN article number, UPC Code</text:p>
          </table:table-cell>
          <table:table-cell office:value-type="string">
            <text:p>GS1\navenue Louise 326\nB-1050 Brussels\nBelgium\nTel: +32 495 52 9444\nFax : +32 2 788 7899\nContact: Henri Barthel\nEmail: henri.barthel@gs1.org</text:p>
          </table:table-cell>
          <table:table-cell office:value-type="string">
            <text:p>2002-05</text:p>
          </table:table-cell>
          <table:table-cell office:value-type="string">
            <text:p>Updated 2020-04-09: Change contact info.</text:p>
          </table:table-cell>
          <table:table-cell/>
          <table:table-cell office:value-type="string">
            <text:p>The GTIN has four different formats of respectively 8, 12, 13 and\n14 digits. When stored in a computer file, right justified with leading\nzeroes, GTIN's are unique against each other, Up to 14 digits.\nLast digit = modulo 10 check digit</text:p>
          </table:table-cell>
          <table:table-cell office:value-type="string">
            <text:p>2020-04-09 05:18:09 UTC</text:p>
          </table:table-cell>
          <table:table-cell table:style-name="ce3" table:number-columns-repeated="16363"/>
        </table:table-row>
        <table:table-row table:style-name="ro1" table:visibility="filter">
          <table:table-cell office:value-type="float" office:value="161">
            <text:p>161</text:p>
          </table:table-cell>
          <table:table-cell table:style-name="ce4" office:value-type="string">
            <text:p>true</text:p>
          </table:table-cell>
          <table:table-cell table:number-columns-repeated="2" office:value-type="string">
            <text:p>ECCMA Open Technical Directory</text:p>
          </table:table-cell>
          <table:table-cell office:value-type="string">
            <text:p>A centralized dictionary of names and definitions of trading concepts, essentially\ngoods and services that are bought, sold or exchanged. This is a classification\nneutral dictionary of names and attributes (also referred to as characteristics or\nproperties). The eOTD will help improve the speed and accuracy of Internet searches\nand can be imported into sourcing, procurement and ERP systems with minimal data\ntransformation costs.</text:p>
          </table:table-cell>
          <table:table-cell office:value-type="string">
            <text:p>Electronic Commerce Code Management Association2980 Linden Street Suite\nE218017 BethlehemUSURL: http://www.eccma.orgresponsible: Yvette Thomasemail:\nYvette.Thomas@Eccma.orgphone: <text:s text:c="8"/>001-610-861-5990fax: <text:s text:c="4"/>001-\n610-861-5992</text:p>
          </table:table-cell>
          <table:table-cell office:value-type="string">
            <text:p>9.999999\n7 characters; 1st digit being the Table Identifier and 2nd set of digits designating the\nSequence Identifier\nno check characters</text:p>
          </table:table-cell>
          <table:table-cell office:value-type="string">
            <text:p>9.999999; group of 7 digits</text:p>
          </table:table-cell>
          <table:table-cell office:value-type="string">
            <text:p>0 - 9 for all 7 characters</text:p>
          </table:table-cell>
          <table:table-cell office:value-type="string">
            <text:p>English</text:p>
          </table:table-cell>
          <table:table-cell office:value-type="string">
            <text:p>no</text:p>
          </table:table-cell>
          <table:table-cell office:value-type="string">
            <text:p>10 years</text:p>
          </table:table-cell>
          <table:table-cell office:value-type="string">
            <text:p>All trading organizations in both the public and private sector</text:p>
          </table:table-cell>
          <table:table-cell/>
          <table:table-cell office:value-type="string">
            <text:p>eOTD</text:p>
          </table:table-cell>
          <table:table-cell office:value-type="string">
            <text:p>EDIRA Associationc/o Zurich chamber of CommerceBleicherweg 5 <text:s/>- Box 30588022\nZurich - Tel:+41 1 217 40 50 - Fax: +41 1 217 40 51Otto Mueller\nomueller@zurichcci.chAndre Mesropian amesropi@club-internet.fr</text:p>
          </table:table-cell>
          <table:table-cell table:style-name="ce4" office:value-type="string">
            <text:p>10-October-2002</text:p>
          </table:table-cell>
          <table:table-cell table:number-columns-repeated="4"/>
          <table:table-cell table:style-name="ce3" table:number-columns-repeated="16363"/>
        </table:table-row>
        <table:table-row table:style-name="ro1" table:visibility="filter">
          <table:table-cell office:value-type="float" office:value="162">
            <text:p>162</text:p>
          </table:table-cell>
          <table:table-cell table:style-name="ce4" office:value-type="string">
            <text:p>true</text:p>
          </table:table-cell>
          <table:table-cell table:number-columns-repeated="2" office:value-type="string">
            <text:p>CEN/ISSS Object Identifier Scheme</text:p>
          </table:table-cell>
          <table:table-cell office:value-type="string">
            <text:p>To allocate OIDs to objects defined in the standards and specifications developed in\nCEN’s technical bodies (TCs, Workshops, etc)</text:p>
          </table:table-cell>
          <table:table-cell office:value-type="string">
            <text:p>Comité Européen de Normalization - <text:s/>CENRue de Stassart 36B-1050 Brussels</text:p>
          </table:table-cell>
          <table:table-cell office:value-type="string">
            <text:p>First field: ICD: 4 digitsSecond field: sequence of digits</text:p>
          </table:table-cell>
          <table:table-cell table:number-columns-repeated="4" office:value-type="string">
            <text:p>Not Applicable</text:p>
          </table:table-cell>
          <table:table-cell office:value-type="string">
            <text:p>An OID once issued will never be reallocated for other purposes</text:p>
          </table:table-cell>
          <table:table-cell office:value-type="string">
            <text:p>CEN is a European Standardisation Body</text:p>
          </table:table-cell>
          <table:table-cell office:value-type="string">
            <text:p>The code is primarily intended for the registration ofObject Identifiers according to\nISO 8824-1 Annex BLevel 1: iso (1)Level 2: identified-organization (3)Level 3: CEN\n(nnnn –the ICD allocated)Level 4: and higher: (defined by CEN conventions)</text:p>
          </table:table-cell>
          <table:table-cell office:value-type="string">
            <text:p>None</text:p>
          </table:table-cell>
          <table:table-cell office:value-type="string">
            <text:p>Comité Européen de Normalization - <text:s/>CENRue de Stassart 36B-1050 BrusselsLuc\nVan den Berghe CEN/ISSS - Information Society Standardization System <text:s/>Rue de\nStassart 36, B-1050 Brussels Tel (direct): + 32 2 550 09 57 Tel (secretariat): + 32 2\n550 08 13 Fax: + 32 2 550 09 66 E-mail: <text:s/>luc.vandenberghe@cenorm.be URL:\nhttp://www.cenorm.be/isss</text:p>
          </table:table-cell>
          <table:table-cell table:style-name="ce4" office:value-type="string">
            <text:p>27-06-03</text:p>
          </table:table-cell>
          <table:table-cell table:number-columns-repeated="4"/>
          <table:table-cell table:style-name="ce3" table:number-columns-repeated="16363"/>
        </table:table-row>
        <table:table-row table:style-name="ro1" table:visibility="filter">
          <table:table-cell office:value-type="float" office:value="163">
            <text:p>163</text:p>
          </table:table-cell>
          <table:table-cell table:style-name="ce4" office:value-type="string">
            <text:p>true</text:p>
          </table:table-cell>
          <table:table-cell table:number-columns-repeated="2" office:value-type="string">
            <text:p>US-EPA Facility Identifier</text:p>
          </table:table-cell>
          <table:table-cell office:value-type="string">
            <text:p>To provide for the unique identification of facilities regulated or monitored by the\nUnited States Environmental Protection Agency (EPA).A facility is a distinct real\nproperty entity (i.e., a man-made object and its surrounding real estate). <text:s/>Facilities\nincorporate the characteristics of being: (1) objects, established at (2) specific\nplaces, for (3) specific purposes. <text:s/>A facility can include monitoring stations, waste\nsites, and other entities of environmental interest that cannot be classified as single\nfacilities. This is maintained within the U.S. Environmental Protection Agency\nFacility Registration System (FRS)</text:p>
          </table:table-cell>
          <table:table-cell office:value-type="string">
            <text:p>U.S. Environmental Protection AgencyMail Code 2832T1200 Pennsylvania Avenue\nNWWashington, DCUSAAttn: Patrick GarveyTel: <text:s/>+1 202 566 1687Fax: <text:s/>+1 202 566\n1684Email: <text:s/>garvey.pat@epa.govWeb: <text:s/>www.epa.gov/enviro/html/facility.html</text:p>
          </table:table-cell>
          <table:table-cell office:value-type="string">
            <text:p>Alphanumeric (12)\n12 characters (fixed length)</text:p>
          </table:table-cell>
          <table:table-cell office:value-type="string">
            <text:p>FRS-nnnnnnnnnnnn</text:p>
          </table:table-cell>
          <table:table-cell office:value-type="string">
            <text:p>0-9</text:p>
          </table:table-cell>
          <table:table-cell office:value-type="string">
            <text:p>English</text:p>
          </table:table-cell>
          <table:table-cell office:value-type="string">
            <text:p>no</text:p>
          </table:table-cell>
          <table:table-cell office:value-type="string">
            <text:p>none</text:p>
          </table:table-cell>
          <table:table-cell office:value-type="string">
            <text:p>Facilities regulated, monitored, or of environmental interest by the United States\nEnvironmental Protection Agency (EPA).</text:p>
          </table:table-cell>
          <table:table-cell/>
          <table:table-cell office:value-type="string">
            <text:p>FRSID, FACID, Facility ID</text:p>
          </table:table-cell>
          <table:table-cell office:value-type="string">
            <text:p>ISO/IEC JTC 1/SC 32Secretariat13600 Angelica CourtChantilly, Virginia20151-\n5530USADouglas Mann – SecretaryTel: <text:s/>+1 202 566-2126Fax: <text:s/>+1 202 566\n1639Email: <text:s/>mannd@battelle.org</text:p>
          </table:table-cell>
          <table:table-cell table:style-name="ce4" office:value-type="string">
            <text:p>5-Sep-03</text:p>
          </table:table-cell>
          <table:table-cell table:number-columns-repeated="4"/>
          <table:table-cell table:style-name="ce3" table:number-columns-repeated="16363"/>
        </table:table-row>
        <table:table-row table:style-name="ro1" table:visibility="filter">
          <table:table-cell office:value-type="float" office:value="164">
            <text:p>164</text:p>
          </table:table-cell>
          <table:table-cell table:style-name="ce4" office:value-type="string">
            <text:p>true</text:p>
          </table:table-cell>
          <table:table-cell table:number-columns-repeated="2" office:value-type="string">
            <text:p>TELUS Corporation</text:p>
          </table:table-cell>
          <table:table-cell office:value-type="string">
            <text:p>AESA Addressing Scheme for ATM PNNI Implementation</text:p>
          </table:table-cell>
          <table:table-cell office:value-type="string">
            <text:p>TELUS Corporation, Floor 24, TELUS Plaza South Tower10020 - 100 Street\nN.W.Edmonton, Alberta, CanadaT5J 0N5. <text:s/>Gregory Rees, greg.rees@telus.com, Tel:\n(780) 493-3921 Fax: (780) 421-8085</text:p>
          </table:table-cell>
          <table:table-cell office:value-type="string">
            <text:p>All 10 characters of HODSP required\nNot applicable to PNNI</text:p>
          </table:table-cell>
          <table:table-cell office:value-type="string">
            <text:p>None - no special display requirements</text:p>
          </table:table-cell>
          <table:table-cell office:value-type="string">
            <text:p>0 through 9 of Hexadecimal values (Binary Coded Decimal Scheme)</text:p>
          </table:table-cell>
          <table:table-cell office:value-type="string">
            <text:p>English</text:p>
          </table:table-cell>
          <table:table-cell office:value-type="string">
            <text:p>Yes</text:p>
          </table:table-cell>
          <table:table-cell office:value-type="string">
            <text:p>5 Years</text:p>
          </table:table-cell>
          <table:table-cell office:value-type="string">
            <text:p>Telecommunications Carrier providing data services over ATM/IP network across\nCanada and the US</text:p>
          </table:table-cell>
          <table:table-cell office:value-type="string">
            <text:p>ICD is required for PNNI implementation on TELUS’ ATM network in order to\nestablish an addressing scheme for SPVC connections within and between regions</text:p>
          </table:table-cell>
          <table:table-cell office:value-type="string">
            <text:p>none</text:p>
          </table:table-cell>
          <table:table-cell office:value-type="string">
            <text:p>Jacqui Cole, GoC Registrar, PWGSC/ITS, 11 Laurier St, Gatineau QC, K1A 0S5,\n819-956-1746, NCR.COSIRA@PWGSC.GC.CA</text:p>
          </table:table-cell>
          <table:table-cell table:style-name="ce4" office:value-type="string">
            <text:p>13-Nov-03</text:p>
          </table:table-cell>
          <table:table-cell table:number-columns-repeated="4"/>
          <table:table-cell table:style-name="ce3" table:number-columns-repeated="16363"/>
        </table:table-row>
        <table:table-row table:style-name="ro1" table:visibility="filter">
          <table:table-cell office:value-type="float" office:value="165">
            <text:p>165</text:p>
          </table:table-cell>
          <table:table-cell table:style-name="ce4" office:value-type="string">
            <text:p>true</text:p>
          </table:table-cell>
          <table:table-cell table:number-columns-repeated="2" office:value-type="string">
            <text:p>FIEIE Object identifiers</text:p>
          </table:table-cell>
          <table:table-cell office:value-type="string">
            <text:p>To provide identifiers for international enterprises and organizations operating in fields\nof business served by the Jaakko Poyry Group. <text:s/>On the date of the application,\nthese fields include Forest industry, Energy, Infrastructure and Environment. <text:s/>To\nprovide an internationally unambiguous framework for existing coding practices in this</text:p>
          </table:table-cell>
          <table:table-cell office:value-type="string">
            <text:p>Jaakko Poyry Group Oyj\nPL4, Jaakonkatu 3\nFIN-01621 Vantaa\nFinland\nTel: +358 9 894 71\nFax: +358 9 878 1818\nEmail: general.jp@poyry.fi\nURL: http://www.poyry.com\nContact: Mr Risto Ryyppo</text:p>
          </table:table-cell>
          <table:table-cell office:value-type="string">
            <text:p>The identifier consists of a sequence of digits\n1) Variable-length sequence of decimal digits\n2) No checksum</text:p>
          </table:table-cell>
          <table:table-cell office:value-type="string">
            <text:p>None</text:p>
          </table:table-cell>
          <table:table-cell office:value-type="string">
            <text:p>Integers 0 to 9</text:p>
          </table:table-cell>
          <table:table-cell office:value-type="string">
            <text:p>English</text:p>
          </table:table-cell>
          <table:table-cell office:value-type="string">
            <text:p>Later nodes in the OID tree may support organization parts</text:p>
          </table:table-cell>
          <table:table-cell office:value-type="string">
            <text:p>Indentifiers are not reused once assigned</text:p>
          </table:table-cell>
          <table:table-cell office:value-type="string">
            <text:p>International organizations operating in fields of buusiness served by the Jaakko\nPoyry Group. These include, but are not limited to, the Jaakko Poyry Group's\nbusiness units worldwide, clients, vendors and parties providing services for Forest\nIndustry, Energy, Infrastructure and Environment, both private and public sector.</text:p>
          </table:table-cell>
          <table:table-cell office:value-type="string">
            <text:p>The code is primarily intended for the registration of Object Identifiers according to\nISO/IEC 8824, 8825 and 11179:\nLevel 1: iso (1)\nLevel 2: identified organization (3)\nLevel 3: fieie code (nnnn, the ICD allocated)\nLevel 4 and higher: (defined by FIEIE conventions)</text:p>
          </table:table-cell>
          <table:table-cell office:value-type="string">
            <text:p>FIEIE-OID</text:p>
          </table:table-cell>
          <table:table-cell office:value-type="string">
            <text:p>Finnish Standards Association SFS\nMaistraatinportti 2\nFIN-00240 Helsinki\nFinland\nTel: +358 9 149 9331\nFax: + 358 9 146 4925\nEmail: sfs@sfs.fi</text:p>
          </table:table-cell>
          <table:table-cell table:style-name="ce4" office:value-type="string">
            <text:p>12-Dec-03</text:p>
          </table:table-cell>
          <table:table-cell table:number-columns-repeated="4"/>
          <table:table-cell table:style-name="ce3" table:number-columns-repeated="16363"/>
        </table:table-row>
        <table:table-row table:style-name="ro1" table:visibility="filter">
          <table:table-cell office:value-type="float" office:value="166">
            <text:p>166</text:p>
          </table:table-cell>
          <table:table-cell table:style-name="ce4" office:value-type="string">
            <text:p>true</text:p>
          </table:table-cell>
          <table:table-cell table:number-columns-repeated="2" office:value-type="string">
            <text:p>Swissguide Identifier Scheme</text:p>
          </table:table-cell>
          <table:table-cell office:value-type="string">
            <text:p>To uniquely identify objects, esp. companies and professionals in\ndirectories/databases</text:p>
          </table:table-cell>
          <table:table-cell office:value-type="string">
            <text:p>Swissguide AG\nLindenstrasse 1, 8302 Kloten\nSwitzerland\nAttn: Juerg Dangel\nTel: <text:s/>+41 1 444 39 39\nFax: <text:s/>+41 1 444 39 85\nEmail: juerg.dangel@swissguide.ch\nWeb: www.swissguide.ch</text:p>
          </table:table-cell>
          <table:table-cell office:value-type="string">
            <text:p>999999\nOrganization ID (OI, mandatory): 6 digits (0-9)\nNo check characters</text:p>
          </table:table-cell>
          <table:table-cell office:value-type="float" office:value="999999">
            <text:p>999999</text:p>
          </table:table-cell>
          <table:table-cell office:value-type="string">
            <text:p>numerical characters (0-9)</text:p>
          </table:table-cell>
          <table:table-cell office:value-type="string">
            <text:p>German, French, Italian, English</text:p>
          </table:table-cell>
          <table:table-cell office:value-type="string">
            <text:p>No</text:p>
          </table:table-cell>
          <table:table-cell office:value-type="string">
            <text:p>No reuse</text:p>
          </table:table-cell>
          <table:table-cell office:value-type="string">
            <text:p>All companies, professionals, products, services and brands in Switzerland</text:p>
          </table:table-cell>
          <table:table-cell office:value-type="string">
            <text:p>The code is used to uniquely identify the objects in the Swissguide directory.</text:p>
          </table:table-cell>
          <table:table-cell office:value-type="string">
            <text:p>N/A</text:p>
          </table:table-cell>
          <table:table-cell office:value-type="string">
            <text:p>EDIRA Association\nc/o Zurich chamber of commerce\nBleicherweg 5, P. O. Box 4031\n8022 Zurich –\nTel: +411 217 4050 –\nFax: +411 217 4051 -\nE-mail: info@edira.org\nOtto Mueller@omueller@zurichcci.ch</text:p>
          </table:table-cell>
          <table:table-cell table:style-name="ce4" office:value-type="string">
            <text:p>12-Feb-04</text:p>
          </table:table-cell>
          <table:table-cell table:number-columns-repeated="4"/>
          <table:table-cell table:style-name="ce3" table:number-columns-repeated="16363"/>
        </table:table-row>
        <table:table-row table:style-name="ro1" table:visibility="filter">
          <table:table-cell office:value-type="float" office:value="167">
            <text:p>167</text:p>
          </table:table-cell>
          <table:table-cell table:style-name="ce4" office:value-type="string">
            <text:p>true</text:p>
          </table:table-cell>
          <table:table-cell table:number-columns-repeated="2" office:value-type="string">
            <text:p>Priority Telecom ATM End System Address Plan</text:p>
          </table:table-cell>
          <table:table-cell office:value-type="string">
            <text:p>The coding system will be used to provide ATM End System Address based on IDC\nformat NSAP addresses required for Priority Telecom ATM PNNI implementation.\nThese addresses will be used to uniquely identify User Network interfaces to Priority\nTelecom ATM Networks as specified by the ATM Forum UNI specifications. <text:s/>PT\nplans to use these addresses to connect to other public ATM networks in the\ncountries PT is operating (The Netherlands, Norway and Austria)</text:p>
          </table:table-cell>
          <table:table-cell office:value-type="string">
            <text:p>Priority Telecom Netherlands B.V.\nBeech Avenue 100\n1119 PW, Schiphol-Rijk\nThe Netherlands\nContact: Roger Schobben\n+31 20 778 2520 / Fax: +31 20 778 2600\nEmail: rschobben@prioritytelecom.com</text:p>
          </table:table-cell>
          <table:table-cell office:value-type="string">
            <text:p>Field 1 = AFI = 47 (1 byte)\nField 2 = ICD (2 bytes)\nField 3 = Higher Order Domain Specific Part (6 bytes)\nField 4 = End System Identifier (6 bytes)\nField 5 = Selector (1 byte)\n1) See above for length, all fields left justified</text:p>
          </table:table-cell>
          <table:table-cell table:number-columns-repeated="2" office:value-type="string">
            <text:p>As specified by ATM Forum User Specification 4.0 &amp; 3.1</text:p>
          </table:table-cell>
          <table:table-cell office:value-type="string">
            <text:p>English</text:p>
          </table:table-cell>
          <table:table-cell office:value-type="string">
            <text:p>Yes</text:p>
          </table:table-cell>
          <table:table-cell office:value-type="string">
            <text:p>Between 6 months and 10 years (as interconnects / customer connections are built\nand removed)</text:p>
          </table:table-cell>
          <table:table-cell office:value-type="string">
            <text:p>Priority Telecom, national and international carrier, CLEC</text:p>
          </table:table-cell>
          <table:table-cell office:value-type="string">
            <text:p>Used to form a globally unique Priority Telecom ATM End System Address. <text:s/>PT\ncustomers and interconnect with public ATM networks requires the use of unique\nAESA</text:p>
          </table:table-cell>
          <table:table-cell office:value-type="string">
            <text:p>Priority Telecom EASE\nPriority Telecom ATM</text:p>
          </table:table-cell>
          <table:table-cell office:value-type="string">
            <text:p>NEN\nPostbus 5059\n2600 GB Delft\nThe Netherlands\nContact: Mr L M J Visser\nTel: + 31 15 269 0100\nFax: +31 15 269 0242\nEmail: louis.visser@nen.nl</text:p>
          </table:table-cell>
          <table:table-cell table:style-name="ce4" office:value-type="string">
            <text:p>12-Aug-04</text:p>
          </table:table-cell>
          <table:table-cell table:number-columns-repeated="4"/>
          <table:table-cell table:style-name="ce3" table:number-columns-repeated="16363"/>
        </table:table-row>
        <table:table-row table:style-name="ro1" table:visibility="filter">
          <table:table-cell office:value-type="float" office:value="168">
            <text:p>168</text:p>
          </table:table-cell>
          <table:table-cell table:style-name="ce4" office:value-type="string">
            <text:p>true</text:p>
          </table:table-cell>
          <table:table-cell table:number-columns-repeated="2" office:value-type="string">
            <text:p>Vodafone Ireland OSI Addressing</text:p>
          </table:table-cell>
          <table:table-cell office:value-type="string">
            <text:p>Implementation of an ATM network in connection with 3G rollout.</text:p>
          </table:table-cell>
          <table:table-cell office:value-type="string">
            <text:p>Vodafone Ireland Limited,\n3rd Floor, Block B,\nMountainView,\nSandyford,\nDublin 18,\nIreland\nContact:Colm Fleming, Core Network Planning Manager,\nPh. +353 87 2352155 Fax +353 1 2037611\ncolm.fleming@vodafone.com</text:p>
          </table:table-cell>
          <table:table-cell office:value-type="string">
            <text:p>1) AFI-Authority and Format Identifier\n2) ICD- International Code Designator\n3) HODSP- Higher Order Domain Specific Part\nStructure conforms to ATM Forum UNI Signalling Specifications 3.1/4.0\n1. ICD (2 Bytes)2. Higher Order Domain Specific Part (9 Bytes)3. 00 (1 Byte)4. End\nSytem Identifier (6 Bytes)</text:p>
          </table:table-cell>
          <table:table-cell office:value-type="string">
            <text:p>None</text:p>
          </table:table-cell>
          <table:table-cell office:value-type="string">
            <text:p>Digits 0-9</text:p>
          </table:table-cell>
          <table:table-cell office:value-type="string">
            <text:p>English</text:p>
          </table:table-cell>
          <table:table-cell office:value-type="string">
            <text:p>ATM Network elements and SPVCs</text:p>
          </table:table-cell>
          <table:table-cell office:value-type="string">
            <text:p>One year</text:p>
          </table:table-cell>
          <table:table-cell office:value-type="string">
            <text:p>Vodafone Ireland</text:p>
          </table:table-cell>
          <table:table-cell office:value-type="string">
            <text:p>The code will be used for ATM network related addressing purposes, and for CLNS\nnetwork.</text:p>
          </table:table-cell>
          <table:table-cell office:value-type="string">
            <text:p>None</text:p>
          </table:table-cell>
          <table:table-cell office:value-type="string">
            <text:p>BSI</text:p>
          </table:table-cell>
          <table:table-cell table:style-name="ce4" office:value-type="string">
            <text:p>17-Dec-04</text:p>
          </table:table-cell>
          <table:table-cell table:number-columns-repeated="4"/>
          <table:table-cell table:style-name="ce3" table:number-columns-repeated="16363"/>
        </table:table-row>
        <table:table-row table:style-name="ro1">
          <table:table-cell office:value-type="float" office:value="169">
            <text:p>169</text:p>
          </table:table-cell>
          <table:table-cell table:style-name="ce4" office:value-type="string">
            <text:p>false</text:p>
          </table:table-cell>
          <table:table-cell office:value-type="string">
            <text:p>Swiss Federal Business Identification Number. Central Business names Index (zefix) Identification Number</text:p>
          </table:table-cell>
          <table:table-cell office:value-type="string">
            <text:p>Swiss Federal Business Identification Number.\nCentral Business names Index (zefix) Identification Number</text:p>
          </table:table-cell>
          <table:table-cell office:value-type="string">
            <text:p>To uniquely identify all companies/organizations registered in the Swiss Register of\nCommerce and the Swiss Central Business Names Index</text:p>
          </table:table-cell>
          <table:table-cell office:value-type="string">
            <text:p>Swiss Federal Office of Justice, Bundesrain 20, CH-3003 Bern (Switzerland)\nTel: +41 31 322 36 32 Fax: +41 31 323 51 52</text:p>
          </table:table-cell>
          <table:table-cell office:value-type="string">
            <text:p>CH-RRR.X.XXX.XXX-P\n1) 13 characters\nCH: Swiss Country Code\nRRR: number of the register office which first registered the business name or which\nused the number\nX.XXX.XXX: the number itself\nP: check digit\n2) XX-XXX.X.XXX.XXX-P, the last digit</text:p>
          </table:table-cell>
          <table:table-cell office:value-type="string">
            <text:p>CH-RRR.X.XXX.XXX-P minus-character (’-‘) after ‘CH’ and before the check digit as\nseparator dot-character (‘.’) after 5th, 6th and 9th character</text:p>
          </table:table-cell>
          <table:table-cell office:value-type="string">
            <text:p>Country code: String "CH". <text:s/>Numerical characters '0'-'9' for the number and the check\ndigit minus-character '-' and dot-character '.' for seperators</text:p>
          </table:table-cell>
          <table:table-cell office:value-type="string">
            <text:p>German, French, Italian, English</text:p>
          </table:table-cell>
          <table:table-cell office:value-type="string">
            <text:p>No</text:p>
          </table:table-cell>
          <table:table-cell office:value-type="string">
            <text:p>No reuse</text:p>
          </table:table-cell>
          <table:table-cell office:value-type="string">
            <text:p>Companies/organizations registered in the Swiss Register of Commerce and in\ncorresponding Swiss Central Business names Index (zefix.admin.ch)</text:p>
          </table:table-cell>
          <table:table-cell office:value-type="string">
            <text:p>To uniquely identify entries in Swiss Central Business Names Index (zefix). The\nprinciple purpose of the zefix on internet is to provide a swisswide search function,\nand thus provide the public with a service to determine the legal domicile, the\ncantonal office for the register of commerce in charge, and the latter’s address.</text:p>
          </table:table-cell>
          <table:table-cell office:value-type="string">
            <text:p>CH-Nummer, numero CH, numero Ch, CH-number</text:p>
          </table:table-cell>
          <table:table-cell office:value-type="string">
            <text:p>BAKOM/OFCOM - Swiss Federal Office for Communications, Postfach, 2501\nBiel/Bienne\nTelefon: +41 32 327 55 11\nFax: +41 32 327 55 49\nWeb: http://www.bakom.ch/\nResponsible: Laurent Scheggia, Laurent.scheggia@bakom.admin.ch</text:p>
          </table:table-cell>
          <table:table-cell table:style-name="ce4" office:value-type="string">
            <text:p>24-Jun-05</text:p>
          </table:table-cell>
          <table:table-cell table:number-columns-repeated="4"/>
          <table:table-cell table:style-name="ce3" table:number-columns-repeated="16363"/>
        </table:table-row>
        <table:table-row table:style-name="ro1" table:visibility="filter">
          <table:table-cell office:value-type="float" office:value="170">
            <text:p>170</text:p>
          </table:table-cell>
          <table:table-cell table:style-name="ce4" office:value-type="string">
            <text:p>true</text:p>
          </table:table-cell>
          <table:table-cell table:number-columns-repeated="2" office:value-type="string">
            <text:p>Teikoku Company Code</text:p>
          </table:table-cell>
          <table:table-cell office:value-type="string">
            <text:p>Teikoku Company Code is allocated to all incorporations, business owners,\ngovernment organizations and other public offices in Japan. <text:s/>TDB (Teikoku Databank\nLtd.) retains company codes of approximately 1.7 million companies within Japan.\nTeikoku Company Code, a unique company ID, has already been adopted by many\ncompanies both as a standard company code in customer data managements and\nas an identification code for online electronic commerce transactions. <text:s/>Since every\ncompany trades with companies abroad, they need to use it in their international\nbusiness transaction. <text:s/>Therefore, it is desired to register TDB as an ICD to RA of the\nISO/IEC 6523.</text:p>
          </table:table-cell>
          <table:table-cell office:value-type="string">
            <text:p>TEIKOKU DATABANK LTD.\nCorporate Planning Department\n2-5-20 MINAMI-AOYAMA, MINATO-KU, TOKYO, JAPAN\nTEL: 03-5775-3132\nFAX: 03-5775-3127\nEmail: spinfo@mail.tdb.co.jp</text:p>
          </table:table-cell>
          <table:table-cell office:value-type="string">
            <text:p>1) Eight identification digits and a check digit\n2) One check digit is based on TDB original computation</text:p>
          </table:table-cell>
          <table:table-cell office:value-type="string">
            <text:p>None</text:p>
          </table:table-cell>
          <table:table-cell office:value-type="string">
            <text:p>decimal numeration, 9digits</text:p>
          </table:table-cell>
          <table:table-cell office:value-type="string">
            <text:p>Japanese and English</text:p>
          </table:table-cell>
          <table:table-cell office:value-type="string">
            <text:p>None</text:p>
          </table:table-cell>
          <table:table-cell office:value-type="string">
            <text:p>Never reallocated</text:p>
          </table:table-cell>
          <table:table-cell office:value-type="string">
            <text:p>Teikoku Company Code covers all incorporations, business owners, government and\nother public offices within Japan through 1.4 million credit researches per a year.\nTDB retains company codes of approximately 1.7 million companies in Japan</text:p>
          </table:table-cell>
          <table:table-cell table:number-columns-repeated="2" office:value-type="string">
            <text:p>None</text:p>
          </table:table-cell>
          <table:table-cell office:value-type="string">
            <text:p>JISC (Japan Industrial Standards Committee)\n1-3-1 Kasumigaseki, Chiyoda-ku, Tokyo 100-8901\nJAPAN industrial Science and Technology Police and Environment Bureau Technical\nregulation, Standards and Conformity Assessment policy Unit Ministry of Economy,\ntrade and Industry\ntel: 03-35019287 fax: 03-3580 8625</text:p>
          </table:table-cell>
          <table:table-cell table:style-name="ce4" office:value-type="string">
            <text:p>16-Nov-05</text:p>
          </table:table-cell>
          <table:table-cell table:number-columns-repeated="4"/>
          <table:table-cell table:style-name="ce3" table:number-columns-repeated="16363"/>
        </table:table-row>
        <table:table-row table:style-name="ro1">
          <table:table-cell office:value-type="float" office:value="171">
            <text:p>171</text:p>
          </table:table-cell>
          <table:table-cell table:style-name="ce4" office:value-type="string">
            <text:p>false</text:p>
          </table:table-cell>
          <table:table-cell office:value-type="string">
            <text:p>Luxembourg CP &amp; CPS (Certification Policy and Certification Practice Statement) Index</text:p>
          </table:table-cell>
          <table:table-cell office:value-type="string">
            <text:p>Luxembourg CP &amp; CPS (Certification Policy and Certification Practice Statement)\nIndex</text:p>
          </table:table-cell>
          <table:table-cell office:value-type="string">
            <text:p>Index of the Certification Policies and Certification Practice Statement issued by\nLuxembourg PKI</text:p>
          </table:table-cell>
          <table:table-cell office:value-type="string">
            <text:p>Ministry of The Economy and Foreign Trade\n19-21 Boulevard Royal\nL-2914 Luxembourg\ne-mail: Francois.Thill@eco.etat.lu\nFax: +352 478 4311</text:p>
          </table:table-cell>
          <table:table-cell office:value-type="string">
            <text:p>xxx.yyy.zzz.nnnn\nxxx; PKI-code: numeric\nyyy: Root-code\nxxx: CP/CPS-code\nnnnn: doc-codeNumeric</text:p>
          </table:table-cell>
          <table:table-cell/>
          <table:table-cell office:value-type="string">
            <text:p>0-9</text:p>
          </table:table-cell>
          <table:table-cell office:value-type="string">
            <text:p>EN / FR</text:p>
          </table:table-cell>
          <table:table-cell office:value-type="string">
            <text:p>Yes</text:p>
          </table:table-cell>
          <table:table-cell office:value-type="string">
            <text:p>No reallocation possible</text:p>
          </table:table-cell>
          <table:table-cell office:value-type="string">
            <text:p>Only the CP and CPS of Luxembourg PKI are covered</text:p>
          </table:table-cell>
          <table:table-cell/>
          <table:table-cell office:value-type="string">
            <text:p>PKI... Public Key Infrastructure\nCP... Certofication Ploicy (RFC 2527, RF C3647,...)\nCPS... Certification Practice Statement (RFC 2527, RF C3647,...)</text:p>
          </table:table-cell>
          <table:table-cell office:value-type="string">
            <text:p>SEE – Organisme Luxembourgeois de Normalisation\nJean-Paul Hoffman\nJean-paul.hoffmann@eg.etat.lu\n34, avenue de la Porte Neuve\nB.P. 10\nL-2010 Luxembourg</text:p>
          </table:table-cell>
          <table:table-cell table:style-name="ce4" office:value-type="string">
            <text:p>7-Apr-06</text:p>
          </table:table-cell>
          <table:table-cell table:number-columns-repeated="4"/>
          <table:table-cell table:style-name="ce3" table:number-columns-repeated="16363"/>
        </table:table-row>
        <table:table-row table:style-name="ro1">
          <table:table-cell office:value-type="float" office:value="172">
            <text:p>172</text:p>
          </table:table-cell>
          <table:table-cell table:style-name="ce4" office:value-type="string">
            <text:p>false</text:p>
          </table:table-cell>
          <table:table-cell office:value-type="string">
            <text:p>x</text:p>
          </table:table-cell>
          <table:table-cell office:value-type="string">
            <text:p>Project Group “Lists of Properties” (PROLIST®)</text:p>
          </table:table-cell>
          <table:table-cell office:value-type="string">
            <text:p>To uniquely identify properties, blocks and lists of properties (LOP) for products and\nservices in the process industry. The products are electrical and process control\ndevices.</text:p>
          </table:table-cell>
          <table:table-cell office:value-type="string">
            <text:p>Project Group “Lists of Properties” (PROLIST®)\nc/o Bayer Technology Services GmbH\nGeb. K 9\n51368 Leverkusen\nGermany\nE-Mail: Prolist@NAMUR.de\nTel: <text:s/>+49 - 214 - 30 57852\nFax: +49 - 214 - 30 72774</text:p>
          </table:table-cell>
          <table:table-cell office:value-type="string">
            <text:p>This code consists of:\n1. ICD 4 digits\n2. Organisation Identifier\nNo check character required\n3. Organisation Part Identifier\n4. OPIS</text:p>
          </table:table-cell>
          <table:table-cell office:value-type="string">
            <text:p>none</text:p>
          </table:table-cell>
          <table:table-cell/>
          <table:table-cell office:value-type="string">
            <text:p>Usually English or German but also other languages could be possible</text:p>
          </table:table-cell>
          <table:table-cell office:value-type="string">
            <text:p>No</text:p>
          </table:table-cell>
          <table:table-cell office:value-type="string">
            <text:p>Not reused after assigned once</text:p>
          </table:table-cell>
          <table:table-cell office:value-type="string">
            <text:p>PROLIST is an element of the NAMUR organisation. Members of PROLIST are\norganisations, universities and companies which are active in electrical and process\ncontrol area. They are going to exchange data with each other and with other\ncompanies or organisations.</text:p>
          </table:table-cell>
          <table:table-cell office:value-type="string">
            <text:p>The code is used to uniquely identify the objects in the PROLIST online dictionary.</text:p>
          </table:table-cell>
          <table:table-cell office:value-type="string">
            <text:p>PROLIST</text:p>
          </table:table-cell>
          <table:table-cell office:value-type="string">
            <text:p>DIN - Deutsches Institut für Normung e.V.\nAttn: Mr. Cord Wischhöfer\nBurggrafenstrasse 6\n10787 Berlin, Germany\nE-Mail: cord.wischhoefer@din.de\nTel: +49 (30) 2601 - 2535</text:p>
          </table:table-cell>
          <table:table-cell table:style-name="ce4" office:value-type="string">
            <text:p>8-May-06</text:p>
          </table:table-cell>
          <table:table-cell table:number-columns-repeated="4"/>
          <table:table-cell table:style-name="ce3" table:number-columns-repeated="16363"/>
        </table:table-row>
        <table:table-row table:style-name="ro1" table:visibility="filter">
          <table:table-cell office:value-type="float" office:value="173">
            <text:p>173</text:p>
          </table:table-cell>
          <table:table-cell table:style-name="ce4" office:value-type="string">
            <text:p>true</text:p>
          </table:table-cell>
          <table:table-cell table:number-columns-repeated="2" office:value-type="string">
            <text:p>eCI@ss</text:p>
          </table:table-cell>
          <table:table-cell office:value-type="string">
            <text:p>To uniquely identify properties, classes and list of characteristics (LoC) for products\nand services available in the eCI@ss classification system</text:p>
          </table:table-cell>
          <table:table-cell office:value-type="string">
            <text:p>eCI@ss,\nMr. Thorsten Hohnle\nGustav-Heinemann-Ufer 84-88,\n50968 Cologne\nGermany\nEmail: hoehnle@eclass-office.com\nTel: +49 (221) 4981-831\nFax:’ +49 (221) 4981-856</text:p>
          </table:table-cell>
          <table:table-cell office:value-type="string">
            <text:p>This code consists of:\n1) ICD 4 digits\n2) Organization identifier\n3) Organization Part identifier\n4) OPIS\nNo check character required</text:p>
          </table:table-cell>
          <table:table-cell office:value-type="string">
            <text:p>None</text:p>
          </table:table-cell>
          <table:table-cell table:number-columns-repeated="2"/>
          <table:table-cell office:value-type="string">
            <text:p>No</text:p>
          </table:table-cell>
          <table:table-cell office:value-type="string">
            <text:p>Not reused after assigned once</text:p>
          </table:table-cell>
          <table:table-cell office:value-type="string">
            <text:p>eCI@ss, members of eCI@ss organization and companies or organizations\nexchanging data with eCI@ss, its members and other companies based on the\neCI@ss classification system.</text:p>
          </table:table-cell>
          <table:table-cell office:value-type="string">
            <text:p>The code is used to uniquely identify objects in the eCI@ss classification system.</text:p>
          </table:table-cell>
          <table:table-cell/>
          <table:table-cell office:value-type="string">
            <text:p>DIN – Deutsches Institut fur Normung e.v.\nAttn: Mr. Cord Wischhofer\nBurggrafenstrasse 6\n10787 Berlin, Germany\nEmail: cord.wischhoefer@din.de\nTel: +49 (30) 2601-2535</text:p>
          </table:table-cell>
          <table:table-cell table:style-name="ce4" office:value-type="string">
            <text:p>28-Nov-06</text:p>
          </table:table-cell>
          <table:table-cell table:number-columns-repeated="4"/>
          <table:table-cell table:style-name="ce3" table:number-columns-repeated="16363"/>
        </table:table-row>
        <table:table-row table:style-name="ro1" table:visibility="filter">
          <table:table-cell office:value-type="float" office:value="174">
            <text:p>174</text:p>
          </table:table-cell>
          <table:table-cell table:style-name="ce4" office:value-type="string">
            <text:p>true</text:p>
          </table:table-cell>
          <table:table-cell table:number-columns-repeated="2" office:value-type="string">
            <text:p>StepNexus</text:p>
          </table:table-cell>
          <table:table-cell office:value-type="string">
            <text:p>To provide identifiers within StepNexus loader objects. These addresses will be used\nto uniquely identify StepNexu key usage fields within X509 certificates for use in the\nStepNexus loader scheme.</text:p>
          </table:table-cell>
          <table:table-cell office:value-type="string">
            <text:p>StepNexus,\nSt Andrews House,\nThe Links,\nKelvin Close,\nBirchwood,\nWarrington,\nCheshire\nWA3 7PB</text:p>
          </table:table-cell>
          <table:table-cell/>
          <table:table-cell office:value-type="string">
            <text:p>StepNexus Loader</text:p>
          </table:table-cell>
          <table:table-cell table:number-columns-repeated="2"/>
          <table:table-cell office:value-type="string">
            <text:p>No</text:p>
          </table:table-cell>
          <table:table-cell/>
          <table:table-cell office:value-type="string">
            <text:p>StepNexus</text:p>
          </table:table-cell>
          <table:table-cell office:value-type="string">
            <text:p>Used to define unique certificate attributes within X509 certificates</text:p>
          </table:table-cell>
          <table:table-cell/>
          <table:table-cell office:value-type="string">
            <text:p>BSI</text:p>
          </table:table-cell>
          <table:table-cell table:style-name="ce4" office:value-type="string">
            <text:p>12-Jul-07</text:p>
          </table:table-cell>
          <table:table-cell table:number-columns-repeated="4"/>
          <table:table-cell table:style-name="ce3" table:number-columns-repeated="16363"/>
        </table:table-row>
        <table:table-row table:style-name="ro1">
          <table:table-cell office:value-type="float" office:value="175">
            <text:p>175</text:p>
          </table:table-cell>
          <table:table-cell table:style-name="ce4" office:value-type="string">
            <text:p>false</text:p>
          </table:table-cell>
          <table:table-cell office:value-type="string">
            <text:p>Siemens AG</text:p>
          </table:table-cell>
          <table:table-cell office:value-type="string">
            <text:p>Siemens OrgID</text:p>
          </table:table-cell>
          <table:table-cell office:value-type="string">
            <text:p>The Code unambiguously identifies Siemens Organizational\nElements with a so-called Organizational Identifier (OrgID) within\nElectronic Data Interchange (EDI) and Identification in related\nnetworks such as PEPPOL.</text:p>
          </table:table-cell>
          <table:table-cell office:value-type="string">
            <text:p>Siemens AG, Otto-Hahn-Ring 6, 81739 Munich, Germany</text:p>
          </table:table-cell>
          <table:table-cell/>
          <table:table-cell office:value-type="string">
            <text:p>None</text:p>
          </table:table-cell>
          <table:table-cell office:value-type="string">
            <text:p>A - Z, 0 - 9</text:p>
          </table:table-cell>
          <table:table-cell office:value-type="string">
            <text:p>Usually English or German</text:p>
          </table:table-cell>
          <table:table-cell office:value-type="string">
            <text:p>No</text:p>
          </table:table-cell>
          <table:table-cell office:value-type="string">
            <text:p>Unique identifier, no reuse in case of deactivation of a OrgID</text:p>
          </table:table-cell>
          <table:table-cell office:value-type="string">
            <text:p>Siemens AG, Germany</text:p>
          </table:table-cell>
          <table:table-cell office:value-type="string">
            <text:p>The Code unambiguously identifies Siemens Organizational\nElements with a so-called Organizational Identifier (OrgID) within\nElectronic Data Interchange (EDI) and Identification in related\nnetworks such as PEPPOL</text:p>
          </table:table-cell>
          <table:table-cell/>
          <table:table-cell office:value-type="string">
            <text:p>DIN – Deutsches Institut fur Normung e.V.\nAttn: Eva Zeitz\nBurggrafenstr. 6; 10787 Berlin\nEmail: eva.zeitz@din.de\nTel: +49 30 2601-2729</text:p>
          </table:table-cell>
          <table:table-cell table:style-name="ce5" office:value-type="date" office:date-value="2007-11-29">
            <text:p>2007-11-29</text:p>
          </table:table-cell>
          <table:table-cell office:value-type="string">
            <text:p>Updated on 2023-12-31: updated intended purpose, scheme name</text:p>
          </table:table-cell>
          <table:table-cell/>
          <table:table-cell office:value-type="string">
            <text:p>This code consists of:\n1. ICD 4 digits\n2. up to 10-digit alphanumeric code\n3. ---\n4. ---</text:p>
          </table:table-cell>
          <table:table-cell office:value-type="string">
            <text:p>2023-12-31 03:11:40 UTC</text:p>
          </table:table-cell>
          <table:table-cell table:style-name="ce3" table:number-columns-repeated="16363"/>
        </table:table-row>
        <table:table-row table:style-name="ro1" table:visibility="filter">
          <table:table-cell office:value-type="float" office:value="176">
            <text:p>176</text:p>
          </table:table-cell>
          <table:table-cell table:style-name="ce4" office:value-type="string">
            <text:p>true</text:p>
          </table:table-cell>
          <table:table-cell table:number-columns-repeated="2" office:value-type="string">
            <text:p>Paradine GmbH</text:p>
          </table:table-cell>
          <table:table-cell office:value-type="string">
            <text:p>To uniquely identify properties, classes,and list of properties (LoP) for products and\nservices available in Paradine Reference Dictionary Systems</text:p>
          </table:table-cell>
          <table:table-cell office:value-type="string">
            <text:p>Paradine GmbH, Prinz Eugen Strasse 70, 1040 Vienna, Austria</text:p>
          </table:table-cell>
          <table:table-cell office:value-type="string">
            <text:p>This code consists of:\n1. ICD 4 digits\n2. Organisation Identifier\n3. Organisation Part Identifier\n4. OPIS\nNo check character required</text:p>
          </table:table-cell>
          <table:table-cell office:value-type="string">
            <text:p>None</text:p>
          </table:table-cell>
          <table:table-cell/>
          <table:table-cell office:value-type="string">
            <text:p>English, German and others</text:p>
          </table:table-cell>
          <table:table-cell office:value-type="string">
            <text:p>Yes</text:p>
          </table:table-cell>
          <table:table-cell office:value-type="string">
            <text:p>Not reused after assigned once</text:p>
          </table:table-cell>
          <table:table-cell office:value-type="string">
            <text:p>Paradine, customers of Paradine and companies or organizations exchanging data\nwith Paradine, its members and other companies based on the Paradine Reference\nDictionary Systems</text:p>
          </table:table-cell>
          <table:table-cell office:value-type="string">
            <text:p>The code is used to uniquely identify objects in Paradine Reference Dictionary\nSystems</text:p>
          </table:table-cell>
          <table:table-cell/>
          <table:table-cell office:value-type="string">
            <text:p>DIN – Deutsches Institut fur Normung e.v.\nAttn: Mr. Cord Wischhofer\nBurggrafenstrasse 6\n10787 Berlin, Germany\nEmail: cord.wischhoefer@din.de\nTel: +49 (30) 2601-2535</text:p>
          </table:table-cell>
          <table:table-cell table:style-name="ce4" office:value-type="string">
            <text:p>31-Jan-08</text:p>
          </table:table-cell>
          <table:table-cell table:number-columns-repeated="4"/>
          <table:table-cell table:style-name="ce3" table:number-columns-repeated="16363"/>
        </table:table-row>
        <table:table-row table:style-name="ro1" table:visibility="filter">
          <table:table-cell office:value-type="float" office:value="177">
            <text:p>177</text:p>
          </table:table-cell>
          <table:table-cell table:style-name="ce4" office:value-type="string">
            <text:p>true</text:p>
          </table:table-cell>
          <table:table-cell table:number-columns-repeated="2" office:value-type="string">
            <text:p>Odette International Limited</text:p>
          </table:table-cell>
          <table:table-cell office:value-type="string">
            <text:p>For use in EDI and other B2B exchanges in the European automotive industry to\nidentify business entities (organisations).</text:p>
          </table:table-cell>
          <table:table-cell office:value-type="string">
            <text:p>Odette International Limited, Forbes House, Halkin Street, London SW1X 7DS</text:p>
          </table:table-cell>
          <table:table-cell office:value-type="string">
            <text:p>This code consists of:\n1. ICD 4 digits</text:p>
          </table:table-cell>
          <table:table-cell office:value-type="string">
            <text:p>None</text:p>
          </table:table-cell>
          <table:table-cell office:value-type="string">
            <text:p>A to Z (upper case) and 0 to 9</text:p>
          </table:table-cell>
          <table:table-cell office:value-type="string">
            <text:p>English</text:p>
          </table:table-cell>
          <table:table-cell office:value-type="string">
            <text:p>Yes</text:p>
          </table:table-cell>
          <table:table-cell office:value-type="string">
            <text:p>No re-allocation of withdrawn OIs is planned</text:p>
          </table:table-cell>
          <table:table-cell office:value-type="string">
            <text:p>Vehicle manufacturers, suppliers and service providers in the European automotive\nindustry</text:p>
          </table:table-cell>
          <table:table-cell office:value-type="string">
            <text:p>The scheme is used to identify organisations, and parts of organisations which are\nparties to or are referenced in automotive supply chain transactions such as EDI\nmessaging and other B2B exchanges.</text:p>
          </table:table-cell>
          <table:table-cell office:value-type="string">
            <text:p>None</text:p>
          </table:table-cell>
          <table:table-cell office:value-type="string">
            <text:p>BSI Committee IST/40\nAttn: Mr Phil Brown (Chair of IST/40)\nBSI Group Headquarters, 389 Chiswick High Road, London, W4 4AL, UK\nT: +44 (0)20 8996 7789\nF: +44 (0)20 8996 7198\nE: telecoms@bsigroup.co</text:p>
          </table:table-cell>
          <table:table-cell table:style-name="ce4" office:value-type="string">
            <text:p>07-Apr-08</text:p>
          </table:table-cell>
          <table:table-cell table:number-columns-repeated="4"/>
          <table:table-cell table:style-name="ce3" table:number-columns-repeated="16363"/>
        </table:table-row>
        <table:table-row table:style-name="ro1" table:visibility="filter">
          <table:table-cell office:value-type="float" office:value="178">
            <text:p>178</text:p>
          </table:table-cell>
          <table:table-cell table:style-name="ce4" office:value-type="string">
            <text:p>true</text:p>
          </table:table-cell>
          <table:table-cell table:number-columns-repeated="2" office:value-type="string">
            <text:p>Route1 MobiNET</text:p>
          </table:table-cell>
          <table:table-cell office:value-type="string">
            <text:p>For rooting OIDs defined by Route1 Security Corporation for Route1 MobiNET.\nIntended to cover MobiNET connected organizations, Route1 Security Corporation,\nits subdivisions, customers and any organization using MobiNET or Route1's\nservices and products</text:p>
          </table:table-cell>
          <table:table-cell office:value-type="string">
            <text:p>Route1 Security Corporation\nAttn Yamian Quintero\n1920-155 University Avenue\nToronto\nOntario M5H 3B7\nCanada\nTel +1 416.848.8391 x2232\nFax +1 416.848.8394</text:p>
          </table:table-cell>
          <table:table-cell office:value-type="string">
            <text:p>6 Fields:\n1. ICD (International Code Designator): integer, variable length, up to 4 digits - range:\n0-9999\n2. AFI (Authority and Format Identifier): integer, 1 byte fixed length, range: 0-99\n3. PCI (Purpose Class Identifier): integer, 2 bytes fixed length, range: 0-9999\n4. Org_ID (Organization Identifier): variable length, up to 35 characters\n5. OPI (organizational Part Identifier): variable length, up to 35 characters\n6. MC (MobiNET Code): integer, 2 bytes fixed length, range: 0-9999</text:p>
          </table:table-cell>
          <table:table-cell office:value-type="string">
            <text:p>None</text:p>
          </table:table-cell>
          <table:table-cell office:value-type="string">
            <text:p>Alphanumeric (0-9 and upper and lower case a-z)</text:p>
          </table:table-cell>
          <table:table-cell office:value-type="string">
            <text:p>English</text:p>
          </table:table-cell>
          <table:table-cell office:value-type="string">
            <text:p>Yes</text:p>
          </table:table-cell>
          <table:table-cell office:value-type="string">
            <text:p>Reuse prohibited</text:p>
          </table:table-cell>
          <table:table-cell office:value-type="string">
            <text:p>MobiNET connected organizations or other Route1 PKI entities</text:p>
          </table:table-cell>
          <table:table-cell office:value-type="string">
            <text:p>For rooting OIDs defined by Route1 Security Corporation for Route1 MobiNET.\nIntended to cover MobiNET connected organizations, Route1 Security Corporation,\nits subdivisions, customers and any organization using MobiNET or Route1's\nservices and products.\nThe OID structure and the inclusion therein of the ICS is as follows: ISO.Identified-\norganization.ICD(Route1 MobiNET).AFI.PCI.Org_ID.OPI.MC</text:p>
          </table:table-cell>
          <table:table-cell office:value-type="string">
            <text:p>Route1 Security, ROI, MobiNET</text:p>
          </table:table-cell>
          <table:table-cell office:value-type="string">
            <text:p>Standards Council of Canada\nAttn M Bourassa\n270 Albert Street, Suite 200\nOttawa\nOntario K1P 6N7\nCanada\nTel + 1-613-238-3222\nFax: +1-613-395-4564\nmmbourassa@scc.ca</text:p>
          </table:table-cell>
          <table:table-cell table:style-name="ce4" office:value-type="string">
            <text:p>02-May-08</text:p>
          </table:table-cell>
          <table:table-cell table:number-columns-repeated="4"/>
          <table:table-cell table:style-name="ce3" table:number-columns-repeated="16363"/>
        </table:table-row>
        <table:table-row table:style-name="ro1" table:visibility="filter">
          <table:table-cell office:value-type="float" office:value="179">
            <text:p>179</text:p>
          </table:table-cell>
          <table:table-cell table:style-name="ce4" office:value-type="string">
            <text:p>true</text:p>
          </table:table-cell>
          <table:table-cell table:number-columns-repeated="2" office:value-type="string">
            <text:p>Penango Object Identifiers</text:p>
          </table:table-cell>
          <table:table-cell office:value-type="string">
            <text:p>To identify objects, policies, and data related to Penango’s products and services.</text:p>
          </table:table-cell>
          <table:table-cell office:value-type="string">
            <text:p>Penango, Inc.\n1215 K Street\n17th Floor\nSacramento, CA 95814 USA\nTel: +1 (888) 273-6264\nFax: +1 (888) 273-6264\noid+icd@penango.com</text:p>
          </table:table-cell>
          <table:table-cell office:value-type="string">
            <text:p>The OID structure and the inclusion therein of the ICD is as follows: Level 1: iso(1)\nLevel 2: identified-organization (3) Level 3: Penango(xxxx) Level 4 and higher: Defined\nby Penango</text:p>
          </table:table-cell>
          <table:table-cell office:value-type="string">
            <text:p>None</text:p>
          </table:table-cell>
          <table:table-cell office:value-type="string">
            <text:p>The minimum character repertoire required to express the full range of organization\nidentifiers is the set of digits 0-9 for the numeric values of ASN.1 object identifiers. A\nseparator between numbers, such as a dot (period), may be used.</text:p>
          </table:table-cell>
          <table:table-cell office:value-type="string">
            <text:p>English</text:p>
          </table:table-cell>
          <table:table-cell office:value-type="string">
            <text:p>Yes</text:p>
          </table:table-cell>
          <table:table-cell office:value-type="string">
            <text:p>The minimum period depends on the terms under which the organization identifier is\nissued, taking into account technical, administrative, and regulatory issues. It is\nexpected to vary from an hour up to six months.</text:p>
          </table:table-cell>
          <table:table-cell office:value-type="string">
            <text:p>Penango, its subdivisions, its customers, and any organization using Penango’s\ncryptographic products and services. Such customers and organizations include\nindividuals, groups, companies, governments, and standards bodies.</text:p>
          </table:table-cell>
          <table:table-cell office:value-type="string">
            <text:p>The ICD is primarily intended for registration of Object Identifiers in accordance with\nISO/IEC 8824 (ASN.1).</text:p>
          </table:table-cell>
          <table:table-cell/>
          <table:table-cell office:value-type="string">
            <text:p>American National Standards Institute (ANSI) - USA</text:p>
          </table:table-cell>
          <table:table-cell table:style-name="ce4" office:value-type="string">
            <text:p>15-May-2009</text:p>
          </table:table-cell>
          <table:table-cell table:number-columns-repeated="4"/>
          <table:table-cell table:style-name="ce3" table:number-columns-repeated="16363"/>
        </table:table-row>
        <table:table-row table:style-name="ro1" table:visibility="filter">
          <table:table-cell office:value-type="float" office:value="180">
            <text:p>180</text:p>
          </table:table-cell>
          <table:table-cell table:style-name="ce4" office:value-type="string">
            <text:p>true</text:p>
          </table:table-cell>
          <table:table-cell table:number-columns-repeated="2" office:value-type="string">
            <text:p>Lithuanian military PKI</text:p>
          </table:table-cell>
          <table:table-cell office:value-type="string">
            <text:p>Index of the Certification Policies and Certification Practices Statements issued by\nLithuanian military PKI</text:p>
          </table:table-cell>
          <table:table-cell office:value-type="string">
            <text:p>The Ministry of National Defence of the Republic of Lithuania,\nTotoriu Str. 25/3,\nLT-01121 Vilnius\nLithuania\nATTN: Cpt. Aurelijus Andrijauskas\nE-mail: ssc@kam.lt\nTel: +370 5 2785225\nFax: +370 5 2735555</text:p>
          </table:table-cell>
          <table:table-cell office:value-type="string">
            <text:p>3 fields: 1) PKI code; 2) CP/CPS code; 3) doc-code\n1) PKI code: length up to 3 digits;\n2) CP/CPS code: length up to 4 digits;\n3) doc-code: length up to 4 digits</text:p>
          </table:table-cell>
          <table:table-cell office:value-type="string">
            <text:p>None</text:p>
          </table:table-cell>
          <table:table-cell office:value-type="string">
            <text:p>Alphanumeric (0-9 and upper and lower case a-z)</text:p>
          </table:table-cell>
          <table:table-cell office:value-type="string">
            <text:p>English, Lithuanian</text:p>
          </table:table-cell>
          <table:table-cell office:value-type="string">
            <text:p>Yes</text:p>
          </table:table-cell>
          <table:table-cell office:value-type="string">
            <text:p>Reuse is prohibited</text:p>
          </table:table-cell>
          <table:table-cell office:value-type="string">
            <text:p>Lithuanian defence bodies using Lithuanian military PKI</text:p>
          </table:table-cell>
          <table:table-cell office:value-type="string">
            <text:p>The code is used to uniquely identify Certification Policies and Certification Practice\nStatements in Lithuanian military PKI</text:p>
          </table:table-cell>
          <table:table-cell office:value-type="string">
            <text:p>None</text:p>
          </table:table-cell>
          <table:table-cell office:value-type="string">
            <text:p>The Lithuanian Standards Board under The Ministry of Environment,\nT. Kosciuskos Str. 30,\nLT-01100 Vilnius\nLithuania\nATTN: Valteris Muzas\nTel: +350 5 2709360\nFax: +370 5 2126252\nE-mail: lstboard@lsd.lt</text:p>
          </table:table-cell>
          <table:table-cell table:style-name="ce4" office:value-type="string">
            <text:p>28-Sep-2009</text:p>
          </table:table-cell>
          <table:table-cell table:number-columns-repeated="4"/>
          <table:table-cell table:style-name="ce3" table:number-columns-repeated="16363"/>
        </table:table-row>
        <table:table-row table:style-name="ro1" table:visibility="filter">
          <table:table-cell office:value-type="float" office:value="181">
            <text:p>181</text:p>
          </table:table-cell>
          <table:table-cell table:style-name="ce4" office:value-type="string">
            <text:p>true</text:p>
          </table:table-cell>
          <table:table-cell table:number-columns-repeated="2" office:value-type="string">
            <text:p>(Not Assigned)</text:p>
          </table:table-cell>
          <table:table-cell table:number-columns-repeated="17"/>
          <table:table-cell table:style-name="ce3" table:number-columns-repeated="16363"/>
        </table:table-row>
        <table:table-row table:style-name="ro1" table:visibility="filter">
          <table:table-cell office:value-type="float" office:value="182">
            <text:p>182</text:p>
          </table:table-cell>
          <table:table-cell table:style-name="ce4" office:value-type="string">
            <text:p>true</text:p>
          </table:table-cell>
          <table:table-cell table:number-columns-repeated="2" office:value-type="string">
            <text:p>Luxembourgish Healthcare Object Identifiers</text:p>
          </table:table-cell>
          <table:table-cell office:value-type="string">
            <text:p>To provide object identifiers for the Luxembourgish healthcare\nsector. This includes identifiers for healthcare providing\ninstitutions as well as identifiers which are required for\nsemantical interoperability issues (e.g. templateIds, code-set\nidentifiers, etc.)</text:p>
          </table:table-cell>
          <table:table-cell office:value-type="string">
            <text:p>Agence eSanté\n125, route d'Esch\nL-1471 Luxembourg\nTel.: +352 27 12 50 18 1\nFax: +352 27 12 52 30 1\nEmail: oid-management@agence-esante.lu\nhttp://www.agence-esante.lu\nContact: Mr. Krippes / Mr. Zimmermann</text:p>
          </table:table-cell>
          <table:table-cell office:value-type="string">
            <text:p>The identifier consists of sequence of digits, which may be\nseparated.\n1) Variable-length sequence of decimal digits.\n2) No checksum.</text:p>
          </table:table-cell>
          <table:table-cell office:value-type="string">
            <text:p>None</text:p>
          </table:table-cell>
          <table:table-cell office:value-type="string">
            <text:p>0-9 is the minimum character repertoire</text:p>
          </table:table-cell>
          <table:table-cell office:value-type="string">
            <text:p>English</text:p>
          </table:table-cell>
          <table:table-cell office:value-type="string">
            <text:p>Later nodes in the OID tree may support organization parts</text:p>
          </table:table-cell>
          <table:table-cell office:value-type="string">
            <text:p>Identifiers must not be reused</text:p>
          </table:table-cell>
          <table:table-cell office:value-type="string">
            <text:p>Institutions of the healthcare sector of Luxembourg</text:p>
          </table:table-cell>
          <table:table-cell office:value-type="string">
            <text:p>The code is primarily intended for registration of Object\nIdentifiers according to ISO/IEC 8824 (ASN.1)\nLevel 1: iso(1)\nLevel 2: identified organization (3)\nLevel 3: &lt;the ICD code allocated&gt;\nLevel 4 and higher: &lt;defined by agence-estante&gt;</text:p>
          </table:table-cell>
          <table:table-cell office:value-type="string">
            <text:p>LUXHEALTH-OID</text:p>
          </table:table-cell>
          <table:table-cell office:value-type="string">
            <text:p>ILNAS Luxembourg Centre\n34-40, avenue de la Porte-Neuve\nL-2227 Luxembourg (Lëtzebuerg)\nTél: (+352) 46 97 46-1\nFax: (+352) 22 25 24\ne-mail: info@ilnas.public.lu\nB.P.: 10 L-2010 Luxembourg</text:p>
          </table:table-cell>
          <table:table-cell table:style-name="ce5" office:value-type="date" office:date-value="2013-04-08">
            <text:p>2013-04-08</text:p>
          </table:table-cell>
          <table:table-cell table:number-columns-repeated="3"/>
          <table:table-cell office:value-type="string">
            <text:p>2013-04-10 09:56:39 UTC</text:p>
          </table:table-cell>
          <table:table-cell table:style-name="ce3" table:number-columns-repeated="16363"/>
        </table:table-row>
        <table:table-row table:style-name="ro1">
          <table:table-cell office:value-type="float" office:value="183">
            <text:p>183</text:p>
          </table:table-cell>
          <table:table-cell table:style-name="ce4" office:value-type="string">
            <text:p>false</text:p>
          </table:table-cell>
          <table:table-cell office:value-type="string">
            <text:p>Numro d'identification suisse des enterprises (IDE), Swiss Unique Business Identification Number (UIDB)</text:p>
          </table:table-cell>
          <table:table-cell office:value-type="string">
            <text:p>Numéro d'identification suisse des enterprises (IDE), Swiss\nUnique Business Identification Number (UIDB)</text:p>
          </table:table-cell>
          <table:table-cell office:value-type="string">
            <text:p>To uniquely identify all companies/organizations registered in\nSwitzerland in all official register (Swiss Register of Commerce,\nVAT register, Canton register, etc)</text:p>
          </table:table-cell>
          <table:table-cell office:value-type="string">
            <text:p>Swiss Federal Statistical Office (FSO),\nEspace de l'Europe 10\nCH-2010 Neuchâtel (Switzerland)\nTel.: +41 32 713 85 94\nFax: +41 31 323 62 63</text:p>
          </table:table-cell>
          <table:table-cell office:value-type="string">
            <text:p>CHEXXXXXXXXP\nUID number, is composed by 9 digits and is random generated\nand has no internal means.\n1)\n12 characters\nCHE: Swiss Country Code following ISO 3166-1.\nXXXXXXXX: 8 digits for the number itself\nP: check digit\n2)\nCHEXXXXXXXXP, the last digit</text:p>
          </table:table-cell>
          <table:table-cell office:value-type="string">
            <text:p>There is no requirements. As suggested in the standards eCH-\n0097 (http://www.ech.ch) the transmission of the UID is without\nany separator.\nFor display reason is suggested to use this format\nCHE-XXX.XXX.XXP minus-character ('-') after 'CHE' and\nseparator dot-character ('.') after 6th and 9th character</text:p>
          </table:table-cell>
          <table:table-cell office:value-type="string">
            <text:p>Country code ISO 3166-1: String "CHE". Numerical characters\n'0'-'9' for the number and the check.</text:p>
          </table:table-cell>
          <table:table-cell office:value-type="string">
            <text:p>German, French, Italian</text:p>
          </table:table-cell>
          <table:table-cell office:value-type="string">
            <text:p>no</text:p>
          </table:table-cell>
          <table:table-cell office:value-type="string">
            <text:p>No reuse</text:p>
          </table:table-cell>
          <table:table-cell office:value-type="string">
            <text:p>All Companies/organizations registered in the public Swiss\nRegisters such as the Swiss Register of Commerce, the VAT\nregister, the Social security agencies Registers, Cantons\nregisters, etc., and publish in the UID Register\n(http://www.uid.admin.ch)</text:p>
          </table:table-cell>
          <table:table-cell office:value-type="string">
            <text:p>The UIDB shall make lt possible to identify an enterprise quickly,\nunambiguously and on a permanent basis.\nThe UIDB and the other identification characteristics associated\nwith it shall be managed via a specific UIDB register. The main\nidentification characteristics (status, address, etc.) shall be\naccessible to the public.</text:p>
          </table:table-cell>
          <table:table-cell office:value-type="string">
            <text:p>Schweizer Unternehmens-ldentifikationsnummer (UID), Numéro\nd'identification suisse des entreprises (IDE), Numero\nd'identificazione svizzero delle imprese (IDI), Swiss Unique\nBusiness Identification Number (UIDB)</text:p>
          </table:table-cell>
          <table:table-cell table:number-columns-repeated="6"/>
          <table:table-cell table:style-name="ce3" table:number-columns-repeated="16363"/>
        </table:table-row>
        <table:table-row table:style-name="ro1" table:visibility="filter">
          <table:table-cell office:value-type="float" office:value="184">
            <text:p>184</text:p>
          </table:table-cell>
          <table:table-cell table:style-name="ce4" office:value-type="string">
            <text:p>true</text:p>
          </table:table-cell>
          <table:table-cell table:number-columns-repeated="2" office:value-type="string">
            <text:p>DIGSTORG</text:p>
          </table:table-cell>
          <table:table-cell office:value-type="string">
            <text:p>To be used for identifying Danish companies included juridical\npersons and associations in international trade</text:p>
          </table:table-cell>
          <table:table-cell office:value-type="string">
            <text:p>The Danish Agency for Digitisation\nLandgreven 4\nPostboks 2193\nDK-1017 Copenhagen K\nDenmark\nTel: +45 33 92 52 00\nE-mail: digst@digst.dk</text:p>
          </table:table-cell>
          <table:table-cell office:value-type="string">
            <text:p>8 or 10 digits</text:p>
          </table:table-cell>
          <table:table-cell office:value-type="string">
            <text:p>Group of 10 digits</text:p>
          </table:table-cell>
          <table:table-cell/>
          <table:table-cell office:value-type="string">
            <text:p>English</text:p>
          </table:table-cell>
          <table:table-cell table:number-columns-repeated="2"/>
          <table:table-cell office:value-type="string">
            <text:p>Danish companies included juridical persons and associations</text:p>
          </table:table-cell>
          <table:table-cell office:value-type="string">
            <text:p>It is possible to add 0-4 characters set to the code for more\ndetailed use of one organization. Characters are digits or capital\nletter.</text:p>
          </table:table-cell>
          <table:table-cell/>
          <table:table-cell office:value-type="string">
            <text:p>Dansk Standard (DS) (Danish Standards Foundation)\nKollegievej 6\nDK-2920 Charlottenlund\nDenmark</text:p>
          </table:table-cell>
          <table:table-cell table:style-name="ce5" office:value-type="date" office:date-value="2013-05-08">
            <text:p>2013-05-08</text:p>
          </table:table-cell>
          <table:table-cell table:number-columns-repeated="3"/>
          <table:table-cell office:value-type="string">
            <text:p>2013-05-08 19:30:16 UTC</text:p>
          </table:table-cell>
          <table:table-cell table:style-name="ce3" table:number-columns-repeated="16363"/>
        </table:table-row>
        <table:table-row table:style-name="ro1" table:visibility="filter">
          <table:table-cell office:value-type="float" office:value="185">
            <text:p>185</text:p>
          </table:table-cell>
          <table:table-cell table:style-name="ce4" office:value-type="string">
            <text:p>true</text:p>
          </table:table-cell>
          <table:table-cell table:number-columns-repeated="2" office:value-type="string">
            <text:p>Perceval Object Code</text:p>
          </table:table-cell>
          <table:table-cell office:value-type="string">
            <text:p>Intended to uniquely identify in an international context any\nphysical and or abstract entities related to Perceval products and\nservices using Abstract Syntax Notation <text:s/>One in accordance with\nISO/IEC 8824</text:p>
          </table:table-cell>
          <table:table-cell office:value-type="string">
            <text:p>Perceval SA, Tenbosch 9, 1000 Brussels, Belgium\nMr Henri-Jean Pollet, E-mail hjp@perceval.net\nTel +32 2 640 9194, Fax +32 2 640 3154</text:p>
          </table:table-cell>
          <table:table-cell office:value-type="string">
            <text:p>The code is primarily intended for the registration of object\nidentifiers in the International Object Identifier tree in accordance\nwith ISO/IEC 8824 under the top arcs iso(1) identified-\norganization(3) perceval(International Code Designator value).\nThe lower levels are defined by Perceval.\nVariable length encoding using dotted notation.\nNo check characters.</text:p>
          </table:table-cell>
          <table:table-cell office:value-type="string">
            <text:p>None.</text:p>
          </table:table-cell>
          <table:table-cell office:value-type="string">
            <text:p>Digit zero to digit nine.</text:p>
          </table:table-cell>
          <table:table-cell office:value-type="string">
            <text:p>English primarily but could be any language expressed in UTF-8\nUnicode character set</text:p>
          </table:table-cell>
          <table:table-cell office:value-type="string">
            <text:p>Yes</text:p>
          </table:table-cell>
          <table:table-cell office:value-type="string">
            <text:p>Identifiers are not planned to be reused once allocated.</text:p>
          </table:table-cell>
          <table:table-cell office:value-type="string">
            <text:p>Any domestic or foreign party using Perceval products and\nservices</text:p>
          </table:table-cell>
          <table:table-cell office:value-type="string">
            <text:p>The ICD is primarily intended for registration and resolution of\nObject Identifiers in accordance with ISO/IEC 8824 with reduced\nencoding size and non-geographic context</text:p>
          </table:table-cell>
          <table:table-cell office:value-type="string">
            <text:p>The abbreviation used to refer to the Perceval Object Code is\nPOC</text:p>
          </table:table-cell>
          <table:table-cell office:value-type="string">
            <text:p>NBN (Bureau voor Normalisatie - Bureau de Normalisation)\nJoseph II-straat 40 bus 6, Rue Jozef II boite 6\n1000 Brussels\nBelgium</text:p>
          </table:table-cell>
          <table:table-cell table:style-name="ce5" office:value-type="date" office:date-value="2013-12-04">
            <text:p>2013-12-04</text:p>
          </table:table-cell>
          <table:table-cell table:number-columns-repeated="3"/>
          <table:table-cell office:value-type="string">
            <text:p>2013-12-04 13:48:49 UTC</text:p>
          </table:table-cell>
          <table:table-cell table:style-name="ce3" table:number-columns-repeated="16363"/>
        </table:table-row>
        <table:table-row table:style-name="ro1" table:visibility="filter">
          <table:table-cell office:value-type="float" office:value="186">
            <text:p>186</text:p>
          </table:table-cell>
          <table:table-cell table:style-name="ce4" office:value-type="string">
            <text:p>true</text:p>
          </table:table-cell>
          <table:table-cell table:number-columns-repeated="2" office:value-type="string">
            <text:p>TrustPoint Object Identifiers</text:p>
          </table:table-cell>
          <table:table-cell office:value-type="string">
            <text:p>To uniquely identify objects and mechanisms globally throughout\ncommunications networks using TrustPoint security products and\nservices</text:p>
          </table:table-cell>
          <table:table-cell office:value-type="string">
            <text:p>TrustPoint Innovation Technologies,\nAttn: Sherry Shannon-Vanstone,\n816 Hideaway Circle East, Unit 244\nMarco Island, FL 34145 USA\nhttp://www.trustpointinnovation.com\nTel: +1 905 302 6929\nEmail: sviconsulting@aol.com</text:p>
          </table:table-cell>
          <table:table-cell office:value-type="string">
            <text:p>1) ICD, 2) Object class, 3) Object number(s)\nNumber of characters and their significance: Object class 1 or 2\ndigits, Object number(s) multiple levels of 1 or more digits</text:p>
          </table:table-cell>
          <table:table-cell office:value-type="string">
            <text:p>None.</text:p>
          </table:table-cell>
          <table:table-cell table:number-columns-repeated="7"/>
          <table:table-cell office:value-type="string">
            <text:p>ANSI\n25 W. 43rd Street, Floor 4\nNew York, NY 10036 USA</text:p>
          </table:table-cell>
          <table:table-cell table:style-name="ce5" office:value-type="date" office:date-value="2013-12-31">
            <text:p>2013-12-31</text:p>
          </table:table-cell>
          <table:table-cell table:number-columns-repeated="3"/>
          <table:table-cell office:value-type="string">
            <text:p>2013-12-31 23:54:49 UTC</text:p>
          </table:table-cell>
          <table:table-cell table:style-name="ce3" table:number-columns-repeated="16363"/>
        </table:table-row>
        <table:table-row table:style-name="ro1" table:visibility="filter">
          <table:table-cell office:value-type="float" office:value="187">
            <text:p>187</text:p>
          </table:table-cell>
          <table:table-cell table:style-name="ce4" office:value-type="string">
            <text:p>true</text:p>
          </table:table-cell>
          <table:table-cell table:number-columns-repeated="2" office:value-type="string">
            <text:p>Amazon Unique Identification Scheme</text:p>
          </table:table-cell>
          <table:table-cell office:value-type="string">
            <text:p>To provide identifiers for properties, classes, groups, or lists of\ndata and objects specified by or used by Amazon.com, Inc. and\nits Affiliates</text:p>
          </table:table-cell>
          <table:table-cell office:value-type="string">
            <text:p>Amazon Technologies, Inc.\nPost Office Box 8102\nReno, Nevada 89507-8102\nUnited States\nContact: Peter Bowen\nTel: +1 206 266 1000\nE-mail: auis-info@amazon.com</text:p>
          </table:table-cell>
          <table:table-cell office:value-type="string">
            <text:p>Each identifier may have a textual description assigned to\ndescribe the identifier. The identifier shall not begin with a zero\nnor shall the character immediately after a full stop character be\na zero unless the zero is the last character in the identifier.\n1) Between one and 35 characters each of which is a digit (0 to\n9) or a full stop character (.)\n2) There is no check character.</text:p>
          </table:table-cell>
          <table:table-cell office:value-type="string">
            <text:p>The textual description may optionally be displayed with the\nidentifier.</text:p>
          </table:table-cell>
          <table:table-cell office:value-type="string">
            <text:p>The digits zero to nine and the full-stop character (Unicode\nU+0030 to U+0039 and U+002E)</text:p>
          </table:table-cell>
          <table:table-cell office:value-type="string">
            <text:p>English</text:p>
          </table:table-cell>
          <table:table-cell office:value-type="string">
            <text:p>Organization identifiers may optionally have Organization Part\nIdentifiers of up to 35 characters from the same character\nrepertoire as the Organization Identifier.</text:p>
          </table:table-cell>
          <table:table-cell office:value-type="string">
            <text:p>Between one hour and one year, depending on the organization\nidentified and reason for reassignment, taking into account\ntechnical and administrative issues.</text:p>
          </table:table-cell>
          <table:table-cell office:value-type="string">
            <text:p>Amazon, customers and suppliers of Amazon, organizations and\nindividuals exchanging data with Amazon, and organizations and\nindividuals using Amazon defined identification schemes.</text:p>
          </table:table-cell>
          <table:table-cell office:value-type="string">
            <text:p>Identifiers assigned under this scheme may be usable as Object\nIdentifiers in accordance with ISO/IEC 8824, usable with\nDirectories in accordance with ISO/IEC 9594, usable in\naccordance with ISO/IEC 8348, or usable in other contexts as\ndefined by Amazon.</text:p>
          </table:table-cell>
          <table:table-cell office:value-type="string">
            <text:p>Amazon UIS, AUIS</text:p>
          </table:table-cell>
          <table:table-cell office:value-type="string">
            <text:p>ANSI\n25 W. 43rd Street, Floor 4\nNew York, NY 10036 USA</text:p>
          </table:table-cell>
          <table:table-cell table:style-name="ce5" office:value-type="date" office:date-value="2015-03-12">
            <text:p>2015-03-12</text:p>
          </table:table-cell>
          <table:table-cell table:number-columns-repeated="3"/>
          <table:table-cell office:value-type="string">
            <text:p>2015-03-12 12:01:30 UTC</text:p>
          </table:table-cell>
          <table:table-cell table:style-name="ce3" table:number-columns-repeated="16363"/>
        </table:table-row>
        <table:table-row table:style-name="ro1" table:visibility="filter">
          <table:table-cell office:value-type="float" office:value="188">
            <text:p>188</text:p>
          </table:table-cell>
          <table:table-cell table:style-name="ce4" office:value-type="string">
            <text:p>true</text:p>
          </table:table-cell>
          <table:table-cell table:number-columns-repeated="2" office:value-type="string">
            <text:p>Corporate Number of The Social Security and Tax Number System</text:p>
          </table:table-cell>
          <table:table-cell office:value-type="string">
            <text:p>The number system of Japan is a social infrastructure to improve\nefficiency and the transparency of the social security and the tax\nsystem, and to achieve a highly convenient, impartial, and fair\nsociety. Additionally, the profit of the number system can be free\nusage for various purposes, so we want to use the Corporate\nNumber as identifiers in various fields, like in electronic commerce,\ntransportation, etc.</text:p>
          </table:table-cell>
          <table:table-cell office:value-type="string">
            <text:p>National Tax Agency Japan\n3-1-1 Kasumigaseki, Chiyoda-ku, Tokyo 100-8978, JAPAN\nTelephone: +81 3 3581 5451\nE-mail: kokuzei-houjinbangou@nta.go.jp\nPoint of Contact: Tadahisa Kodaira</text:p>
          </table:table-cell>
          <table:table-cell office:value-type="string">
            <text:p>12-digit fundamental numbers, and a one-digit check numeral put\nahead of them\n1) Figure of 13 digits\n2) Figures from 1 to 9 (Formula to calculate the test number)\nFormula 9- ((n = 1 (Sigma)12( Pn * Qn )) remainder obtained by\ndividing the 9)\nPn : the numeral of the n-th digit of a fundamental number, when\ncounted from the bottom digit.\nQn : one when the "n" is an odd number, two when the "n" is an\neven one</text:p>
          </table:table-cell>
          <table:table-cell office:value-type="string">
            <text:p>None</text:p>
          </table:table-cell>
          <table:table-cell office:value-type="string">
            <text:p>Figure of 1,2,3,4,5,6,7,8,9,0</text:p>
          </table:table-cell>
          <table:table-cell office:value-type="string">
            <text:p>Japanese</text:p>
          </table:table-cell>
          <table:table-cell office:value-type="string">
            <text:p>None</text:p>
          </table:table-cell>
          <table:table-cell office:value-type="string">
            <text:p>It is not recycled</text:p>
          </table:table-cell>
          <table:table-cell office:value-type="string">
            <text:p>national organizations, local governments, juridical entities that\nhave registered their establishment pursuant to the provisions of\nlaws and regulations, such as the Companies Act (Act No. 86 of\n2005), and juridical entities other than those mentioned and\nassociations without juridical personality, which are required to\nsubmit a written notice pursuant to the provisions of Article 230 of\nthe Income Tax Act, Articles 148, 149, or 150 of the Corporation\nTax Act (Act No. 34 of 1965), or Article 57 of the Consumption Tax\nAct (Act No. 108 of 1988))</text:p>
          </table:table-cell>
          <table:table-cell office:value-type="string">
            <text:p>The preliminary work, numbering the identifiers for the beginning of\nusage in January 2016, is being done.</text:p>
          </table:table-cell>
          <table:table-cell office:value-type="string">
            <text:p>Houjinbango, Corporate Number ( CN )</text:p>
          </table:table-cell>
          <table:table-cell office:value-type="string">
            <text:p>Name: JISC(Japanese Industrial Standards Committee)\nAddress: 1-3-1 Kasumigaseki, Chiyoda-ku, Tokyo 100-8901,\nJAPAN\nTelephone: +81-3-3501-9287\nFacsimile: +81-3-3580-8631\nIndustrial Science and Technology Policy and Environment Bureau\nMinistry of Economy, Trade and Industry</text:p>
          </table:table-cell>
          <table:table-cell table:style-name="ce5" office:value-type="date" office:date-value="2015-10-16">
            <text:p>2015-10-16</text:p>
          </table:table-cell>
          <table:table-cell office:value-type="string">
            <text:p>cord Last Updated : 2015-10-16 12:42:38 UTC</text:p>
          </table:table-cell>
          <table:table-cell table:number-columns-repeated="3"/>
          <table:table-cell table:style-name="ce3" table:number-columns-repeated="16363"/>
        </table:table-row>
        <table:table-row table:style-name="ro1" table:visibility="filter">
          <table:table-cell office:value-type="float" office:value="189">
            <text:p>189</text:p>
          </table:table-cell>
          <table:table-cell table:style-name="ce4" office:value-type="string">
            <text:p>true</text:p>
          </table:table-cell>
          <table:table-cell table:number-columns-repeated="2" office:value-type="string">
            <text:p>European Business Identifier (EBID)</text:p>
          </table:table-cell>
          <table:table-cell office:value-type="string">
            <text:p>For use in EDI or other B2B exchanges to identify business entities\n(organizations).</text:p>
          </table:table-cell>
          <table:table-cell office:value-type="string">
            <text:p>EBID Service AG\nCAS-Weg 1-5\n76131 Karlsruhe\nGermany\nE-mail: kontakt@unternehmensverzeichnis.org\nPhone: +49 721-9638-300</text:p>
          </table:table-cell>
          <table:table-cell office:value-type="string">
            <text:p>XXXXXXXXXXXXC\n1) XXXXXXXXXXXX: Twelve identification digits\nC: Check digit\n2) 13th digit</text:p>
          </table:table-cell>
          <table:table-cell office:value-type="string">
            <text:p>No Requirements</text:p>
          </table:table-cell>
          <table:table-cell office:value-type="string">
            <text:p>Digits 0-9\nUnicode code-points U+0030 through U+0039</text:p>
          </table:table-cell>
          <table:table-cell office:value-type="string">
            <text:p>German, English</text:p>
          </table:table-cell>
          <table:table-cell office:value-type="string">
            <text:p>Yes</text:p>
          </table:table-cell>
          <table:table-cell office:value-type="string">
            <text:p>Not reused after assigned once</text:p>
          </table:table-cell>
          <table:table-cell office:value-type="string">
            <text:p>The EBID number is used to be allocated to all businesses and\ninstitutions engaged in a business activity.</text:p>
          </table:table-cell>
          <table:table-cell office:value-type="string">
            <text:p>The scheme is used to identify organisations, and parts of\norganisations which are parties to or are referenced in electronic\ntransactions such as EDI messaging or other B2B exchanges.</text:p>
          </table:table-cell>
          <table:table-cell/>
          <table:table-cell office:value-type="string">
            <text:p>DIN Deutsches lnstitut fur Normung e. V.\nRoman Grahle\nBurggrafenstr. 6\n10787 Berlin\nGermany\nroman.grahfe@din.de</text:p>
          </table:table-cell>
          <table:table-cell table:style-name="ce5" office:value-type="date" office:date-value="2016-03-09">
            <text:p>2016-03-09</text:p>
          </table:table-cell>
          <table:table-cell office:value-type="string">
            <text:p>cord Last Updated : 2016-03-09 16:54:47 UTC</text:p>
          </table:table-cell>
          <table:table-cell table:number-columns-repeated="3"/>
          <table:table-cell table:style-name="ce3" table:number-columns-repeated="16363"/>
        </table:table-row>
        <table:table-row table:style-name="ro1" table:visibility="filter">
          <table:table-cell office:value-type="float" office:value="190">
            <text:p>190</text:p>
          </table:table-cell>
          <table:table-cell table:style-name="ce4" office:value-type="string">
            <text:p>true</text:p>
          </table:table-cell>
          <table:table-cell table:number-columns-repeated="2" office:value-type="string">
            <text:p>Organisatie Indentificatie Nummer (OIN)</text:p>
          </table:table-cell>
          <table:table-cell office:value-type="string">
            <text:p>The OIN is part of the Dutch standard ‘Digikoppeling’ and is used\nfor identifying the organisations that take part in electronic\nmessage exchange with the Dutch Government. The OIN must\nalso be included in the PKIo certificate.</text:p>
          </table:table-cell>
          <table:table-cell office:value-type="string">
            <text:p>Logius\nPostbus 96810\n2509 JE Den Haag\nNetherlands\nTel: +31 900 555 4555\nAtt. Paul van Gent\nE-mail: paul.van.gent@logius.nl</text:p>
          </table:table-cell>
          <table:table-cell office:value-type="string">
            <text:p>20 digits\n1) Structure: prefix(8)- identification number(8 or 9)- suffix(3 or 4)\n- The first 8 digits prefix designates the origin of the identification\nnumber\n- The following <text:s/>8 or 9 digits designates a unique identification\nnumber\n- The last 3 or 4 (depending on the length of the identification\nnumber are filled with “0” digit [note: Up until 2017 numbers are\nissued where this position contains a serial number.]\n2) No check digit</text:p>
          </table:table-cell>
          <table:table-cell office:value-type="string">
            <text:p>In one group of 20 digits</text:p>
          </table:table-cell>
          <table:table-cell office:value-type="string">
            <text:p>Digits 0-9\nUnicode code-points U+0030 through U+0039</text:p>
          </table:table-cell>
          <table:table-cell office:value-type="string">
            <text:p>Dutch</text:p>
          </table:table-cell>
          <table:table-cell office:value-type="string">
            <text:p>Yes</text:p>
          </table:table-cell>
          <table:table-cell office:value-type="string">
            <text:p>Reuse of withdrawn OIN's is not allowed</text:p>
          </table:table-cell>
          <table:table-cell office:value-type="string">
            <text:p>The Organization Identification Number (OIN) identifies legal\npersons for the purpose of electronic message exchange with the\nDutch government. <text:s/>The OIN is based on identification of the\napplicant through the Netherlands Business Register or another\naffiliated government registrations.</text:p>
          </table:table-cell>
          <table:table-cell office:value-type="string">
            <text:p>The OIN is part of the Dutch standard ‘Digikoppeling’ and is used\nfor identifying the organisations that take part in electronic\nmessage exchange with the Dutch Government. The OIN must\nalso be included in the PKIo certificate.</text:p>
          </table:table-cell>
          <table:table-cell/>
          <table:table-cell office:value-type="string">
            <text:p>NEN\nVlinderweg 6, Delft\nP.O. Box 5059\n2600 GB Delft\nNetherlands\nAtt. Jaap van der Marel, Jaap.vanderMarel@nen.nl</text:p>
          </table:table-cell>
          <table:table-cell table:style-name="ce5" office:value-type="date" office:date-value="2017-11-22">
            <text:p>2017-11-22</text:p>
          </table:table-cell>
          <table:table-cell office:value-type="string">
            <text:p>cord Last Updated : 2017-11-22 18:24:41 UTC</text:p>
          </table:table-cell>
          <table:table-cell table:number-columns-repeated="3"/>
          <table:table-cell table:style-name="ce3" table:number-columns-repeated="16363"/>
        </table:table-row>
        <table:table-row table:style-name="ro1" table:visibility="filter">
          <table:table-cell office:value-type="float" office:value="191">
            <text:p>191</text:p>
          </table:table-cell>
          <table:table-cell table:style-name="ce4" office:value-type="string">
            <text:p>true</text:p>
          </table:table-cell>
          <table:table-cell table:number-columns-repeated="2" office:value-type="string">
            <text:p>Company code</text:p>
          </table:table-cell>
          <table:table-cell office:value-type="string">
            <text:p>For use in EDI or other B2B (B2C) exchanges to identify private\nand public organisations.</text:p>
          </table:table-cell>
          <table:table-cell office:value-type="string">
            <text:p>Centre of Registers and Information Systems of the Ministry of\nJustice\nLõkke 4\n19081 Tallinn\nEstonia\nE-mail: rik@just.ee\nPhone +372 663 6300\nFax: +372 646 0165\nWeb: https://ariregister.rik.ee/index?lang=eng</text:p>
          </table:table-cell>
          <table:table-cell office:value-type="string">
            <text:p>Always 8-digit number\n1) First number in code:\n1 – Commercial organisations\n7 -- State agencies and local government institutions\n8 -- Non-profit associations\n9 -- Foundations\n2)</text:p>
          </table:table-cell>
          <table:table-cell office:value-type="string">
            <text:p>No Requirements</text:p>
          </table:table-cell>
          <table:table-cell office:value-type="string">
            <text:p>Digits 0,1,2,3,4,5,6,7,8,9\nUnicode code-points U+0030 through U+0039</text:p>
          </table:table-cell>
          <table:table-cell office:value-type="string">
            <text:p>Estonian, English</text:p>
          </table:table-cell>
          <table:table-cell office:value-type="string">
            <text:p>None.</text:p>
          </table:table-cell>
          <table:table-cell office:value-type="string">
            <text:p>It is not reused.</text:p>
          </table:table-cell>
          <table:table-cell office:value-type="string">
            <text:p>Commercial organisations, state agencies, local government\ninstitutions, non-profit associations, foundations</text:p>
          </table:table-cell>
          <table:table-cell office:value-type="string">
            <text:p>Company code is major and only unique identifier of all institutions\nand organisations in Estonia. This code is widely used for various\npurposes, including electronic commerce. Usage of company code\nis required in communication between institutions and also in\ncommunication between private and public organisations.</text:p>
          </table:table-cell>
          <table:table-cell office:value-type="string">
            <text:p>reg. code, company code, commercial register code; in Estonian:\nregistrikood, äriregistri kood</text:p>
          </table:table-cell>
          <table:table-cell office:value-type="string">
            <text:p>Estonian Centre for Standardization\nAkadeemia tee 21/6\n12618 Tallinn\nEstonia\nPhone: +372 605 5050\nFax: +372 605 5070\nE-mail: info@evs.ee\nPoint of Contact: Martin Merimaa</text:p>
          </table:table-cell>
          <table:table-cell table:style-name="ce5" office:value-type="date" office:date-value="2018-01-31">
            <text:p>2018-01-31</text:p>
          </table:table-cell>
          <table:table-cell office:value-type="string">
            <text:p>cord Last Updated : 2018-01-31 13:28:55 UTC</text:p>
          </table:table-cell>
          <table:table-cell table:number-columns-repeated="3"/>
          <table:table-cell table:style-name="ce3" table:number-columns-repeated="16363"/>
        </table:table-row>
        <table:table-row table:style-name="ro1" table:visibility="filter">
          <table:table-cell office:value-type="float" office:value="192">
            <text:p>192</text:p>
          </table:table-cell>
          <table:table-cell table:style-name="ce4" office:value-type="string">
            <text:p>true</text:p>
          </table:table-cell>
          <table:table-cell table:number-columns-repeated="2" office:value-type="string">
            <text:p>Organisasjonsnummer</text:p>
          </table:table-cell>
          <table:table-cell office:value-type="string">
            <text:p>Identify entities registered in the Central Coordinating Register for\nLegal Entities in Norway</text:p>
          </table:table-cell>
          <table:table-cell office:value-type="string">
            <text:p>The Brønnøysund Register Centre,\nHavnegata 48,\nN0-8900 Brønnøysund\nPhone: +47 7500 7500\nE-mail: firmapost@brreg.no\nAtt: Trine Blix, trbl@brreg.no</text:p>
          </table:table-cell>
          <table:table-cell/>
          <table:table-cell office:value-type="string">
            <text:p>None.</text:p>
          </table:table-cell>
          <table:table-cell office:value-type="string">
            <text:p>Digits 0,1,2,3,4,5,6,7,8,9\nUnicode code-points U+0030 through U+0039</text:p>
          </table:table-cell>
          <table:table-cell office:value-type="string">
            <text:p>Only digits.</text:p>
          </table:table-cell>
          <table:table-cell office:value-type="string">
            <text:p>No.</text:p>
          </table:table-cell>
          <table:table-cell office:value-type="string">
            <text:p>No reuse of identifier.</text:p>
          </table:table-cell>
          <table:table-cell office:value-type="string">
            <text:p>All businesses, associations and other entities registered in the\nCentral Coordinating Register for Legal Entities in Norway.</text:p>
          </table:table-cell>
          <table:table-cell office:value-type="string">
            <text:p>The scheme with ICD code + organization number will be used to\nidentify organisations that are parties to or referenced in electronic\ntransactions such as electronic invoicing or other B2B exchanges.</text:p>
          </table:table-cell>
          <table:table-cell office:value-type="string">
            <text:p>Org.nr.</text:p>
          </table:table-cell>
          <table:table-cell office:value-type="string">
            <text:p>Standards Norway,\nP.O. Box 242,\nNO-1326 Lysaker, Norway\nPhone: +47 67 83 86 00\nE~mail: info@standard.no\nAtt: Kari S. Borgos, ksb@standard.no</text:p>
          </table:table-cell>
          <table:table-cell table:style-name="ce5" office:value-type="date" office:date-value="2018-04-03">
            <text:p>2018-04-03</text:p>
          </table:table-cell>
          <table:table-cell office:value-type="string">
            <text:p>cord Last Updated : 2018-04-03 19:28:57 UTC</text:p>
          </table:table-cell>
          <table:table-cell/>
          <table:table-cell office:value-type="string">
            <text:p>9 digits\n9\nThe organization number consists of 9 digits where the last digit is\na control digit calculated with standard weights, modulus 11. After\nthis, weights 3, 2, 7, 6, 5, 4, 3 and 2 are calculated from the first\ndigit.</text:p>
          </table:table-cell>
          <table:table-cell/>
          <table:table-cell table:style-name="ce3" table:number-columns-repeated="16363"/>
        </table:table-row>
        <table:table-row table:style-name="ro1" table:visibility="filter">
          <table:table-cell office:value-type="float" office:value="193">
            <text:p>193</text:p>
          </table:table-cell>
          <table:table-cell table:style-name="ce4" office:value-type="string">
            <text:p>true</text:p>
          </table:table-cell>
          <table:table-cell table:number-columns-repeated="2" office:value-type="string">
            <text:p>UBL.BE Party Identifier</text:p>
          </table:table-cell>
          <table:table-cell office:value-type="string">
            <text:p>Identification and addressing of different parties involved in\ninvoicing</text:p>
          </table:table-cell>
          <table:table-cell office:value-type="string">
            <text:p>UBL.BE\n161, Drève Richelle, boîte 71\nB-1410 Waterloo\nBelgium\nPhone: +32 475345713\nE-mail: info@ubl.be\nAttn: Simons Paul</text:p>
          </table:table-cell>
          <table:table-cell/>
          <table:table-cell office:value-type="string">
            <text:p>None.</text:p>
          </table:table-cell>
          <table:table-cell office:value-type="string">
            <text:p>UTF-8 character set</text:p>
          </table:table-cell>
          <table:table-cell office:value-type="string">
            <text:p>None</text:p>
          </table:table-cell>
          <table:table-cell office:value-type="string">
            <text:p>No.</text:p>
          </table:table-cell>
          <table:table-cell office:value-type="string">
            <text:p>N.A.</text:p>
          </table:table-cell>
          <table:table-cell office:value-type="string">
            <text:p>Any entity that can be addressed in an invoice.</text:p>
          </table:table-cell>
          <table:table-cell office:value-type="string">
            <text:p>The UBL.BE Party Identifier is used to identify the different parties\nthat appear in an invoice.</text:p>
          </table:table-cell>
          <table:table-cell office:value-type="string">
            <text:p>N.A.</text:p>
          </table:table-cell>
          <table:table-cell office:value-type="string">
            <text:p>NBN\nRue Joseph II 40, PO Box 6\nB-1000 Brussels\nBelgium</text:p>
          </table:table-cell>
          <table:table-cell table:style-name="ce5" office:value-type="date" office:date-value="2018-06-05">
            <text:p>2018-06-05</text:p>
          </table:table-cell>
          <table:table-cell office:value-type="string">
            <text:p>cord Last Updated : 2018-06-05 13:27:37 UTC</text:p>
          </table:table-cell>
          <table:table-cell/>
          <table:table-cell office:value-type="string">
            <text:p>Maximum 50 characters\n4 Characters fixed length identifying the type\nMaximum 46 characters for the identifier itself</text:p>
          </table:table-cell>
          <table:table-cell/>
          <table:table-cell table:style-name="ce3" table:number-columns-repeated="16363"/>
        </table:table-row>
        <table:table-row table:style-name="ro1" table:visibility="filter">
          <table:table-cell office:value-type="float" office:value="194">
            <text:p>194</text:p>
          </table:table-cell>
          <table:table-cell table:style-name="ce4" office:value-type="string">
            <text:p>true</text:p>
          </table:table-cell>
          <table:table-cell table:number-columns-repeated="2" office:value-type="string">
            <text:p>KOIOS Open Technical Dictionary</text:p>
          </table:table-cell>
          <table:table-cell office:value-type="string">
            <text:p>The KOIOS OTD is a collection of terminology defined by and\nobtained from consensus bodies such as ISO, IEC, and other\ngroups that have a consensus process for developing terminology.\nThe KOIOS OTD contains terms, definitions, and images of\nconcepts used to describe individuals, organizations, locations,\ngoods and services. The KOIOS OTD conforms to ISO 22745 (all\nparts) and is designed to enable the exchange of characteristic\ndata in all stages of the life-cycle of an item, and to ensure that the\nresulting specifications conform to ISO 8000-110.</text:p>
          </table:table-cell>
          <table:table-cell office:value-type="string">
            <text:p>KOIOS Master Data Limited\nFareham Innovation Centre\n4 Meteor Way\nLee-on-the-Solent, Hampshire <text:s/>PO13 9FU\nUK\nPerson Responsible: Simon Towner\nMail: simon.towner@koiosmasterdata.com\nPhone: +44 2393 877 599\nURL: https://www.koiosmasterdata.com</text:p>
          </table:table-cell>
          <table:table-cell/>
          <table:table-cell office:value-type="string">
            <text:p>Internal: 99999999; group of 8+ digits\nExternal: 6 alpha numeric characters.</text:p>
          </table:table-cell>
          <table:table-cell office:value-type="string">
            <text:p>Internal: 1 - 9 for starting character(s) and 0 - 9 for trailing 7\ncharacters\nExternal: A-Z, 0-9 for all characters</text:p>
          </table:table-cell>
          <table:table-cell office:value-type="string">
            <text:p>English</text:p>
          </table:table-cell>
          <table:table-cell office:value-type="string">
            <text:p>No.</text:p>
          </table:table-cell>
          <table:table-cell office:value-type="string">
            <text:p>99 years</text:p>
          </table:table-cell>
          <table:table-cell office:value-type="string">
            <text:p>All organisations who have the need to create, and/or, exchange\ncharacteristic data to that conforms to the requirements set out in\nthe standard ISO 8000-110</text:p>
          </table:table-cell>
          <table:table-cell office:value-type="string">
            <text:p>No further notes</text:p>
          </table:table-cell>
          <table:table-cell office:value-type="string">
            <text:p>KOIOS OTD; KOIOS Concept Dictionary</text:p>
          </table:table-cell>
          <table:table-cell office:value-type="string">
            <text:p>ISO/TC 184/SC 4\nKenneth Swope - chair ISO/TC 184/SC 4\nkenneth.a.swope@boeing.com</text:p>
          </table:table-cell>
          <table:table-cell table:style-name="ce5" office:value-type="date" office:date-value="2018-07-23">
            <text:p>2018-07-23</text:p>
          </table:table-cell>
          <table:table-cell table:number-columns-repeated="2"/>
          <table:table-cell office:value-type="string">
            <text:p>Internal: 99999999\nExternal: AAAAAA (alpha-numeric)\nInternal: Minimum 8 characters starting with 10000000 unique per\ntable, where the set of digits designate the Sequence Identifier\nExternal: 6 characters, alpha-numeric (base-36 version of the\ninternal number)\nNone</text:p>
          </table:table-cell>
          <table:table-cell office:value-type="string">
            <text:p>2018-07-23 13:07:34 UTC</text:p>
          </table:table-cell>
          <table:table-cell table:style-name="ce3" table:number-columns-repeated="16363"/>
        </table:table-row>
        <table:table-row table:style-name="ro1" table:visibility="filter">
          <table:table-cell office:value-type="float" office:value="195">
            <text:p>195</text:p>
          </table:table-cell>
          <table:table-cell table:style-name="ce4" office:value-type="string">
            <text:p>true</text:p>
          </table:table-cell>
          <table:table-cell table:number-columns-repeated="2" office:value-type="string">
            <text:p>Singapore Nationwide E-lnvoice Framework</text:p>
          </table:table-cell>
          <table:table-cell office:value-type="string">
            <text:p>Identifier of organization</text:p>
          </table:table-cell>
          <table:table-cell office:value-type="string">
            <text:p>lnfocomm Media Development Authority\n10 Pasir Panjang Road #03-01\nMapletree Business City\nSingapore 117438</text:p>
          </table:table-cell>
          <table:table-cell/>
          <table:table-cell office:value-type="string">
            <text:p>None, except all fields are left justified</text:p>
          </table:table-cell>
          <table:table-cell office:value-type="string">
            <text:p>Alphanumeric (0-9 and upper and lower case a-z)</text:p>
          </table:table-cell>
          <table:table-cell office:value-type="string">
            <text:p>English</text:p>
          </table:table-cell>
          <table:table-cell office:value-type="string">
            <text:p>No</text:p>
          </table:table-cell>
          <table:table-cell office:value-type="string">
            <text:p>Reuse is prohibited</text:p>
          </table:table-cell>
          <table:table-cell office:value-type="string">
            <text:p>Any organization in need of a unique organisation Identifier to\nparticipate in Singapore nationwide e-invoice framework</text:p>
          </table:table-cell>
          <table:table-cell office:value-type="string">
            <text:p>For use in electronic messages in accordance to the Singapore\nnationwide e-invoice framework on Identification of organization</text:p>
          </table:table-cell>
          <table:table-cell office:value-type="string">
            <text:p>None</text:p>
          </table:table-cell>
          <table:table-cell office:value-type="string">
            <text:p>Enterprise Singapore\n1 Fusionopolls Walk\n#01-02 South Tower, Solarls\nSingapore 138628\nTel: +65 68981800\nEmall: standards@enterprlsesg.gov.sg</text:p>
          </table:table-cell>
          <table:table-cell table:style-name="ce5" office:value-type="date" office:date-value="2018-08-12">
            <text:p>2018-08-12</text:p>
          </table:table-cell>
          <table:table-cell table:number-columns-repeated="2"/>
          <table:table-cell office:value-type="string">
            <text:p>The code comprises of 3 fields,\n1st field = ICD\n2nd field = Special identifier (e.g. country identifier, test identifier,\netc)\n3rd field = Organisation identifrer\nNo check value</text:p>
          </table:table-cell>
          <table:table-cell office:value-type="string">
            <text:p>2018-08-12 16:49:27 UTC</text:p>
          </table:table-cell>
          <table:table-cell table:style-name="ce3" table:number-columns-repeated="16363"/>
        </table:table-row>
        <table:table-row table:style-name="ro1">
          <table:table-cell office:value-type="float" office:value="196">
            <text:p>196</text:p>
          </table:table-cell>
          <table:table-cell table:style-name="ce4" office:value-type="string">
            <text:p>false</text:p>
          </table:table-cell>
          <table:table-cell office:value-type="string">
            <text:p>slensk kennitala Icelandic identifier</text:p>
          </table:table-cell>
          <table:table-cell office:value-type="string">
            <text:p>Íslensk kennitala\nIcelandic identifier</text:p>
          </table:table-cell>
          <table:table-cell office:value-type="string">
            <text:p>Identification of Icelandic individuals and legal entities</text:p>
          </table:table-cell>
          <table:table-cell office:value-type="string">
            <text:p>For individual, identifiers starting with 0 to 3\nIcelandic National Registry, www.skra.is\nTel: +354 515 5300\nFor legal entities, identifiers starting with 4 to 9\nDirectorate of Internal Revenue, www.rsk.is\nTel: +354 442 1000</text:p>
          </table:table-cell>
          <table:table-cell/>
          <table:table-cell office:value-type="string">
            <text:p>Whole string: nnnnnnnnnn\nCommonly displayed with hyphen between Y2 and R1,\ne.g. nnnnnn-nnnn</text:p>
          </table:table-cell>
          <table:table-cell office:value-type="string">
            <text:p>Numerical characters from 0 to 9</text:p>
          </table:table-cell>
          <table:table-cell office:value-type="string">
            <text:p>Not relevant</text:p>
          </table:table-cell>
          <table:table-cell office:value-type="string">
            <text:p>No</text:p>
          </table:table-cell>
          <table:table-cell office:value-type="string">
            <text:p>None</text:p>
          </table:table-cell>
          <table:table-cell office:value-type="string">
            <text:p>Individuals and legal entities with a legal presence in Iceland.</text:p>
          </table:table-cell>
          <table:table-cell office:value-type="string">
            <text:p>The identifiers are publicly published and shared without secrecy.</text:p>
          </table:table-cell>
          <table:table-cell/>
          <table:table-cell office:value-type="string">
            <text:p>Icelandic Standards\nThorunnartuni 2\n105 Reykjavik\nIceland\nTel: +354 520 7150</text:p>
          </table:table-cell>
          <table:table-cell table:style-name="ce5" office:value-type="date" office:date-value="2018-10-26">
            <text:p>2018-10-26</text:p>
          </table:table-cell>
          <table:table-cell table:number-columns-repeated="2"/>
          <table:table-cell office:value-type="string">
            <text:p>10 digit string using numerical characters from 0 to 9\nBased on individuals birthdate or legal entities registration date\nD1D2M1M2Y1Y2R1R2CM\nD = day, M = month, Y = year, R = random. C = checksum, M =\ncentury.\nNinth character "C":\nC = 11 - ((3xD1 + 2xD2 + 7xM1 + 6xM2 + 5xY1 + 4xY2 + 3xR1 +\n2xR2) mod 11)</text:p>
          </table:table-cell>
          <table:table-cell office:value-type="string">
            <text:p>2018-10-26 14:18:07 UTC</text:p>
          </table:table-cell>
          <table:table-cell table:style-name="ce3" table:number-columns-repeated="16363"/>
        </table:table-row>
        <table:table-row table:style-name="ro1" table:visibility="filter">
          <table:table-cell office:value-type="float" office:value="197">
            <text:p>197</text:p>
          </table:table-cell>
          <table:table-cell table:style-name="ce4" office:value-type="string">
            <text:p>true</text:p>
          </table:table-cell>
          <table:table-cell table:number-columns-repeated="2" office:value-type="string">
            <text:p>APPLiA Pl Standard</text:p>
          </table:table-cell>
          <table:table-cell office:value-type="string">
            <text:p>Through their European industry association APPLiA (Home\nAppliance Europe), manufacturers of home appliances have\nlaunched the Product Information (Pl) initiative. The initiative\nintroduces a standard structure for product information. Pl\nStandard helps retailers to take full advantage of electronic\ncommunication and data processing, as the Internet and ICT are\nfundamentally changing how products and services are offered,\nbought, and sold.</text:p>
          </table:table-cell>
          <table:table-cell office:value-type="string">
            <text:p>APPLiA Home Appliance Europe\nBoulevard Brand Whitlock, 114\nBrussels, 1200\nBelgium\nContact person: Eoin Kelly\nE-mail: eoin.kelly@applia-europe.eu</text:p>
          </table:table-cell>
          <table:table-cell/>
          <table:table-cell office:value-type="string">
            <text:p>The identifier should contain the defined octothorpe.\nExample representing a product group: 1108-01#01-000001#1601</text:p>
          </table:table-cell>
          <table:table-cell/>
          <table:table-cell office:value-type="string">
            <text:p>EN</text:p>
          </table:table-cell>
          <table:table-cell office:value-type="string">
            <text:p>No</text:p>
          </table:table-cell>
          <table:table-cell office:value-type="string">
            <text:p>N/A</text:p>
          </table:table-cell>
          <table:table-cell office:value-type="string">
            <text:p>Manufacturers, suppliers, and Trade Partners in the Home\nAppliances sector.</text:p>
          </table:table-cell>
          <table:table-cell office:value-type="string">
            <text:p>The code identifies all elements of the APPLiA Pl standard.</text:p>
          </table:table-cell>
          <table:table-cell/>
          <table:table-cell office:value-type="string">
            <text:p>Bureau de Normalisation\nRue Joseph II, 40\nB-1000 Bruxelles\nBelgium\nTel: +32 2 738 01 11\nFax: +32 2 733 42 64\nE-mail: tech@nbn.be\nContact: Andre Madarasz</text:p>
          </table:table-cell>
          <table:table-cell table:style-name="ce5" office:value-type="date" office:date-value="2018-12-12">
            <text:p>2018-12-12</text:p>
          </table:table-cell>
          <table:table-cell table:number-columns-repeated="2"/>
          <table:table-cell office:value-type="string">
            <text:p>Defined in line with ISO/IEC 6523 specification -\nFormat: [ICD]-[OID]#[CSl]-[IID]#[VI]\nICD: International Code Designator (4-digit)\nOID: Organisation Identifier (2-character)\nCSI: Code Space Identifier (2-character)\nIID: Item code Identifier (6-character)\nVI: Version identifier (4-digit)\nN/A</text:p>
          </table:table-cell>
          <table:table-cell office:value-type="string">
            <text:p>2018-12-12 12:14:58 UTC</text:p>
          </table:table-cell>
          <table:table-cell table:style-name="ce3" table:number-columns-repeated="16363"/>
        </table:table-row>
        <table:table-row table:style-name="ro1" table:visibility="filter">
          <table:table-cell office:value-type="float" office:value="198">
            <text:p>198</text:p>
          </table:table-cell>
          <table:table-cell table:style-name="ce4" office:value-type="string">
            <text:p>true</text:p>
          </table:table-cell>
          <table:table-cell table:number-columns-repeated="2" office:value-type="string">
            <text:p>ERSTORG</text:p>
          </table:table-cell>
          <table:table-cell office:value-type="string">
            <text:p>To be used for identifying Danish companies based on\nVAT numbers included juridical</text:p>
          </table:table-cell>
          <table:table-cell office:value-type="string">
            <text:p>The Danish Business Authority\nLangelinie Alie 17\nDK-2100 Copenhagen Ø\nDenmark\nAtt. Ole Madsen\nTel: +45 35 29 10 00\nE-mail: erst@erst.dk</text:p>
          </table:table-cell>
          <table:table-cell/>
          <table:table-cell office:value-type="string">
            <text:p>10 characters, no space or other separator</text:p>
          </table:table-cell>
          <table:table-cell/>
          <table:table-cell office:value-type="string">
            <text:p>EN</text:p>
          </table:table-cell>
          <table:table-cell table:number-columns-repeated="2"/>
          <table:table-cell office:value-type="string">
            <text:p>Danish company VAT-number ("SE-number")</text:p>
          </table:table-cell>
          <table:table-cell office:value-type="string">
            <text:p>Used to identify Danish VAT companies detailed use of one\norganization. Characters are digits or capital letter.</text:p>
          </table:table-cell>
          <table:table-cell/>
          <table:table-cell office:value-type="string">
            <text:p>Dansk Standard (DS)\n(Danish Standards Foundation)\nKollegievej 6\nDK-2920 Charlottenlund\nDenmark</text:p>
          </table:table-cell>
          <table:table-cell table:style-name="ce5" office:value-type="date" office:date-value="2018-12-12">
            <text:p>2018-12-12</text:p>
          </table:table-cell>
          <table:table-cell table:number-columns-repeated="2"/>
          <table:table-cell office:value-type="string">
            <text:p>DKXXXXXXXX\nTwo characters (DK) followed by 8 digits eg. DK12345678</text:p>
          </table:table-cell>
          <table:table-cell office:value-type="string">
            <text:p>2018-12-12 12:38:37 UTC</text:p>
          </table:table-cell>
          <table:table-cell table:style-name="ce3" table:number-columns-repeated="16363"/>
        </table:table-row>
        <table:table-row table:style-name="ro1" table:visibility="filter">
          <table:table-cell office:value-type="float" office:value="199">
            <text:p>199</text:p>
          </table:table-cell>
          <table:table-cell table:style-name="ce4" office:value-type="string">
            <text:p>true</text:p>
          </table:table-cell>
          <table:table-cell table:number-columns-repeated="2" office:value-type="string">
            <text:p>Legal Entity Identifier (LEI)</text:p>
          </table:table-cell>
          <table:table-cell office:value-type="string">
            <text:p>The LEI is the global, open identifier established at the urging of\nthe Financial Stability Board and the recommendation of the G20.\nThe LEI is established as the ISO 17442 standard, is governed by\nthe LEI Regulatory Oversight Committee (LEI-ROC) and has been\nimplemented by the Global Legal Entity Identifier Foundation\n(GLEIF).\nThe LEI code connects to key reference information that enables\nclear and unique identification of legal entities participating in\nfinancial transactions. Each LEI contains information about an\nentity's ownership structure and thus answers the questions of\n'who is who' and 'who owns whom'.\nSimply put, the publicly available LEI data pool can be regarded as\na global directory, which greatly enhances transparency in the\nglobal marketplace.\nAlready applied very broadly within financial regulation and rapidly\nbeing adopted for KYC and a number of other purposes in financial\nmarkets, the LEI is set to spread into a range of other fields,\nincluding trade facilitation, business reporting and supply chain\nmanagement.</text:p>
          </table:table-cell>
          <table:table-cell office:value-type="string">
            <text:p>As of December 2018, there are 33 LEI issuing organizations in the\nworld. Please refer to the below web page to find individual\norganization:\nhttps://www.gleif.org/en/about-lei/get-an-lei-find-lei-issuing-\norganizations\nThose LEI issuers are accredited and managed by GLEIF, a\ncentral operating unit of the global LEI system.</text:p>
          </table:table-cell>
          <table:table-cell office:value-type="string">
            <text:p>The ISO 17442 standard specifies the minimum reference data,\nwhich must the format of the organization identifiers, be Supplied\nfor each LEI:\n• The official name of the legal entity as recorded in the\nofficial registers.\n• The registered address of that legal entity.\n• The country of formation.\n• The codes for the representation of names of countries and\ntheir subdivisions.\n• The date of the first LEI assignment; the date of last update\nof the\n• LEI information; and the date of expiry, if applicable.\nAdditional information may be registered as agreed between the\nlegal entity and its LEI issuing organization.\nThe number allocation scheme was further specified in Annex 2 of</text:p>
          </table:table-cell>
          <table:table-cell table:number-columns-repeated="14"/>
          <table:table-cell table:style-name="ce3" table:number-columns-repeated="16363"/>
        </table:table-row>
        <table:table-row table:style-name="ro1" table:visibility="filter">
          <table:table-cell office:value-type="float" office:value="200">
            <text:p>200</text:p>
          </table:table-cell>
          <table:table-cell table:style-name="ce4" office:value-type="string">
            <text:p>true</text:p>
          </table:table-cell>
          <table:table-cell table:number-columns-repeated="2" office:value-type="string">
            <text:p>Legal entity code</text:p>
          </table:table-cell>
          <table:table-cell office:value-type="string">
            <text:p>For use in EDI (electronic data interchange) for C2B and others\nexchanges to identify legal entities</text:p>
          </table:table-cell>
          <table:table-cell office:value-type="string">
            <text:p>State Enterprise Centre of Registers\nVinco Kudirkos 18-3\nLT- 03219, Vilnius\nLithuania\nPhone: +3702688202\ne-mail: info@reqsitrucentras.lt</text:p>
          </table:table-cell>
          <table:table-cell/>
          <table:table-cell office:value-type="string">
            <text:p>No Requirements</text:p>
          </table:table-cell>
          <table:table-cell office:value-type="string">
            <text:p>digits 0-9</text:p>
          </table:table-cell>
          <table:table-cell office:value-type="string">
            <text:p>Lithuanian, English</text:p>
          </table:table-cell>
          <table:table-cell office:value-type="string">
            <text:p>No</text:p>
          </table:table-cell>
          <table:table-cell office:value-type="string">
            <text:p>No reuse after assignment</text:p>
          </table:table-cell>
          <table:table-cell office:value-type="string">
            <text:p>All private and public entities, organizations, companies,\ncommunities and others legal units, their branches and\nrepresentatives registered in Register of Legal Entities</text:p>
          </table:table-cell>
          <table:table-cell table:number-columns-repeated="2"/>
          <table:table-cell office:value-type="string">
            <text:p>Lithuanian Standards Board\nAlgirdo g. 31, 03219\nVilnius, Lithuania\nTelephone +370 5 270 9360,\nE-mail: lstboard@lsd.lt, www.lsd.lt</text:p>
          </table:table-cell>
          <table:table-cell table:style-name="ce5" office:value-type="date" office:date-value="2019-02-06">
            <text:p>2019-02-06</text:p>
          </table:table-cell>
          <table:table-cell table:number-columns-repeated="2"/>
          <table:table-cell office:value-type="string">
            <text:p>9 (nine) digits\nEach legal entity's code number is multiplied by 1, 2, 3, 4, 5, 6, 7, 8\n(weighting) starting from the left-hand side of the code. Calculates\nthe sum of the product, divided by 11. The remainder of the\ndivision, which must be less than 10, is the 9th, control, number of\nthe legal entity's code.</text:p>
          </table:table-cell>
          <table:table-cell office:value-type="string">
            <text:p>2019-02-06 13:01:57 UTC</text:p>
          </table:table-cell>
          <table:table-cell table:style-name="ce3" table:number-columns-repeated="16363"/>
        </table:table-row>
        <table:table-row table:style-name="ro1">
          <table:table-cell office:value-type="float" office:value="201">
            <text:p>201</text:p>
          </table:table-cell>
          <table:table-cell table:style-name="ce4" office:value-type="string">
            <text:p>false</text:p>
          </table:table-cell>
          <table:table-cell office:value-type="string">
            <text:p>Codice Univoco Unit Organizzativa iPA</text:p>
          </table:table-cell>
          <table:table-cell office:value-type="string">
            <text:p>Codice Univoco Unità Organizzativa iPA</text:p>
          </table:table-cell>
          <table:table-cell office:value-type="string">
            <text:p>Used to identify uniquely all organizational units of public bodies,\nauthorities and public services in Italy</text:p>
          </table:table-cell>
          <table:table-cell office:value-type="string">
            <text:p>Agenzia per l’Italia digitale\nVia Liszt 21\n00144 Roma\nItaly\nTel: +39 06852641\nEmail: protocollo@pec.agid.gov.it</text:p>
          </table:table-cell>
          <table:table-cell/>
          <table:table-cell office:value-type="string">
            <text:p>None</text:p>
          </table:table-cell>
          <table:table-cell office:value-type="string">
            <text:p>Alphanumeric characters</text:p>
          </table:table-cell>
          <table:table-cell/>
          <table:table-cell table:number-columns-repeated="2" office:value-type="string">
            <text:p>No</text:p>
          </table:table-cell>
          <table:table-cell office:value-type="string">
            <text:p>All organizational units of public bodies, authorities and public\nservices in Italy</text:p>
          </table:table-cell>
          <table:table-cell table:number-columns-repeated="2"/>
          <table:table-cell office:value-type="string">
            <text:p>UNINFO\nVia Sanfront 1\n10138 Torino\nItaly\nTel. +39 011501027\nEmail: uninfo@uninfo.it</text:p>
          </table:table-cell>
          <table:table-cell table:style-name="ce5" office:value-type="date" office:date-value="2019-04-10">
            <text:p>2019-04-10</text:p>
          </table:table-cell>
          <table:table-cell table:number-columns-repeated="2"/>
          <table:table-cell office:value-type="string">
            <text:p>String of 6 alphanumeric characters</text:p>
          </table:table-cell>
          <table:table-cell office:value-type="string">
            <text:p>2019-04-10 15:07:07 UTC</text:p>
          </table:table-cell>
          <table:table-cell table:style-name="ce3" table:number-columns-repeated="16363"/>
        </table:table-row>
        <table:table-row table:style-name="ro1" table:visibility="filter">
          <table:table-cell office:value-type="float" office:value="202">
            <text:p>202</text:p>
          </table:table-cell>
          <table:table-cell table:style-name="ce4" office:value-type="string">
            <text:p>true</text:p>
          </table:table-cell>
          <table:table-cell table:number-columns-repeated="2" office:value-type="string">
            <text:p>Indirizzo di Posta Elettronica Certificata</text:p>
          </table:table-cell>
          <table:table-cell office:value-type="string">
            <text:p>Used to identify senders and receivers of certified electronic mail\nas defined by Italian law</text:p>
          </table:table-cell>
          <table:table-cell office:value-type="string">
            <text:p>Agenzia per l’Italia digitale\nVia Liszt 21\n00144 Roma\nItaly\nTel: +39 06852641\nEmail: protocollo@pec.agid.gov.it</text:p>
          </table:table-cell>
          <table:table-cell/>
          <table:table-cell office:value-type="string">
            <text:p>None</text:p>
          </table:table-cell>
          <table:table-cell office:value-type="string">
            <text:p>Printable ASCII characters</text:p>
          </table:table-cell>
          <table:table-cell office:value-type="string">
            <text:p>English, Italian</text:p>
          </table:table-cell>
          <table:table-cell office:value-type="string">
            <text:p>Yes</text:p>
          </table:table-cell>
          <table:table-cell office:value-type="string">
            <text:p>No</text:p>
          </table:table-cell>
          <table:table-cell office:value-type="string">
            <text:p>Individuals, legal entities and organizational units thereof</text:p>
          </table:table-cell>
          <table:table-cell/>
          <table:table-cell office:value-type="string">
            <text:p>Certified Electronic Mail, PEC</text:p>
          </table:table-cell>
          <table:table-cell office:value-type="string">
            <text:p>UNINFO\nVia Sanfront 1\n10138 Torino\nItaly\nTel. +39 011501027\nEmail: uninfo@uninfo.it</text:p>
          </table:table-cell>
          <table:table-cell table:style-name="ce5" office:value-type="date" office:date-value="2019-04-10">
            <text:p>2019-04-10</text:p>
          </table:table-cell>
          <table:table-cell table:number-columns-repeated="2"/>
          <table:table-cell office:value-type="string">
            <text:p>Email address as defined by RFC 5322, § 3.4 ("Address\nSpecification"); the PEC infrastructure is defined by RFC 6109 and\nsubsequent RFCs</text:p>
          </table:table-cell>
          <table:table-cell office:value-type="string">
            <text:p>2019-04-10 15:17:08 UTC</text:p>
          </table:table-cell>
          <table:table-cell table:style-name="ce3" table:number-columns-repeated="16363"/>
        </table:table-row>
        <table:table-row table:style-name="ro1" table:visibility="filter">
          <table:table-cell office:value-type="float" office:value="203">
            <text:p>203</text:p>
          </table:table-cell>
          <table:table-cell table:style-name="ce4" office:value-type="string">
            <text:p>true</text:p>
          </table:table-cell>
          <table:table-cell table:number-columns-repeated="2" office:value-type="string">
            <text:p>eDelivery Network Participant identifier</text:p>
          </table:table-cell>
          <table:table-cell office:value-type="string">
            <text:p>Used as an electronic address identifier for participants within a\nsecure data communication network.</text:p>
          </table:table-cell>
          <table:table-cell office:value-type="string">
            <text:p>Name of IO:\nAgency for Digital Government\nAddress:\nStorgatan 37\n852 30 Sundsvall\nContact:\nMartin.volcker@digg.se\n+46708252424</text:p>
          </table:table-cell>
          <table:table-cell table:number-columns-repeated="2"/>
          <table:table-cell office:value-type="string">
            <text:p>Letters, numbers, period sign and dashes/hyphens.</text:p>
          </table:table-cell>
          <table:table-cell office:value-type="string">
            <text:p>English</text:p>
          </table:table-cell>
          <table:table-cell office:value-type="string">
            <text:p>Yes</text:p>
          </table:table-cell>
          <table:table-cell/>
          <table:table-cell office:value-type="string">
            <text:p>Any organisation which participates in the secure data network.</text:p>
          </table:table-cell>
          <table:table-cell table:number-columns-repeated="2"/>
          <table:table-cell office:value-type="string">
            <text:p>Swedish Institute for Standards\nBox 45443\n104 31 Stockholm\ninfo@sis.se or kundservice@sis.se\n+46 8 555 520 00 or +46 555 523 10</text:p>
          </table:table-cell>
          <table:table-cell table:style-name="ce5" office:value-type="date" office:date-value="2019-09-19">
            <text:p>2019-09-19</text:p>
          </table:table-cell>
          <table:table-cell table:number-columns-repeated="2"/>
          <table:table-cell office:value-type="string">
            <text:p>Structured as a domain name with top domain and one or more\nsubdomain with hierarchy from right to left. Each level is separated\nwith a period sign.</text:p>
          </table:table-cell>
          <table:table-cell office:value-type="string">
            <text:p>2019-09-19 16:30:06 UTC</text:p>
          </table:table-cell>
          <table:table-cell table:style-name="ce3" table:number-columns-repeated="16363"/>
        </table:table-row>
        <table:table-row table:style-name="ro1" table:visibility="filter">
          <table:table-cell office:value-type="float" office:value="204">
            <text:p>204</text:p>
          </table:table-cell>
          <table:table-cell table:style-name="ce4" office:value-type="string">
            <text:p>true</text:p>
          </table:table-cell>
          <table:table-cell table:number-columns-repeated="2" office:value-type="string">
            <text:p>Leitweg-ID</text:p>
          </table:table-cell>
          <table:table-cell office:value-type="string">
            <text:p>Identification of Public Authorities</text:p>
          </table:table-cell>
          <table:table-cell office:value-type="string">
            <text:p>Koordinierungsstelle für IT-Standards (KoSIT)\nFreie Hansestadt Bremen\nDie Senatorin für Finanzen\nReferat 44\nMr. Lars Rölker-Denker\nRudolf-Hilferding-Platz 1\n28195 Bremen\nGermany\nE-mail: xrechnung@finanzen.bremen.de\nTel: +4942136190422</text:p>
          </table:table-cell>
          <table:table-cell/>
          <table:table-cell office:value-type="string">
            <text:p>Whole string</text:p>
          </table:table-cell>
          <table:table-cell office:value-type="string">
            <text:p>alphanumeric characters</text:p>
          </table:table-cell>
          <table:table-cell office:value-type="string">
            <text:p>Not relevant</text:p>
          </table:table-cell>
          <table:table-cell office:value-type="string">
            <text:p>Yes</text:p>
          </table:table-cell>
          <table:table-cell office:value-type="string">
            <text:p>None</text:p>
          </table:table-cell>
          <table:table-cell office:value-type="string">
            <text:p>Identification of Public Authorities</text:p>
          </table:table-cell>
          <table:table-cell office:value-type="string">
            <text:p>The identifiers are made public by the public authorities itself.</text:p>
          </table:table-cell>
          <table:table-cell/>
          <table:table-cell office:value-type="string">
            <text:p>DIN Deutsches Institut für Normung e. V.\nSaatwinkler Damm 42/43\n13627 Berlin\nGermany\nTel.: + 49 30 2601- 2796\nFax: + 49 30 2601- 42796\nContact Name: Samarkhel-Khan Yahya\nE-Mail: Samarkhel-Khan.Yahya@din.de</text:p>
          </table:table-cell>
          <table:table-cell table:style-name="ce5" office:value-type="date" office:date-value="2019-09-30">
            <text:p>2019-09-30</text:p>
          </table:table-cell>
          <table:table-cell table:number-columns-repeated="2"/>
          <table:table-cell office:value-type="string">
            <text:p>Up to 44 alphanumeric characters\nFormat: “Up to 12 numeric characters – up to 30 alphanumeric\ncharacters – 2 numeric characters”\nUp to 12 numeric characters – up to 30 alphanumeric characters -\n2 numeric characters</text:p>
          </table:table-cell>
          <table:table-cell office:value-type="string">
            <text:p>2019-09-30 23:56:04 UTC</text:p>
          </table:table-cell>
          <table:table-cell table:style-name="ce3" table:number-columns-repeated="16363"/>
        </table:table-row>
        <table:table-row table:style-name="ro1" table:visibility="filter">
          <table:table-cell office:value-type="float" office:value="205">
            <text:p>205</text:p>
          </table:table-cell>
          <table:table-cell table:style-name="ce4" office:value-type="string">
            <text:p>true</text:p>
          </table:table-cell>
          <table:table-cell table:number-columns-repeated="2" office:value-type="string">
            <text:p>CODDEST</text:p>
          </table:table-cell>
          <table:table-cell office:value-type="string">
            <text:p>Electronic Invoicing trough Sdl, the Exchange System used in Italy\nwhere the electronic invoices are transmitted to the Public\nAdministration (Article 1, paragraph 211, of Italian Law no. 244 of\n24 December 2007) or to private entities (Article 1, paragraph 2, of\nLegislative Decree 127/2015)</text:p>
          </table:table-cell>
          <table:table-cell office:value-type="string">
            <text:p>Agenzia delle Entrate\nVia Giorgione 106\n00147 ROMA\nItaly\nE-mail: dc.ti.sisd@agenziaentrate.it\nTel: +39 06 50543735</text:p>
          </table:table-cell>
          <table:table-cell table:number-columns-repeated="2"/>
          <table:table-cell office:value-type="string">
            <text:p>A to Z (upper case) and Oto 9</text:p>
          </table:table-cell>
          <table:table-cell office:value-type="string">
            <text:p>Italian</text:p>
          </table:table-cell>
          <table:table-cell table:number-columns-repeated="2"/>
          <table:table-cell office:value-type="string">
            <text:p>All business organisations</text:p>
          </table:table-cell>
          <table:table-cell office:value-type="string">
            <text:p>For invoices to private parties it contains the 7-digit alphanumeric\ncode, generated by the Exchange System (Sdl) in a randomise\nmode and assigned by it to subjects who have required a\ntransmission channel. For example, if the recipient has not\nrequired a channel the item must be valued with all zeros\n('0000000')</text:p>
          </table:table-cell>
          <table:table-cell office:value-type="string">
            <text:p>1.1.4 &lt;CodiceDestinatario&gt;</text:p>
          </table:table-cell>
          <table:table-cell office:value-type="string">
            <text:p>UNINFO\nVia Sanfront, 1/C\n10138 Torino\nItaly\nE-mail: unnfo@uninfo.it\nTel: +39 011 501027</text:p>
          </table:table-cell>
          <table:table-cell table:style-name="ce5" office:value-type="date" office:date-value="2019-10-14">
            <text:p>2019-10-14</text:p>
          </table:table-cell>
          <table:table-cell table:number-columns-repeated="2"/>
          <table:table-cell office:value-type="string">
            <text:p>The code is 7 alphanumeric characters\nRandom, no specific significance</text:p>
          </table:table-cell>
          <table:table-cell office:value-type="string">
            <text:p>2019-10-14 14:27:05 UTC</text:p>
          </table:table-cell>
          <table:table-cell table:style-name="ce3" table:number-columns-repeated="16363"/>
        </table:table-row>
        <table:table-row table:style-name="ro1">
          <table:table-cell office:value-type="float" office:value="206">
            <text:p>206</text:p>
          </table:table-cell>
          <table:table-cell table:style-name="ce4" office:value-type="string">
            <text:p>false</text:p>
          </table:table-cell>
          <table:table-cell office:value-type="string">
            <text:p>Registre du Commerce et de lIndustrie : RCI</text:p>
          </table:table-cell>
          <table:table-cell office:value-type="string">
            <text:p>Registre du Commerce et de l’Industrie : RCI</text:p>
          </table:table-cell>
          <table:table-cell office:value-type="string">
            <text:p>To provide identifiers for organizations at national level in Monaco</text:p>
          </table:table-cell>
          <table:table-cell office:value-type="string">
            <text:p>Agence Monégasque de Sécurité Numérique (AMSN)\nDirection de l’expansion économique\n24 rue du Gabian\n98000 MONACO\nTel: +377-98982493</text:p>
          </table:table-cell>
          <table:table-cell/>
          <table:table-cell office:value-type="string">
            <text:p>The identification number is a concatenated string of the\ncharacters, without spaces and left justified\nFor instance : "98P00421" or "19MT04331"</text:p>
          </table:table-cell>
          <table:table-cell office:value-type="string">
            <text:p>00-99 for the first segment of digits (2 digits)\nA-Z and AA-ZZ for the segment of letters (1 or 2)\n00001-99999 for the second segment of digits (5 digits)</text:p>
          </table:table-cell>
          <table:table-cell office:value-type="string">
            <text:p>French</text:p>
          </table:table-cell>
          <table:table-cell/>
          <table:table-cell office:value-type="string">
            <text:p>Not reused after assigned once</text:p>
          </table:table-cell>
          <table:table-cell office:value-type="string">
            <text:p>Enterprises (individual enterprises or companies) in the field of\nagriculture, industry, trade, services, associations, authorities,\npublic entities, active in Monaco. Number of units covered:\napproximately 7000</text:p>
          </table:table-cell>
          <table:table-cell office:value-type="string">
            <text:p>The RCI number is used in Monaco mainly for the official\nregistration in the Trade and Industry Register and as the only\nnumber used between authorities and organizations, and between\nauthorities when dealing with data interchange on organizations.</text:p>
          </table:table-cell>
          <table:table-cell/>
          <table:table-cell office:value-type="string">
            <text:p>Association Française de Normalisation: AFNOR\n11 rue Francis de Pressensé\n93571 La Plaine Saint-Denis Cedex France\nTel: + 33 1 41 61 80 00</text:p>
          </table:table-cell>
          <table:table-cell table:style-name="ce5" office:value-type="date" office:date-value="2020-01-20">
            <text:p>2020-01-20</text:p>
          </table:table-cell>
          <table:table-cell table:number-columns-repeated="2"/>
          <table:table-cell office:value-type="string">
            <text:p>Number of characters : from 8 to 9 characters (RCI)\nThe number format is described below :\n- 2 digits (year of creation)\n- 1 or 2 letters (A, P, S, MT, C…)\n- 5 digits (registration number of the organization)\nThere is no check character</text:p>
          </table:table-cell>
          <table:table-cell office:value-type="string">
            <text:p>2020-01-20 18:50:04 UTC</text:p>
          </table:table-cell>
          <table:table-cell table:style-name="ce3" table:number-columns-repeated="16363"/>
        </table:table-row>
        <table:table-row table:style-name="ro1" table:visibility="filter">
          <table:table-cell office:value-type="float" office:value="207">
            <text:p>207</text:p>
          </table:table-cell>
          <table:table-cell table:style-name="ce4" office:value-type="string">
            <text:p>true</text:p>
          </table:table-cell>
          <table:table-cell table:number-columns-repeated="2" office:value-type="string">
            <text:p>PiLog Ontology Codification Identifier (POCI)</text:p>
          </table:table-cell>
          <table:table-cell office:value-type="string">
            <text:p>A repository of concepts pertaining to any entity such as products,\nservices, business partners, assets, organizations, locations,\npersons, addresses, languages, records etc along with the\nterminologies to describe each entity using class, characteristics,\nvalues, JoMs, QoMs, groups, definitions, guidelines, images,\ndrawings, pictures. codes and any classification thereof. The\ncodification will help exchange/integrate the data between\noperational, ERP, CRM, SRM or any other systems without any\nhuman interpretation and interaction without losing the meaning of\nthe information in multiple languages, this will help organizations\nachieve their digital transformation goals more precisely in order to\nassess the real value-proposition of the underlying data that is\ndriving their businesses.</text:p>
          </table:table-cell>
          <table:table-cell office:value-type="string">
            <text:p>PiLog Group\nCenturion Gate\nCorner of PiLog Blvd &amp; Akkerboom Street\nCenturion\nSouth Africa 0157</text:p>
          </table:table-cell>
          <table:table-cell/>
          <table:table-cell office:value-type="string">
            <text:p>99-99999999</text:p>
          </table:table-cell>
          <table:table-cell office:value-type="string">
            <text:p>0-9 for all characters</text:p>
          </table:table-cell>
          <table:table-cell office:value-type="string">
            <text:p>English &amp; others</text:p>
          </table:table-cell>
          <table:table-cell office:value-type="string">
            <text:p>Yes</text:p>
          </table:table-cell>
          <table:table-cell office:value-type="string">
            <text:p>10 years</text:p>
          </table:table-cell>
          <table:table-cell office:value-type="string">
            <text:p>These codes have been widely used by OTD customers and\nintended to be used by all the users or organizations that utilizes\nthe PiLog repositories to be compliant with ISO 8000, ISO 22745,\nISO 29002, ISO 11179, ISO 15926</text:p>
          </table:table-cell>
          <table:table-cell/>
          <table:table-cell office:value-type="string">
            <text:p>PiLog's Open Technical Data Repositories &amp; Ontology</text:p>
          </table:table-cell>
          <table:table-cell office:value-type="string">
            <text:p>SABS\n1 Dr Lategan Rd\nGroenkloof, Pretoria\n0027, South Africa\nTel: +27 12 428 7911</text:p>
          </table:table-cell>
          <table:table-cell table:style-name="ce5" office:value-type="date" office:date-value="2020-04-01">
            <text:p>2020-04-01</text:p>
          </table:table-cell>
          <table:table-cell table:number-columns-repeated="2"/>
          <table:table-cell office:value-type="string">
            <text:p>The format of codification schema is\n1) ICD - 4 digits\n2) Organization Identifier - 4 di ~it (Optional)\n3) Concept Type - 2 digits\n4) Concept Unique Identifier - 8 digits\n5) Concept Version Identifier - 1 digit\n6) No check digit is required\nFormat: nnnn - xxxx # nn - nnnnnnnn # n</text:p>
          </table:table-cell>
          <table:table-cell office:value-type="string">
            <text:p>2020-04-01 13:36:33 UTC</text:p>
          </table:table-cell>
          <table:table-cell table:style-name="ce3" table:number-columns-repeated="16363"/>
        </table:table-row>
        <table:table-row table:style-name="ro1">
          <table:table-cell office:value-type="float" office:value="208">
            <text:p>208</text:p>
          </table:table-cell>
          <table:table-cell table:style-name="ce4" office:value-type="string">
            <text:p>false</text:p>
          </table:table-cell>
          <table:table-cell office:value-type="string">
            <text:p>Numero d'entreprise / ondernemingsnummer / Unternehmensnummer</text:p>
          </table:table-cell>
          <table:table-cell office:value-type="string">
            <text:p>Numero d'entreprise / ondernemingsnummer /\nUnternehmensnummer</text:p>
          </table:table-cell>
          <table:table-cell office:value-type="string">
            <text:p>Identification number attributed by the BCE/KBO/ZDU (the Belgian\nregister) to identify entities and establishment units operating in\nBelgium</text:p>
          </table:table-cell>
          <table:table-cell office:value-type="string">
            <text:p>Banque-Carrefour des Entreprises (BCE) /\nKruispuntbank van Ondernemingen (KBO) /\nZentrale Datenbank der Unternehmen (ZOU)\nService public fédéral Economie, P.M.E.\nClasses moyennes et Energie\nCity Atrium C\nRue du Progrés 50\n1210 Bruxelles\nTel: +32 800 120 33\nFax: +32 2 277 50 82\nE-mail: helpdesk.kbo-bce@economie.fgov.be</text:p>
          </table:table-cell>
          <table:table-cell office:value-type="string">
            <text:p>10 numeric characters.</text:p>
          </table:table-cell>
          <table:table-cell office:value-type="string">
            <text:p>The identification number can be displayed in the following ways:\nFor enterprise numbers:\n- a group of four digits, then two groups of three digits, each group\nseparated by a dot. Example: 1234.456.789\n- one digit, then three groups of three digits, each separated by a\ndot. Example: 1.234.456. 789\nFor establishment unit numbers:\n- one digit, then three groups of three digits, each separated by a\ndot. Example: 2.123.456. 789</text:p>
          </table:table-cell>
          <table:table-cell office:value-type="string">
            <text:p>numeric</text:p>
          </table:table-cell>
          <table:table-cell office:value-type="string">
            <text:p>Dutch, French, German</text:p>
          </table:table-cell>
          <table:table-cell office:value-type="string">
            <text:p>Yes. When the first digit is "2'', the number identifies an\nestablishment unit, which is a part of an entity</text:p>
          </table:table-cell>
          <table:table-cell office:value-type="string">
            <text:p>Not applicable</text:p>
          </table:table-cell>
          <table:table-cell office:value-type="string">
            <text:p>Must register in the BCE/KBO/ZDU and are considered to be\n- legal persons under Belgian law;\n- any natural person who pursues a professional activity in Belgium\nindependently, except for the natural persons referred to in Article\nIII.49, § 2, 6° and 9° of the Code of Economic Law, namely natural\npersons whose professional activity in a self-employed capacity\nconsists in the exercise of one or more administrative mandates as\nwell as natural persons who pursue an activity in Belgium in the\ncollaborative economy;</text:p>
          </table:table-cell>
          <table:table-cell table:number-columns-repeated="5"/>
          <table:table-cell office:value-type="string">
            <text:p>1. Enterprise identification number (FR: "numéro d'entreprise" / NL:\n"ondernemingsnummer" / DE: "Unternehmensnummer") : the first\ndigit has to be "0" or "1"\n2. Establishment unit identification number (FR: "numéro d'unité\nd'établissement" / NL: "vestigingseenheidsnummer"·/ DE:\n"Nummer der Niederlassungseinheit"): the first digit has to be "2".\nidentification of the check digit The two last characters are check digits. They are the result of the\ncharacters, if any: 2) following computation:\n97 - ((8 first digits) modulo 97).</text:p>
          </table:table-cell>
          <table:table-cell table:number-columns-repeated="2"/>
          <table:table-cell table:style-name="ce3" table:number-columns-repeated="16363"/>
        </table:table-row>
        <table:table-row table:style-name="ro1" table:visibility="filter">
          <table:table-cell office:value-type="float" office:value="209">
            <text:p>209</text:p>
          </table:table-cell>
          <table:table-cell table:style-name="ce4" office:value-type="string">
            <text:p>true</text:p>
          </table:table-cell>
          <table:table-cell table:number-columns-repeated="2" office:value-type="string">
            <text:p>GS1 identification keys</text:p>
          </table:table-cell>
          <table:table-cell office:value-type="string">
            <text:p>GS1 identification keys and key qualifiers may be used by an\ninformation system to refer unambiguously to an entity such as a\ntrade item, logistics unit, physical location, document, or service\nrelationship.</text:p>
          </table:table-cell>
          <table:table-cell office:value-type="string">
            <text:p>GS1\nAvenue Louise 326\n1050 Brussels\nBELGIUM\nTel: +32 495 52 9444\nFax: +32 2 788 78 99\nContact: Henri Barthel\nEmail: henri.barthel@gs1.org</text:p>
          </table:table-cell>
          <table:table-cell/>
          <table:table-cell office:value-type="string">
            <text:p>None</text:p>
          </table:table-cell>
          <table:table-cell office:value-type="string">
            <text:p>The character set is a subset of ISO/IEC 646, specified in the GS1\nGeneral Specifications, available at https://www.gs1.org/standards.</text:p>
          </table:table-cell>
          <table:table-cell office:value-type="string">
            <text:p>English</text:p>
          </table:table-cell>
          <table:table-cell office:value-type="string">
            <text:p>GS1 Identification keys include a prefix assigned by a GS1\norganisation to a licensee.</text:p>
          </table:table-cell>
          <table:table-cell office:value-type="string">
            <text:p>The re-use of identifiers depends on the nature of the GS1\nidentification key. The key management and re-use rules are\nspecified in the general GS1 specifications.</text:p>
          </table:table-cell>
          <table:table-cell office:value-type="string">
            <text:p>Any organization that needs to identify uniquely trade items,\nlogistics units, physical locations, documents, or service\nrelationships.</text:p>
          </table:table-cell>
          <table:table-cell office:value-type="string">
            <text:p>GS1 identification keys are used by millions of organizations in the\nworld. They are widely adopted by the consumer goods, health\ncare and other industries.</text:p>
          </table:table-cell>
          <table:table-cell office:value-type="string">
            <text:p>GS1 ID keys</text:p>
          </table:table-cell>
          <table:table-cell office:value-type="string">
            <text:p>GS1 AISBL\navenue Louise 326\nB-1050 Brussels\nBELGIUM\nContact: Henri Barthel, henri.barthel@gs1.org, +32 495 52 9444</text:p>
          </table:table-cell>
          <table:table-cell table:style-name="ce5" office:value-type="date" office:date-value="2020-07-07">
            <text:p>2020-07-07</text:p>
          </table:table-cell>
          <table:table-cell table:number-columns-repeated="2"/>
          <table:table-cell office:value-type="string">
            <text:p>The code will include an application identifier indicating the type of\nGS1 identification key used for an object, followed by the value of\nthe key. The string can be completed by other application\nidentifiers indicating attributes related to the GS1 ID key and the\nvalue of these attributes related to the identified object.\nVariable length, depending on the type of GS1 ID key and\nattributes being encoded</text:p>
          </table:table-cell>
          <table:table-cell office:value-type="string">
            <text:p>2020-07-07 21:26:34 UTC</text:p>
          </table:table-cell>
          <table:table-cell table:style-name="ce3" table:number-columns-repeated="16363"/>
        </table:table-row>
        <table:table-row table:style-name="ro1" table:visibility="filter">
          <table:table-cell office:value-type="float" office:value="210">
            <text:p>210</text:p>
          </table:table-cell>
          <table:table-cell table:style-name="ce4" office:value-type="string">
            <text:p>true</text:p>
          </table:table-cell>
          <table:table-cell table:number-columns-repeated="2" office:value-type="string">
            <text:p>CODICE FISCALE</text:p>
          </table:table-cell>
          <table:table-cell office:value-type="string">
            <text:p>Electronic Invoicing and e-procurement</text:p>
          </table:table-cell>
          <table:table-cell office:value-type="string">
            <text:p>Agenzia delle Entrate\nVia Giorgione 106\n00147 ROMA\nItaly\ndc.ti.sisd@agenziaentrate.it\nTel. +39 06 50543735</text:p>
          </table:table-cell>
          <table:table-cell table:number-columns-repeated="2"/>
          <table:table-cell office:value-type="string">
            <text:p>A to Z (upper case) and 0 to 9</text:p>
          </table:table-cell>
          <table:table-cell office:value-type="string">
            <text:p>Italian</text:p>
          </table:table-cell>
          <table:table-cell table:number-columns-repeated="2"/>
          <table:table-cell office:value-type="string">
            <text:p>Individuals or subjects other than natural persons residing in Italy</text:p>
          </table:table-cell>
          <table:table-cell office:value-type="string">
            <text:p>Codice fiscale is the Italian tax identification number and is the\ncode that serves to unambiguously identify individuals or subjects\nother than natural persons residing in Italy. Designed by and for\nthe Italian tax Agency, it is now used for several other purposes,\ne.g. uniquely identifying individuals in the health system, or\nsubjects who act as parties in public or private contracts. The code\nis issued by the Italian tax Agency</text:p>
          </table:table-cell>
          <table:table-cell office:value-type="string">
            <text:p>1.2.1.2 &lt;CodiceFiscale&gt;\n1.3.1.2 &lt;CodiceFiscale&gt;\n1.4.1.2 &lt;CodiceFiscale&gt;</text:p>
          </table:table-cell>
          <table:table-cell office:value-type="string">
            <text:p>UNINFO\nVia Sanfront, 1/C\n10138 Torino\nItaly\nunnfo@uninfo.it\nTel. +39 011 501027</text:p>
          </table:table-cell>
          <table:table-cell table:style-name="ce5" office:value-type="date" office:date-value="2020-12-18">
            <text:p>2020-12-18</text:p>
          </table:table-cell>
          <table:table-cell table:number-columns-repeated="2"/>
          <table:table-cell office:value-type="string">
            <text:p>The code is 16 alphanumeric digits for natural persons or 11\nnumeric digits for legal persons.\nThe code is 16 alphanumeric digits for natural persons, with this\nstructure:\n3 digits - Surname according to specific rules\n3 digits - Name according to specific rules\n2 digits - Last two digits of year of birth\n1 digit - Month of birth according to a specific conversion table\n2 digits - Day of birth and gender\n4 digits - Place of birth in a “Belfiore” code\n1 digit - CIN – Control Internal Number\nThe code is 11 numeric digits for legal persons, with this structure:\n7 digits - Progressive number\n3 digits - Revenue Office ID\n1 digit - check\nLast digit for natural persons - CIN - Control Internal Number\nLast digit for legal persons - Check</text:p>
          </table:table-cell>
          <table:table-cell office:value-type="string">
            <text:p>2020-12-18 16:22:55 UTC</text:p>
          </table:table-cell>
          <table:table-cell table:style-name="ce3" table:number-columns-repeated="16363"/>
        </table:table-row>
        <table:table-row table:style-name="ro1" table:visibility="filter">
          <table:table-cell office:value-type="float" office:value="211">
            <text:p>211</text:p>
          </table:table-cell>
          <table:table-cell table:style-name="ce4" office:value-type="string">
            <text:p>true</text:p>
          </table:table-cell>
          <table:table-cell table:number-columns-repeated="2" office:value-type="string">
            <text:p>PARTITA IVA</text:p>
          </table:table-cell>
          <table:table-cell office:value-type="string">
            <text:p>Electronic Invoicing and e-procurement</text:p>
          </table:table-cell>
          <table:table-cell office:value-type="string">
            <text:p>Agenzia delle Entrate\nVia Giorgione 106\n00147 ROMA\nItaly\ndc.ti.sisd@agenziaentrate.it\nTel. +39 06 50543735</text:p>
          </table:table-cell>
          <table:table-cell table:number-columns-repeated="2"/>
          <table:table-cell office:value-type="string">
            <text:p>0 to 9</text:p>
          </table:table-cell>
          <table:table-cell office:value-type="string">
            <text:p>Italian</text:p>
          </table:table-cell>
          <table:table-cell table:number-columns-repeated="2"/>
          <table:table-cell office:value-type="string">
            <text:p>All business organisations</text:p>
          </table:table-cell>
          <table:table-cell office:value-type="string">
            <text:p>VAT registration number is an identifier used for value added tax\npurposes</text:p>
          </table:table-cell>
          <table:table-cell office:value-type="string">
            <text:p>&lt;IdFiscaleIVA&gt;</text:p>
          </table:table-cell>
          <table:table-cell office:value-type="string">
            <text:p>UNINFO\nVia Sanfront, 1/C\n10138 Torino\nItaly\nunnfo@uninfo.it\nTel. +39 011 501027</text:p>
          </table:table-cell>
          <table:table-cell table:style-name="ce5" office:value-type="date" office:date-value="2020-12-18">
            <text:p>2020-12-18</text:p>
          </table:table-cell>
          <table:table-cell table:number-columns-repeated="2"/>
          <table:table-cell office:value-type="string">
            <text:p>The code is 11 numeric digits\nFirst 7 digits is a progressive number\nThe following 3 digits means the province of residence\nThe last digit is a check number, calculated using Luhn's Algorithm\nThe last digit is a check number, calculated using Luhn's Algorithm</text:p>
          </table:table-cell>
          <table:table-cell office:value-type="string">
            <text:p>2020-12-18 16:43:57 UTC</text:p>
          </table:table-cell>
          <table:table-cell table:style-name="ce3" table:number-columns-repeated="16363"/>
        </table:table-row>
        <table:table-row table:style-name="ro1" table:visibility="filter">
          <table:table-cell office:value-type="float" office:value="212">
            <text:p>212</text:p>
          </table:table-cell>
          <table:table-cell table:style-name="ce4" office:value-type="string">
            <text:p>true</text:p>
          </table:table-cell>
          <table:table-cell table:number-columns-repeated="2" office:value-type="string">
            <text:p>Finnish Organization Identifier</text:p>
          </table:table-cell>
          <table:table-cell office:value-type="string">
            <text:p>Identification scheme will be used for electronic trade purposes in\ne-invoicing, purchasing, electronic receipts</text:p>
          </table:table-cell>
          <table:table-cell office:value-type="string">
            <text:p>State Treasury of Finland / Valtiokonttori\nSörnäisten rantatie 13 P.O.Box 14, 00054 Valtiokonttori, Finland\ntel: +358 295 50 2000\nfax: +358 295 50 3333\nemail: kirjaamo@valtiokonttori.fi\nKeijo Kettunen</text:p>
          </table:table-cell>
          <table:table-cell/>
          <table:table-cell office:value-type="string">
            <text:p>Shall be presented as string so that leading zeros have to be\npresent.\nHyphen shall be present between last two digits.</text:p>
          </table:table-cell>
          <table:table-cell office:value-type="string">
            <text:p>digits 0-9 and hyphen "-"</text:p>
          </table:table-cell>
          <table:table-cell office:value-type="string">
            <text:p>Finnish/Swedish</text:p>
          </table:table-cell>
          <table:table-cell office:value-type="string">
            <text:p>No</text:p>
          </table:table-cell>
          <table:table-cell office:value-type="string">
            <text:p>Organization identifier reallocation is not allowed</text:p>
          </table:table-cell>
          <table:table-cell office:value-type="string">
            <text:p>Private companies, public companies, public organizations,\nassociations</text:p>
          </table:table-cell>
          <table:table-cell office:value-type="string">
            <text:p>Scheme will be used by organizations in</text:p>
          </table:table-cell>
          <table:table-cell office:value-type="string">
            <text:p>Y-tunnus/FO-nummer</text:p>
          </table:table-cell>
          <table:table-cell office:value-type="string">
            <text:p>Finnish Standards Organizafion - SFS\nMalminkatu 34, P.O. Box 130, Helsinki\ntel: +358 9 149 9331\nfax: +358 9 146 4925\nemail: sfs@sfs.fi\nMikko Huttunen</text:p>
          </table:table-cell>
          <table:table-cell table:style-name="ce5" office:value-type="date" office:date-value="2021-02-22">
            <text:p>2021-02-22</text:p>
          </table:table-cell>
          <table:table-cell table:number-columns-repeated="2"/>
          <table:table-cell office:value-type="string">
            <text:p>9999999-9\nnine characters\nlast digit after the hyphen is check character</text:p>
          </table:table-cell>
          <table:table-cell office:value-type="string">
            <text:p>2021-02-22 14:30:44 UTC</text:p>
          </table:table-cell>
          <table:table-cell table:style-name="ce3" table:number-columns-repeated="16363"/>
        </table:table-row>
        <table:table-row table:style-name="ro1" table:visibility="filter">
          <table:table-cell office:value-type="float" office:value="213">
            <text:p>213</text:p>
          </table:table-cell>
          <table:table-cell table:style-name="ce4" office:value-type="string">
            <text:p>true</text:p>
          </table:table-cell>
          <table:table-cell table:number-columns-repeated="2" office:value-type="string">
            <text:p>Finnish Organization Value Add Tax Identifier</text:p>
          </table:table-cell>
          <table:table-cell office:value-type="string">
            <text:p>Identification scheme will be used for electronic trade purposes in\ne-invoicing, purchasing, electronic receipts</text:p>
          </table:table-cell>
          <table:table-cell office:value-type="string">
            <text:p>State Treasury of Finland / Valtiokonttori\nSörnäisten rantatie 13 P.O.Box 14, 00054 Valtiokonttori, Finland\ntel: +358 295 50 2000\nfax: +358 295 50 3333\nemail: kirjaamo@valtiokonttori.fi\nKeijo Kettunen</text:p>
          </table:table-cell>
          <table:table-cell/>
          <table:table-cell office:value-type="string">
            <text:p>Shall be presented as string so that leading zeros have to be\npresent. Two first characters have always fixed value FI.</text:p>
          </table:table-cell>
          <table:table-cell office:value-type="string">
            <text:p>digits 0-9 and FI</text:p>
          </table:table-cell>
          <table:table-cell office:value-type="string">
            <text:p>Finnish/Swedish</text:p>
          </table:table-cell>
          <table:table-cell office:value-type="string">
            <text:p>No</text:p>
          </table:table-cell>
          <table:table-cell office:value-type="string">
            <text:p>OrganizationValue Add Tax identifier reallocation is not allowed</text:p>
          </table:table-cell>
          <table:table-cell office:value-type="string">
            <text:p>Private companies, public companies, public organizations,\nassociations</text:p>
          </table:table-cell>
          <table:table-cell office:value-type="string">
            <text:p>Scheme will be used by organizations in electronic trade. Scheme\ndefines that given VAT identifier belongs to Finnish organization</text:p>
          </table:table-cell>
          <table:table-cell office:value-type="string">
            <text:p>ALV-tunnus/MOMS-nummer</text:p>
          </table:table-cell>
          <table:table-cell office:value-type="string">
            <text:p>Finnish Standards Organizafion - SFS\nMalminkatu 34, P.O. Box 130, Helsinki\ntel: +358 9 149 9331\nfax: +358 9 146 4925\nemail: sfs@sfs.fi\nMikko Huttunen</text:p>
          </table:table-cell>
          <table:table-cell table:style-name="ce5" office:value-type="date" office:date-value="2021-02-22">
            <text:p>2021-02-22</text:p>
          </table:table-cell>
          <table:table-cell table:number-columns-repeated="2"/>
          <table:table-cell office:value-type="string">
            <text:p>FI99999999\nten characters\nnot used</text:p>
          </table:table-cell>
          <table:table-cell office:value-type="string">
            <text:p>2021-02-22 14:35:18 UTC</text:p>
          </table:table-cell>
          <table:table-cell table:style-name="ce3" table:number-columns-repeated="16363"/>
        </table:table-row>
        <table:table-row table:style-name="ro1" table:visibility="filter">
          <table:table-cell office:value-type="float" office:value="214">
            <text:p>214</text:p>
          </table:table-cell>
          <table:table-cell table:style-name="ce4" office:value-type="string">
            <text:p>true</text:p>
          </table:table-cell>
          <table:table-cell table:number-columns-repeated="2" office:value-type="string">
            <text:p>Tradeplace TradePI Standard</text:p>
          </table:table-cell>
          <table:table-cell office:value-type="string">
            <text:p>Tradeplace is an independent company, set up as a joint venture\nof several Home Appliance- and Consumer Electronics\nmanufacturers. Tradeplace has launched their TradePI (Product\nInformation) initiative for home appliances, consumer electronics,\nDIY and affiliated industries that are connected to Tradeplace. The\ninitiative introduces an enhanced standard structure for product\ninformation. The TradePI Standard helps retailers to take full\nadvantage of electronic communication and data processing, as\nthe Internet and ICT are fundamentally changing how products and\nservices are offered, bought, and sold.</text:p>
          </table:table-cell>
          <table:table-cell office:value-type="string">
            <text:p>Tradeplace B.V.\nHerikerbergweg 238\n1101 CM Amsterdam-Zuidoost\nThe Netherlands\nContact: Koen van der Post\nEmail: admin@tradeplace.com\nPhone: +31-20-5788845 (landline) or +44-79-21268860 (mobile)</text:p>
          </table:table-cell>
          <table:table-cell/>
          <table:table-cell office:value-type="string">
            <text:p>The identifier should contain the defined segment separators\nhyphen and octothorpe.\nExample representing a product group: 1108-1#01-000001#001</text:p>
          </table:table-cell>
          <table:table-cell office:value-type="string">
            <text:p>Not applicable</text:p>
          </table:table-cell>
          <table:table-cell office:value-type="string">
            <text:p>English</text:p>
          </table:table-cell>
          <table:table-cell office:value-type="string">
            <text:p>No</text:p>
          </table:table-cell>
          <table:table-cell office:value-type="string">
            <text:p>Not applicable</text:p>
          </table:table-cell>
          <table:table-cell office:value-type="string">
            <text:p>Manufacturers, suppliers, and Trade Partners in the Home\nAppliances, Consumer Electronics, DIY and affiliated industries.</text:p>
          </table:table-cell>
          <table:table-cell office:value-type="string">
            <text:p>The code identifies all elements of the Tradeplace TradePI\nstandard.</text:p>
          </table:table-cell>
          <table:table-cell office:value-type="string">
            <text:p>Not applicable</text:p>
          </table:table-cell>
          <table:table-cell office:value-type="string">
            <text:p>NEN\nPostbus 5059\n2600 GB Delft\nThe Netherlands\nContact: Mrs J. van Zetten\nTel: + 31 15 269 0298\nEmail: jolien.vanzetten@nen.nl</text:p>
          </table:table-cell>
          <table:table-cell table:style-name="ce5" office:value-type="date" office:date-value="2021-05-03">
            <text:p>2021-05-03</text:p>
          </table:table-cell>
          <table:table-cell table:number-columns-repeated="2"/>
          <table:table-cell office:value-type="string">
            <text:p>Defined in line with ISO/IEC 6523 specification -\nFormat: [ICD]-[OID]#[CSI]-[IID]#[VI]\nICD: International Code Designator (4-digit)\nOID: Organisation Identifier (1-character)\nCSI: Code Space Identifier (2-character)\nIID: Item code Identifier (6-character)\nVI: Version identifier (3-digit)</text:p>
          </table:table-cell>
          <table:table-cell office:value-type="string">
            <text:p>2021-05-03 13:44:45 UTC</text:p>
          </table:table-cell>
          <table:table-cell table:style-name="ce3" table:number-columns-repeated="16363"/>
        </table:table-row>
        <table:table-row table:style-name="ro1" table:visibility="filter">
          <table:table-cell office:value-type="float" office:value="215">
            <text:p>215</text:p>
          </table:table-cell>
          <table:table-cell table:style-name="ce4" office:value-type="string">
            <text:p>true</text:p>
          </table:table-cell>
          <table:table-cell table:number-columns-repeated="2" office:value-type="string">
            <text:p>Net service ID</text:p>
          </table:table-cell>
          <table:table-cell office:value-type="string">
            <text:p>Identification scheme will be used for electronic trade purposes in\ne-invoicing, purchasing, electronic receipts</text:p>
          </table:table-cell>
          <table:table-cell office:value-type="string">
            <text:p>Tieto Finland Oy\nKeilalahdentie 2-4\n02150 ESPOO\nFINLAND\ntel: +358 40 867 4580\nemail: harri.korhonen@tietoevry.com</text:p>
          </table:table-cell>
          <table:table-cell/>
          <table:table-cell office:value-type="string">
            <text:p>The Net Service ID (NSI) is a code given to businesses and\norganizations by the e-invoicing Service Provider, example Tieto\nFinland Oy (TietoEVRY)</text:p>
          </table:table-cell>
          <table:table-cell office:value-type="string">
            <text:p>Letters A-Z, digits 0-9</text:p>
          </table:table-cell>
          <table:table-cell office:value-type="string">
            <text:p>Finnish, English</text:p>
          </table:table-cell>
          <table:table-cell office:value-type="string">
            <text:p>Yes</text:p>
          </table:table-cell>
          <table:table-cell office:value-type="string">
            <text:p>Net Service ID code reallocation is not allowed</text:p>
          </table:table-cell>
          <table:table-cell office:value-type="string">
            <text:p>Private companies, public companies, public organizations,\nassociations</text:p>
          </table:table-cell>
          <table:table-cell office:value-type="string">
            <text:p>Scheme will be used by organizations</text:p>
          </table:table-cell>
          <table:table-cell office:value-type="string">
            <text:p>Verkkopalvelutunnus / Net Service ID</text:p>
          </table:table-cell>
          <table:table-cell office:value-type="string">
            <text:p>Finnish Standards Association SFS\nMalminkatu 34, P.O. Box 130, Helsinki\nSirpa Sipola\ntel: +358 9 149 9331, fax: +358 9 146 4925\nemail: sirpa.sipola@sfs.fi</text:p>
          </table:table-cell>
          <table:table-cell table:style-name="ce5" office:value-type="date" office:date-value="2021-12-16">
            <text:p>2021-12-16</text:p>
          </table:table-cell>
          <table:table-cell table:number-columns-repeated="2"/>
          <table:table-cell office:value-type="string">
            <text:p>xxnnnnnnnnnnnnxxxxx\nxx = operator prefix (example TE)\nnnnnnnnnnnnnxxxxx = the organisation identification number of the\nundertaking, which may be a VAT code, or a national organisation\nnumber supplemented by the organisation number with an ICD\ncode in front of the organisation number and may be followed by a\ncompany-specific specification.\nAn example of Net Service ID: TE003701011385TEST\nmax thirty-five (35) characters</text:p>
          </table:table-cell>
          <table:table-cell office:value-type="string">
            <text:p>2021-12-17 12:47:07 UTC</text:p>
          </table:table-cell>
          <table:table-cell table:style-name="ce3" table:number-columns-repeated="16363"/>
        </table:table-row>
        <table:table-row table:style-name="ro1" table:visibility="filter">
          <table:table-cell office:value-type="float" office:value="216">
            <text:p>216</text:p>
          </table:table-cell>
          <table:table-cell table:style-name="ce4" office:value-type="string">
            <text:p>true</text:p>
          </table:table-cell>
          <table:table-cell table:number-columns-repeated="2" office:value-type="string">
            <text:p>OVTcode</text:p>
          </table:table-cell>
          <table:table-cell office:value-type="string">
            <text:p>Identification scheme will be used for electronic trade purposes in\ne-invoicing, purchasing, electronic receipts</text:p>
          </table:table-cell>
          <table:table-cell office:value-type="string">
            <text:p>TIEKE- Tietoyhteiskunnan kehittamiskeskus ry\nPieni Roobertinkatu 9\n00130 HELSINKI\nFINLAND\ntel: +358 40 674 9911\nemail: hanna.niemi-hugaerts@tieke.fi</text:p>
          </table:table-cell>
          <table:table-cell/>
          <table:table-cell office:value-type="string">
            <text:p>The Finnish Business ID (Business Identity Code) is a code given\nto businesses and organizations by The Finnish Patent and\nRegistration Office or The Finnish Tax Administration.</text:p>
          </table:table-cell>
          <table:table-cell office:value-type="string">
            <text:p>Capital letters A-Z, digits 0-9</text:p>
          </table:table-cell>
          <table:table-cell office:value-type="string">
            <text:p>Finnish, English</text:p>
          </table:table-cell>
          <table:table-cell office:value-type="string">
            <text:p>Yes</text:p>
          </table:table-cell>
          <table:table-cell office:value-type="string">
            <text:p>OVT code reallocation is not allowed</text:p>
          </table:table-cell>
          <table:table-cell office:value-type="string">
            <text:p>Private companies, public companies, public organizations,\nassociations</text:p>
          </table:table-cell>
          <table:table-cell office:value-type="string">
            <text:p>Scheme will be used by organizations</text:p>
          </table:table-cell>
          <table:table-cell office:value-type="string">
            <text:p>Finnish: OVT-tunnus</text:p>
          </table:table-cell>
          <table:table-cell office:value-type="string">
            <text:p>Finnish Standards Association SFS\nMalminkatu 34, P.O. Box 130, Helsinki\nSirpa Sipola\ntel: +358 9 149 9331. fax: +358 9 146 4925\nemail: sirpa.sipola@sfs.fi</text:p>
          </table:table-cell>
          <table:table-cell table:style-name="ce5" office:value-type="date" office:date-value="2021-12-16">
            <text:p>2021-12-16</text:p>
          </table:table-cell>
          <table:table-cell table:number-columns-repeated="2"/>
          <table:table-cell office:value-type="string">
            <text:p>0037NNNNNNNNXXXXX\nThe code consists of three parts: Prefix 0037, the Business ID and\nan optional suffix.\nThe 0037 in the beginning is a fixed value. The next eight\ncharacters are the organization's Finnish Business ID (Business\nIdentity Code) without a hyphen. An optional suffix up to five\ncharacters in the end of OVT code can be used, for example, to\nrefer to a department, profit center or location of an organization\nunit. The organization can choose the values of the suffix itself and\nthe organization must take care of the uniqueness of each ID it\nuses.\nThe length of the code is thus 12…17 characters.\n0037 = fixed prefix\nNNNNNNNN = Finnish Business ID (numbers only with possible\nleading zeros)\nXXXXX = optional suffix for organizational part ID [A…Z 0…9]\nAn example of OVT code: 003704944842TST01\nThe length of the code is 12 ... 17 characters</text:p>
          </table:table-cell>
          <table:table-cell office:value-type="string">
            <text:p>2021-12-17 12:50:58 UTC</text:p>
          </table:table-cell>
          <table:table-cell table:style-name="ce3" table:number-columns-repeated="16363"/>
        </table:table-row>
        <table:table-row table:style-name="ro1">
          <table:table-cell office:value-type="float" office:value="217">
            <text:p>217</text:p>
          </table:table-cell>
          <table:table-cell table:style-name="ce4" office:value-type="string">
            <text:p>false</text:p>
          </table:table-cell>
          <table:table-cell office:value-type="string">
            <text:p>Netherlands Chamber of Commerce and Industry establishment number</text:p>
          </table:table-cell>
          <table:table-cell office:value-type="string">
            <text:p>The Netherlands Chamber of Commerce and Industry\nestablishment number</text:p>
          </table:table-cell>
          <table:table-cell office:value-type="string">
            <text:p>Electronic invoicing</text:p>
          </table:table-cell>
          <table:table-cell office:value-type="string">
            <text:p>Kamer van Koophandel\nSint Jacobsstraat 300\n3511 BT Utrecht\nThe Netherlands</text:p>
          </table:table-cell>
          <table:table-cell/>
          <table:table-cell office:value-type="string">
            <text:p>Not applicable (n/a)</text:p>
          </table:table-cell>
          <table:table-cell office:value-type="string">
            <text:p>n/a</text:p>
          </table:table-cell>
          <table:table-cell office:value-type="string">
            <text:p>Dutch, English</text:p>
          </table:table-cell>
          <table:table-cell office:value-type="string">
            <text:p>Yes, establishments (geographically)</text:p>
          </table:table-cell>
          <table:table-cell office:value-type="string">
            <text:p>n/a</text:p>
          </table:table-cell>
          <table:table-cell office:value-type="string">
            <text:p>(establishments of) companies and legal persons</text:p>
          </table:table-cell>
          <table:table-cell table:number-columns-repeated="2" office:value-type="string">
            <text:p>n/a</text:p>
          </table:table-cell>
          <table:table-cell office:value-type="string">
            <text:p>Nederlands Normalisatie Instituut (NEN)\nVlinderweg 6\n2623 AX Delft\nThe Netherlands</text:p>
          </table:table-cell>
          <table:table-cell table:style-name="ce5" office:value-type="date" office:date-value="2022-02-25">
            <text:p>2022-02-25</text:p>
          </table:table-cell>
          <table:table-cell table:number-columns-repeated="2"/>
          <table:table-cell office:value-type="string">
            <text:p>The identifier consists of digits only and has a fixed length (20\ndigits). No separators are required. Structure: [123456789012]\n[12345678] = establishment registration number (12 digits);\norganization registration number (8 digits).\n20</text:p>
          </table:table-cell>
          <table:table-cell office:value-type="string">
            <text:p>2022-02-25 12:08:57 UTC</text:p>
          </table:table-cell>
          <table:table-cell table:style-name="ce3" table:number-columns-repeated="16363"/>
        </table:table-row>
        <table:table-row table:style-name="ro1" table:visibility="filter">
          <table:table-cell office:value-type="float" office:value="218">
            <text:p>218</text:p>
          </table:table-cell>
          <table:table-cell table:style-name="ce4" office:value-type="string">
            <text:p>true</text:p>
          </table:table-cell>
          <table:table-cell table:number-columns-repeated="2" office:value-type="string">
            <text:p>Unified registration number</text:p>
          </table:table-cell>
          <table:table-cell office:value-type="string">
            <text:p>Each legal entity registered with the Register of Enterprises of the Republic\nof Latvia is assigned a unique unified registration number. This unique\nunified registration number is used to identify legal subjects for every\npurpose where it might be necessary, including for the use of the tax\nauthority.</text:p>
          </table:table-cell>
          <table:table-cell office:value-type="string">
            <text:p>The Register of Enterprises of the Republic of Latvia\nAddress: Perses street 2, Riga, LV-1011\nE-mail: pasts@ur.gov.lv\nPhone: +371 67 031 703\nWeb: <text:s/>https://www.ur.gov.lv/en/\nIndividual:\nOtto Daniels Kokars\nE-mail: Otto.daniels.kokars@ur.gov.lv\nPhone: +371 28628343</text:p>
          </table:table-cell>
          <table:table-cell/>
          <table:table-cell office:value-type="string">
            <text:p>Should be always displayed in full, no special requirements.</text:p>
          </table:table-cell>
          <table:table-cell office:value-type="string">
            <text:p>Figure of 0,1,2,3,4,5,6,7,8,9.\nUnicode code-points U+0030 through U+0039</text:p>
          </table:table-cell>
          <table:table-cell office:value-type="string">
            <text:p>Latvian</text:p>
          </table:table-cell>
          <table:table-cell office:value-type="string">
            <text:p>None</text:p>
          </table:table-cell>
          <table:table-cell office:value-type="string">
            <text:p>Never, each identifier is only used once and will always refer to\none subject.</text:p>
          </table:table-cell>
          <table:table-cell office:value-type="string">
            <text:p>Legal entities including:\n• Commercial subjects\n• Associations and foundations\n• Public organizations\n• Public persons and authorities\n• Religious organizations and institutions</text:p>
          </table:table-cell>
          <table:table-cell table:number-columns-repeated="6"/>
          <table:table-cell office:value-type="string">
            <text:p>The unified registration number is an 11-digit code where first\ncharacter can be 4 or 5 or 6 (with the exception of mass media and\npublic-private partnerships whose unified registration number is\nnine digits long).\nUnified registration number classification based on legal entity type:\n• Agricultural (farming and fishing) companies – digits 2 through\n5 can be 0001 or 0101\n• Individual company – digits 2 through 5 can be 0002 or 0102\n• All other commercial subjects – digits 2 through 5 can be 0003\nor 0103 or 0203\n• Non-governmental organizations (except religious institutions)\n– digits 2 through 5 are 0008\n• Religious institutions – digits 2 through 5 are 0801, except\nthose institutions that are registered as tax paying where\nnumbers start with 9000\n• Foreign legal entities – digits 2 through 5 are 0006\n• Mediums of mass information – number consists of 9\ncharacters, where digits 1 through 4 are 0007.\n• Public-private partnerships – number consists of 9 characters\nwhere digits 1 through 3 are 009\nLast character of the 11-digit long code is the control character</text:p>
          </table:table-cell>
          <table:table-cell/>
          <table:table-cell table:style-name="ce3" table:number-columns-repeated="16363"/>
        </table:table-row>
        <table:table-row table:style-name="ro1" table:visibility="filter">
          <table:table-cell office:value-type="float" office:value="219">
            <text:p>219</text:p>
          </table:table-cell>
          <table:table-cell table:style-name="ce4" office:value-type="string">
            <text:p>true</text:p>
          </table:table-cell>
          <table:table-cell table:number-columns-repeated="2" office:value-type="string">
            <text:p>Taxpayer registration code</text:p>
          </table:table-cell>
          <table:table-cell office:value-type="string">
            <text:p>For use in Electronic data interchange (EDI) to identify private and\npublic organizations.</text:p>
          </table:table-cell>
          <table:table-cell office:value-type="string">
            <text:p>State Revenue Service of the Republic of Latvia\nAddress: Talejas iela 1, Rīga, LV-1978\nE-mail: vid@vid.gov.lv ·\nPhone +371 67122689\nWeb: <text:s/>https://www.vid.gov.lv/en\nIndividual: Ingrīda Kareva\nIngrida.kareva@vid.gov.lv</text:p>
          </table:table-cell>
          <table:table-cell/>
          <table:table-cell office:value-type="string">
            <text:p>None</text:p>
          </table:table-cell>
          <table:table-cell office:value-type="string">
            <text:p>Figure of 0,1,2,3,4,5,6,7,8,9.\nUnicode code-points U+0030 through U+0039</text:p>
          </table:table-cell>
          <table:table-cell office:value-type="string">
            <text:p>Latvian</text:p>
          </table:table-cell>
          <table:table-cell office:value-type="string">
            <text:p>None</text:p>
          </table:table-cell>
          <table:table-cell office:value-type="string">
            <text:p>Issued identifiers are not reallocated and reused.</text:p>
          </table:table-cell>
          <table:table-cell office:value-type="string">
            <text:p>Commercial organizations, state agencies, local government\ninstitutions, non-profit associations, foundations.</text:p>
          </table:table-cell>
          <table:table-cell office:value-type="string">
            <text:p>Taxpayer registration code is an identifier of all institutions and\norganizations in Latvia. This code is widely used for various\npurposes, including electronic commerce. Usage of Taxpayer\nregistration code is required in communication between institutions\nand also in communication between private and public\norganizations.</text:p>
          </table:table-cell>
          <table:table-cell office:value-type="string">
            <text:p>Most common alternatives include:\n• Registration code,\n• Reg.code,\n• Registration number,\n• Taxpayer Registration Code,\n• Taxpayer Registration Number.\nLatvian:\n• Nodokļu maksātāja kods,\n• Nodokļu maksātāja reģistrācijas kods,\n• Nodokļu maksātāja reģistrācijas numurs,\n• NMR kods,\n• Reģistrācijas kods,\n• Reģistrācijas numurs</text:p>
          </table:table-cell>
          <table:table-cell office:value-type="string">
            <text:p>Latvian Standard (LVS) Ltd.\nAddress:\n157 K. Valdemara Street, Riga, Latvia</text:p>
          </table:table-cell>
          <table:table-cell table:number-columns-repeated="3"/>
          <table:table-cell office:value-type="string">
            <text:p>Always 11-digit number\nFirst number in code:\n• 9 - the code was originally assigned by the State Revenue\nService\n• 4, 5, or 6 - the code was initially assigned by the Register of\nEnterprises of the Republic of Latvia\nNone</text:p>
          </table:table-cell>
          <table:table-cell/>
          <table:table-cell table:style-name="ce3" table:number-columns-repeated="16363"/>
        </table:table-row>
        <table:table-row table:style-name="ro1">
          <table:table-cell office:value-type="float" office:value="220">
            <text:p>220</text:p>
          </table:table-cell>
          <table:table-cell table:style-name="ce4" office:value-type="string">
            <text:p>false</text:p>
          </table:table-cell>
          <table:table-cell office:value-type="string">
            <text:p>Register of Natural Persons</text:p>
          </table:table-cell>
          <table:table-cell office:value-type="string">
            <text:p>The Register of Natural Persons (hereinafter - the Register)</text:p>
          </table:table-cell>
          <table:table-cell office:value-type="string">
            <text:p>The Register combines the functionality of the current information\nsystem of the Population Register and Civil Register. The Register is\na uniform state registration and recording system of information and\nnatural persons that provides identification of natural persons, data\nprocessing and accumulation, and includes and updates information\nabout civil entries. The data included in the Register is used for\nstatistical surveys, tax forecasting and calculation, organizing of\nelections and other processes of national importance. <text:s/>When\nentering information regarding a person in the Register, the Office of\nCitizenship and Migration Affairs of the Republic of Latvia shall\nassign an automatically generated individual personal identity\nnumber thereto.</text:p>
          </table:table-cell>
          <table:table-cell office:value-type="string">
            <text:p>Office of Citizenship and Migration Affairs of the Republic of Latvia\nAddress:\nČiekurkalna\n1. linija 1, k-3\nLV-1026, Riga\nE-mail: pasts@pmlp.gov.lv\nPhone +371 67209400\nWeb: https://www.pmlp.gov.lv/en\nIndividual:\n• a responsible person on legal issues the manager of the Register\ninformation resources is Svetlana Biseniece (67219410,\npdad@pmlp.gov.lv);\n• a responsible person on the technical issues is Ginta Goldmane\n(67829722, ginta.goldmane@pmlp.gov.lv).</text:p>
          </table:table-cell>
          <table:table-cell table:number-columns-repeated="12"/>
          <table:table-cell office:value-type="string">
            <text:p>11 digits\nAs of 1 July 2017 an individual personal identity number, starting\nwith the digit "3" will be allocated to all persons, regarding whom\ninformation will be included in the Register of Natural Persons\n(initial registration of a person). If a personal identity number\ncontains the date of birth (personal identity numbers until 30 June\n2017 including), as of 1 July 2017 a person shall be entitled to\nchange the personal identity number once.\nIn the previously mentioned cases the personal identity number\nshall consist of eleven digits, ensuring non-repeating of personal\nidentity numbers. The first digit of the personal identity number\nshall be "3", the second digit is a random digit between "2" and "9"\nautomatically generated by the system while the remaining digits\nare random digits between "0" and "9" automatically generated by\nthe system. The first six digits may be separated from the\nremaining five digits by a hyphen.\nExample: 38XXXX-XXXXX\nIn case the person, to whom the personal identity number has</text:p>
          </table:table-cell>
          <table:table-cell table:number-columns-repeated="2"/>
          <table:table-cell table:style-name="ce3" table:number-columns-repeated="16363"/>
        </table:table-row>
        <table:table-row table:style-name="ro1">
          <table:table-cell office:value-type="float" office:value="221">
            <text:p>221</text:p>
          </table:table-cell>
          <table:table-cell table:style-name="ce4" office:value-type="string">
            <text:p>false</text:p>
          </table:table-cell>
          <table:table-cell office:value-type="string">
            <text:p>registered number of the qualified invoice issuer</text:p>
          </table:table-cell>
          <table:table-cell office:value-type="string">
            <text:p>The registered number of the qualified invoice issuer</text:p>
          </table:table-cell>
          <table:table-cell office:value-type="string">
            <text:p>The registered number of the qualified invoice issuer is used on the\ninvoice-based method for Japanese consumption tax, which will be\nimplemented on 1 October 2023.\nUnder the invoice-based method, business entities seeking input tax\ndeductions is required to preserve qualified invoices including\nregistered number of the qualified invoice issuer.</text:p>
          </table:table-cell>
          <table:table-cell office:value-type="string">
            <text:p>Name: National Tax Agency Japan\nAddress: 3-1-1 Kasumigaseki, Chiyoda-ku, Tokyo\nTelephone: +81-3-3581-4161\nFacsimile:\ne-mail:\nthe name of any individual in the IO: Azusa.Fukuda</text:p>
          </table:table-cell>
          <table:table-cell/>
          <table:table-cell office:value-type="string">
            <text:p>None</text:p>
          </table:table-cell>
          <table:table-cell/>
          <table:table-cell office:value-type="string">
            <text:p>Japanese</text:p>
          </table:table-cell>
          <table:table-cell office:value-type="string">
            <text:p>None</text:p>
          </table:table-cell>
          <table:table-cell office:value-type="string">
            <text:p>It is not recycled</text:p>
          </table:table-cell>
          <table:table-cell office:value-type="string">
            <text:p>Business entities that has applied to the tax office and has been\nregistered as a qualified invoice issuer with tax office. （Related\nlaws and regulations: Paragraph 1, Article 57-4 of the Consumption\ntax law）</text:p>
          </table:table-cell>
          <table:table-cell office:value-type="string">
            <text:p>Business entities need to submit application to be registered to\nissue qualified invoices.</text:p>
          </table:table-cell>
          <table:table-cell office:value-type="string">
            <text:p>None</text:p>
          </table:table-cell>
          <table:table-cell office:value-type="string">
            <text:p>Name: Japanese Industrial Standards Committee\nAddress: 1-3-1 Kasumigaseki, Chiyoda-ku, Tokyo\nTelephone: +81-3-3501-9287\nFacsimile: +81-3-3580-8631\ne-mail: krow-uohuoj@meti.go.jp\nthe name of any individual in the SA: Tatsuo Takeshige</text:p>
          </table:table-cell>
          <table:table-cell table:style-name="ce5" office:value-type="date" office:date-value="2022-08-15">
            <text:p>2022-08-15</text:p>
          </table:table-cell>
          <table:table-cell table:number-columns-repeated="2"/>
          <table:table-cell office:value-type="string">
            <text:p>T + 13-digit integer\nFigure of 14 digits\nFigures from 1 to 9\n(Formula to calculate the test number)\nFormula 9 - ((n = 1 (Sigma)12( Pn * Qn )) remainder obtained by\ndividing the 9)\nPn: the numeral of the n-th digit of a fundamental number, when\ncounted from the bottom digit.\nQn: <text:s/>one when the "n" is an odd number, two when the "n" is an\neven one</text:p>
          </table:table-cell>
          <table:table-cell office:value-type="string">
            <text:p>2022-08-15 03:22:03 UTC</text:p>
          </table:table-cell>
          <table:table-cell table:style-name="ce3" table:number-columns-repeated="16363"/>
        </table:table-row>
        <table:table-row table:style-name="ro1" table:visibility="filter">
          <table:table-cell office:value-type="float" office:value="222">
            <text:p>222</text:p>
          </table:table-cell>
          <table:table-cell table:style-name="ce4" office:value-type="string">
            <text:p>true</text:p>
          </table:table-cell>
          <table:table-cell table:number-columns-repeated="2" office:value-type="string">
            <text:p>Metadata Registry Support</text:p>
          </table:table-cell>
          <table:table-cell office:value-type="string">
            <text:p>Database of metadata supporting description of object-data-\ninformation-etc.</text:p>
          </table:table-cell>
          <table:table-cell office:value-type="string">
            <text:p>Farance Inc.\nPO Box 256, New York, NY 10044, USA\nFrank Farance, +1 212 486 4700, frank@farance.com</text:p>
          </table:table-cell>
          <table:table-cell/>
          <table:table-cell office:value-type="string">
            <text:p>None</text:p>
          </table:table-cell>
          <table:table-cell office:value-type="string">
            <text:p>Printable characters, as defined by RFC 3987</text:p>
          </table:table-cell>
          <table:table-cell office:value-type="string">
            <text:p>Not applicable</text:p>
          </table:table-cell>
          <table:table-cell office:value-type="string">
            <text:p>Yes</text:p>
          </table:table-cell>
          <table:table-cell office:value-type="string">
            <text:p>No minimum period</text:p>
          </table:table-cell>
          <table:table-cell office:value-type="string">
            <text:p>As most organizations have some assets, named assets, or\ndescriptions of the organization and its features and components,\ngenerally all organizations are covered.</text:p>
          </table:table-cell>
          <table:table-cell office:value-type="string">
            <text:p>Used for describing organizations and their components, including\nperceivable objects and conceivable objects. <text:s/>ISO/IEC 11179\nmetadata descriptions should be used, but other standardized\nmetadata descriptions are permitted, too.</text:p>
          </table:table-cell>
          <table:table-cell office:value-type="string">
            <text:p>MDRS</text:p>
          </table:table-cell>
          <table:table-cell office:value-type="string">
            <text:p>ANSI\n25 West 43rd Street, 4th Floor, New York, NY 10036 USA\nTel: +1 212 642 4900\nEmail: ISOT@ansi.org\nPerson: ISO Team</text:p>
          </table:table-cell>
          <table:table-cell table:style-name="ce5" office:value-type="date" office:date-value="2022-08-15">
            <text:p>2022-08-15</text:p>
          </table:table-cell>
          <table:table-cell table:number-columns-repeated="2"/>
          <table:table-cell office:value-type="string">
            <text:p>Identifiers based upon RFC 3987 Internationalized Resource\nIdentifiers (IRI)\n2048\nNone</text:p>
          </table:table-cell>
          <table:table-cell office:value-type="string">
            <text:p>2022-08-15 03:34:46 UTC</text:p>
          </table:table-cell>
          <table:table-cell table:style-name="ce3" table:number-columns-repeated="16363"/>
        </table:table-row>
        <table:table-row table:style-name="ro1" table:visibility="filter">
          <table:table-cell office:value-type="float" office:value="223">
            <text:p>223</text:p>
          </table:table-cell>
          <table:table-cell table:style-name="ce4" office:value-type="string">
            <text:p>true</text:p>
          </table:table-cell>
          <table:table-cell table:number-columns-repeated="2" office:value-type="string">
            <text:p>EU based company</text:p>
          </table:table-cell>
          <table:table-cell office:value-type="string">
            <text:p>To provide identifiers for organizations based in EU</text:p>
          </table:table-cell>
          <table:table-cell office:value-type="string">
            <text:p>AIFE (Agence pour l’Informatique Financière de l’Etat)\n10 rue du Centre\n93160 NOISY-LE-GRAND\nFrance</text:p>
          </table:table-cell>
          <table:table-cell/>
          <table:table-cell office:value-type="string">
            <text:p>The identification number is a concatenated string of the\ncharacters, without spaces and left justified</text:p>
          </table:table-cell>
          <table:table-cell office:value-type="string">
            <text:p>A-Z and 0-9</text:p>
          </table:table-cell>
          <table:table-cell office:value-type="string">
            <text:p>French</text:p>
          </table:table-cell>
          <table:table-cell table:number-columns-repeated="2"/>
          <table:table-cell office:value-type="string">
            <text:p>All EU companies which have to be identified in an electronic\ninvoice</text:p>
          </table:table-cell>
          <table:table-cell office:value-type="string">
            <text:p>This identifier is used as an entity identifier for EU companies\nidentified in electronic invoices</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EU Based Company Intracommunity VAT ID up to 18 characters\nmaximum, used in order to identify EU based company in e-\ninvoices\nThis identifier is alphanumeric and composed with 18 characters\nmaximum:\n- It starts with 2 characters which must be the Country code of a\nMember of the European Union\n- Followed with 8 to 16 characters and digits\nNO</text:p>
          </table:table-cell>
          <table:table-cell office:value-type="string">
            <text:p>2024-02-19 19:36:04 UTC</text:p>
          </table:table-cell>
          <table:table-cell table:style-name="ce3" table:number-columns-repeated="16363"/>
        </table:table-row>
        <table:table-row table:style-name="ro1">
          <table:table-cell office:value-type="float" office:value="224">
            <text:p>224</text:p>
          </table:table-cell>
          <table:table-cell table:style-name="ce4" office:value-type="string">
            <text:p>false</text:p>
          </table:table-cell>
          <table:table-cell office:value-type="string">
            <text:p>FTCTC CODE ROUTAGE</text:p>
          </table:table-cell>
          <table:table-cell office:value-type="string">
            <text:p>FRCTC CODE ROUTAGE</text:p>
          </table:table-cell>
          <table:table-cell office:value-type="string">
            <text:p>To provide identifiers used in electronic invoices for routing among\naccredited platforms for the French Continuous Transactional Control\nreform on e-invoicing</text:p>
          </table:table-cell>
          <table:table-cell office:value-type="string">
            <text:p>AIFE (Agence pour l’Informatique Financière de l’Etat)\n10 rue du Centre\n93160 NOISY-LE-GRAND\nFrance\nContact: JEROME NICOLAS\nE-mail: Jerome.nicolas@finances.gouv.fr\nTel: +33 1 57 33 96 18</text:p>
          </table:table-cell>
          <table:table-cell/>
          <table:table-cell office:value-type="string">
            <text:p>The identification number is a concatenated string of the\ncharacters, without spaces and left justified</text:p>
          </table:table-cell>
          <table:table-cell office:value-type="string">
            <text:p>A-Z, a-z, 0-9 and special characters "-", "_", "/"</text:p>
          </table:table-cell>
          <table:table-cell office:value-type="string">
            <text:p>French</text:p>
          </table:table-cell>
          <table:table-cell table:number-columns-repeated="2"/>
          <table:table-cell office:value-type="string">
            <text:p>All Entities / Companies receiving invoices in France in the respect\nof the French Continuous Transactional Control reform</text:p>
          </table:table-cell>
          <table:table-cell office:value-type="string">
            <text:p>This identifier is used as key to identify the e-invoicing Platform on\nwhich a company / entity receives its e-invoices.</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1">
            <text:p>2022-11-21</text:p>
          </table:table-cell>
          <table:table-cell table:number-columns-repeated="2"/>
          <table:table-cell office:value-type="string">
            <text:p>FRCTC CODE ROUTAGE: The identifier is alphanumeric with 100\ncharacters maximum\nThis identifier is alpha numeric with 100 characters maximum\nNO</text:p>
          </table:table-cell>
          <table:table-cell office:value-type="string">
            <text:p>2025-05-06 23:34:17 UTC</text:p>
          </table:table-cell>
          <table:table-cell table:style-name="ce3" table:number-columns-repeated="16363"/>
        </table:table-row>
        <table:table-row table:style-name="ro1" table:visibility="filter">
          <table:table-cell office:value-type="float" office:value="225">
            <text:p>225</text:p>
          </table:table-cell>
          <table:table-cell table:style-name="ce4" office:value-type="string">
            <text:p>true</text:p>
          </table:table-cell>
          <table:table-cell table:number-columns-repeated="2" office:value-type="string">
            <text:p>FRCTC ELECTRONIC ADDRESS</text:p>
          </table:table-cell>
          <table:table-cell office:value-type="string">
            <text:p>To provide identifiers used as electronic addresses in the context of\nthe French Continuous Transactional Control reform on e-invoicing</text:p>
          </table:table-cell>
          <table:table-cell office:value-type="string">
            <text:p>AIFE (Agence pour l’Informatique Financière de l’Etat)\n10 rue du Centre\n93160 NOISY-LE-GRAND\nFrance\nContact: JEROME NICOLAS\nE-mail: Jerome.nicolas@finances.gouv.fr\nTel: +33 1 57 33 96 18</text:p>
          </table:table-cell>
          <table:table-cell/>
          <table:table-cell office:value-type="string">
            <text:p>The identification number is a concatenated string of the\ncharacters, without spaces and left justified</text:p>
          </table:table-cell>
          <table:table-cell office:value-type="string">
            <text:p>A-Z, a-z, 0-9 and special characters "-", "_", "."</text:p>
          </table:table-cell>
          <table:table-cell office:value-type="string">
            <text:p>French</text:p>
          </table:table-cell>
          <table:table-cell table:number-columns-repeated="2"/>
          <table:table-cell office:value-type="string">
            <text:p>All Entities / Companies receiving invoices in France in the respect\nof the French Continuous Transactional Control reform</text:p>
          </table:table-cell>
          <table:table-cell office:value-type="string">
            <text:p>This identifier is used as an electronic address for e-invoices and\nacknowledgement and response messages exchanged in the\nrespect of the French Continuous Transactional Control reform</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FRCTC EA The identifier is alphanumeric with 125 characters\nmaximum\nThis identifier is alpha numeric with 125 characters maximum\nNO</text:p>
          </table:table-cell>
          <table:table-cell office:value-type="string">
            <text:p>2025-06-12 17:55:16 UTC</text:p>
          </table:table-cell>
          <table:table-cell table:style-name="ce3" table:number-columns-repeated="16363"/>
        </table:table-row>
        <table:table-row table:style-name="ro1" table:visibility="filter">
          <table:table-cell office:value-type="float" office:value="226">
            <text:p>226</text:p>
          </table:table-cell>
          <table:table-cell table:style-name="ce4" office:value-type="string">
            <text:p>true</text:p>
          </table:table-cell>
          <table:table-cell table:number-columns-repeated="2" office:value-type="string">
            <text:p>FRCTC Particulier</text:p>
          </table:table-cell>
          <table:table-cell office:value-type="string">
            <text:p>To provide identifiers for French citizen sending invoices to the\nFrench Public Sector</text:p>
          </table:table-cell>
          <table:table-cell office:value-type="string">
            <text:p>AIFE (Agence pour l’Informatique Financière de l’Etat)\n10 rue du Centre\n93160 NOISY-LE-GRAND\nFrance</text:p>
          </table:table-cell>
          <table:table-cell/>
          <table:table-cell office:value-type="string">
            <text:p>The identification number is a concatenated string of the\ncharacters, without spaces and left justified</text:p>
          </table:table-cell>
          <table:table-cell office:value-type="string">
            <text:p>For the first 10 characters, are allowed: 0-9\nFor the following characters (maximum 70), are allowed: A-Z and\nthe special characters "-", "’", ",", ".", "&amp;"</text:p>
          </table:table-cell>
          <table:table-cell office:value-type="string">
            <text:p>French</text:p>
          </table:table-cell>
          <table:table-cell table:number-columns-repeated="2"/>
          <table:table-cell office:value-type="string">
            <text:p>All French citizen who has to send e-invoices to a public entity in\nFrance</text:p>
          </table:table-cell>
          <table:table-cell office:value-type="string">
            <text:p>This identifier is used as a legal identifier for French citizen sending\ninvoices to the French Public Sector.</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FRCTC PARTICULIER: The identifier is alphanumeric with 80\ncharacters maximum\nThis identifier is alpha numeric with 80 characters maximum\n- 10 digits (the NIR) composed with\n- 1 digit = 1 or 2\n- 2 digits (0-9)\n- a 2-digit number between 01 and 12\n- 5 digits (0-9)\n- 70 characters maximum with + the first 35 characters of the last\nname + the first 35 characters of the first name\nNO</text:p>
          </table:table-cell>
          <table:table-cell office:value-type="string">
            <text:p>2023-01-10 16:27:01 UTC</text:p>
          </table:table-cell>
          <table:table-cell table:style-name="ce3" table:number-columns-repeated="16363"/>
        </table:table-row>
        <table:table-row table:style-name="ro1" table:visibility="filter">
          <table:table-cell office:value-type="float" office:value="227">
            <text:p>227</text:p>
          </table:table-cell>
          <table:table-cell table:style-name="ce4" office:value-type="string">
            <text:p>true</text:p>
          </table:table-cell>
          <table:table-cell table:number-columns-repeated="2" office:value-type="string">
            <text:p>NON - EU based company</text:p>
          </table:table-cell>
          <table:table-cell office:value-type="string">
            <text:p>To provide identifiers for organizations based in a country not\nMember of the European Union</text:p>
          </table:table-cell>
          <table:table-cell office:value-type="string">
            <text:p>AIFE (Agence pour l’Informatique Financière de l’Etat)\n10 rue du Centre\n93160 NOISY-LE-GRAND\nFrance</text:p>
          </table:table-cell>
          <table:table-cell/>
          <table:table-cell office:value-type="string">
            <text:p>The identification number is a concatenated string of the\ncharacters, without spaces and left justified</text:p>
          </table:table-cell>
          <table:table-cell office:value-type="string">
            <text:p>A-Z and 0-9\nspecial characters allowed: "-", "'", ",", ".","&amp;"</text:p>
          </table:table-cell>
          <table:table-cell office:value-type="string">
            <text:p>French</text:p>
          </table:table-cell>
          <table:table-cell table:number-columns-repeated="2"/>
          <table:table-cell office:value-type="string">
            <text:p>All Non-EU companies which have to be identified in a electronic\ninvoice</text:p>
          </table:table-cell>
          <table:table-cell office:value-type="string">
            <text:p>This identifier is used as an entity identifier for non-EU companies\nidentified in electronic invoices</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Non EU Based Company up to 18 characters maximum, used in\norder to identify a non EU based company in e-invoices\nThis identifier is alphanumeric and composed with 18 characters\nmaximum\n- It starts with 2 characters which must be the Country code of\ncountry where the company is registered\n- Followed with the first 16 Characters of the company registered\nname\nNO</text:p>
          </table:table-cell>
          <table:table-cell office:value-type="string">
            <text:p>2022-11-21 04:45:30 UTC</text:p>
          </table:table-cell>
          <table:table-cell table:style-name="ce3" table:number-columns-repeated="16363"/>
        </table:table-row>
        <table:table-row table:style-name="ro1" table:visibility="filter">
          <table:table-cell office:value-type="float" office:value="228">
            <text:p>228</text:p>
          </table:table-cell>
          <table:table-cell table:style-name="ce4" office:value-type="string">
            <text:p>true</text:p>
          </table:table-cell>
          <table:table-cell table:number-columns-repeated="2" office:value-type="string">
            <text:p>Répertoire des Entreprises et des Etablissements (RIDET)</text:p>
          </table:table-cell>
          <table:table-cell office:value-type="string">
            <text:p>To provide identifiers for organizations at national level in Nouvelle\nCaledonie (French)</text:p>
          </table:table-cell>
          <table:table-cell office:value-type="string">
            <text:p>AIFE (Agence pour l’Informatique Financière de l’Etat)\n10 rue du Centre\n93160 NOISY-LE-GRAND\nFrance</text:p>
          </table:table-cell>
          <table:table-cell/>
          <table:table-cell office:value-type="string">
            <text:p>The identification number is a concatenated string of the\ncharacters, without spaces and left justified</text:p>
          </table:table-cell>
          <table:table-cell office:value-type="string">
            <text:p>0000000000 to 9999999999</text:p>
          </table:table-cell>
          <table:table-cell office:value-type="string">
            <text:p>French</text:p>
          </table:table-cell>
          <table:table-cell table:number-columns-repeated="2"/>
          <table:table-cell office:value-type="string">
            <text:p>All French companies which have to be registered in Nouvelle\nCalédonie</text:p>
          </table:table-cell>
          <table:table-cell office:value-type="string">
            <text:p>This identifier is used as a legal identifier for French companies\nbased in Nouvelle Caledonie</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RIDET : The identifier is numeric with 10 digits\nThis identifier is numeric, with 10 digits\n- 7 digits for the RID (company ID number)\n- 3 digits for establishment level\nNO</text:p>
          </table:table-cell>
          <table:table-cell office:value-type="string">
            <text:p>2022-11-21 04:51:17 UTC</text:p>
          </table:table-cell>
          <table:table-cell table:style-name="ce3" table:number-columns-repeated="16363"/>
        </table:table-row>
        <table:table-row table:style-name="ro1">
          <table:table-cell office:value-type="float" office:value="229">
            <text:p>229</text:p>
          </table:table-cell>
          <table:table-cell table:style-name="ce4" office:value-type="string">
            <text:p>false</text:p>
          </table:table-cell>
          <table:table-cell office:value-type="string">
            <text:p>T.A.H.I.T.I (traitement automatique hiérarchisé des institutions de Tahiti et des îles)</text:p>
          </table:table-cell>
          <table:table-cell office:value-type="string">
            <text:p>T.A.H.I.T.I (traitement automatique hiérarchisé des institutions de\nTahiti et des îles)</text:p>
          </table:table-cell>
          <table:table-cell office:value-type="string">
            <text:p>To provide identifiers for organizations at national level in TAHITI\n(French)</text:p>
          </table:table-cell>
          <table:table-cell office:value-type="string">
            <text:p>AIFE (Agence pour l’Informatique Financière de l’Etat)\n10 rue du Centre\n93160 NOISY-LE-GRAND\nFrance</text:p>
          </table:table-cell>
          <table:table-cell/>
          <table:table-cell office:value-type="string">
            <text:p>The identification number is a concatenated string of the\ncharacters, without spaces and left justified</text:p>
          </table:table-cell>
          <table:table-cell office:value-type="string">
            <text:p>A-Z and 0-9 for 6 characters completed with 3 digits 0-9\nspecial characters allowed: "-", "’", ",", ".", "&amp;".</text:p>
          </table:table-cell>
          <table:table-cell office:value-type="string">
            <text:p>French</text:p>
          </table:table-cell>
          <table:table-cell table:number-columns-repeated="2"/>
          <table:table-cell office:value-type="string">
            <text:p>All French companies which have to be registered in Tahiti</text:p>
          </table:table-cell>
          <table:table-cell office:value-type="string">
            <text:p>This identifier is used as a legal identifier for French companies\nbased in Tahiti</text:p>
          </table:table-cell>
          <table:table-cell/>
          <table:table-cell office:value-type="string">
            <text:p>Association Française de Normalisation: AFNOR\n11 rue Francis de Pressensé\n93571 La Plaine Saint-Denis Cedex France\n+ 33 1 41 61 80 00</text:p>
          </table:table-cell>
          <table:table-cell table:style-name="ce5" office:value-type="date" office:date-value="2022-11-20">
            <text:p>2022-11-20</text:p>
          </table:table-cell>
          <table:table-cell table:number-columns-repeated="2"/>
          <table:table-cell office:value-type="string">
            <text:p>T.A.H.I.T.I : The identifier is alphanumeric with 9 characters\nThis identifier is alpha numeric with 9 characters\nNO</text:p>
          </table:table-cell>
          <table:table-cell office:value-type="string">
            <text:p>2022-11-21 04:55:54 UTC</text:p>
          </table:table-cell>
          <table:table-cell table:style-name="ce3" table:number-columns-repeated="16363"/>
        </table:table-row>
        <table:table-row table:style-name="ro1" table:visibility="filter">
          <table:table-cell office:value-type="float" office:value="230">
            <text:p>230</text:p>
          </table:table-cell>
          <table:table-cell table:style-name="ce4" office:value-type="string">
            <text:p>true</text:p>
          </table:table-cell>
          <table:table-cell table:number-columns-repeated="2" office:value-type="string">
            <text:p>National e-Invoicing Framework</text:p>
          </table:table-cell>
          <table:table-cell office:value-type="string">
            <text:p>Identifier for organizations</text:p>
          </table:table-cell>
          <table:table-cell office:value-type="string">
            <text:p>Malaysia Digital Economy Corporation Sdn Bhd (MDEC)\n2360 Persiaran APEC,\n63000 Cyberjaya,\nSelangor Darul Ehsan\nMalaysia\nDirector, National e-Invoicing\nEmail: clic@mdec.com.my\nTel: +60 3 8315 3000\nFax: +60 3 8315 3115</text:p>
          </table:table-cell>
          <table:table-cell/>
          <table:table-cell office:value-type="string">
            <text:p>None</text:p>
          </table:table-cell>
          <table:table-cell office:value-type="string">
            <text:p>Alphanumeric (0-9, A-Z, a-z), hyphen (-), underscore (_), and\nperiod (.).</text:p>
          </table:table-cell>
          <table:table-cell office:value-type="string">
            <text:p>English</text:p>
          </table:table-cell>
          <table:table-cell office:value-type="string">
            <text:p>No</text:p>
          </table:table-cell>
          <table:table-cell office:value-type="string">
            <text:p>Reuse is prohibited</text:p>
          </table:table-cell>
          <table:table-cell office:value-type="string">
            <text:p>Any organization participating in Malaysia’s National e-Invoicing\nframework</text:p>
          </table:table-cell>
          <table:table-cell office:value-type="string">
            <text:p>For use in electronic messages in accordance to the National e-\nInvoicing framework on identification of organization</text:p>
          </table:table-cell>
          <table:table-cell office:value-type="string">
            <text:p>None</text:p>
          </table:table-cell>
          <table:table-cell office:value-type="string">
            <text:p>Department of Standards Malaysia\nLevel 4 – 7, Tower 2,\nMenara Cyber Axis, Jalan Impact, Cyber 6\n63000 Cyberjaya,\nSelangor Darul Ehsan\nMalaysia\nDirector, Strategic Planning Division\nTel : +60 3 8008 2900\nFax : +60 3 8008 2901\nEmail : central@jsm.gov.my</text:p>
          </table:table-cell>
          <table:table-cell table:style-name="ce5" office:value-type="date" office:date-value="2023-02-22">
            <text:p>2023-02-22</text:p>
          </table:table-cell>
          <table:table-cell table:number-columns-repeated="2"/>
          <table:table-cell office:value-type="string">
            <text:p>1st field = ICD\n2nd field = Special Identifier (e.g. country identifier, test identifier,\netc)\n3rd field = Organisation identifier\nNo check value</text:p>
          </table:table-cell>
          <table:table-cell office:value-type="string">
            <text:p>2023-02-22 16:16:07 UTC</text:p>
          </table:table-cell>
          <table:table-cell table:style-name="ce3" table:number-columns-repeated="16363"/>
        </table:table-row>
        <table:table-row table:style-name="ro1" table:visibility="filter">
          <table:table-cell office:value-type="float" office:value="231">
            <text:p>231</text:p>
          </table:table-cell>
          <table:table-cell table:style-name="ce4" office:value-type="string">
            <text:p>true</text:p>
          </table:table-cell>
          <table:table-cell table:number-columns-repeated="2" office:value-type="string">
            <text:p>single taxable company</text:p>
          </table:table-cell>
          <table:table-cell office:value-type="string">
            <text:p>Provide identifiers to companies in a single taxable company regime</text:p>
          </table:table-cell>
          <table:table-cell office:value-type="string">
            <text:p>AIFE (Agence pour l’Informatique Financière de l’Etat)\n10 rue du Centre\n93160 NOISY-LE-GRAND\nFrance</text:p>
          </table:table-cell>
          <table:table-cell table:number-columns-repeated="2"/>
          <table:table-cell office:value-type="string">
            <text:p>0-9</text:p>
          </table:table-cell>
          <table:table-cell office:value-type="string">
            <text:p>French</text:p>
          </table:table-cell>
          <table:table-cell table:number-columns-repeated="2"/>
          <table:table-cell office:value-type="string">
            <text:p>All French companies which have to be identified in an electronic\ninvoice</text:p>
          </table:table-cell>
          <table:table-cell office:value-type="string">
            <text:p>This identifier is used as an entity identifier for French companies</text:p>
          </table:table-cell>
          <table:table-cell/>
          <table:table-cell office:value-type="string">
            <text:p>Association Française de Normalisation: AFNOR\n11 rue Francis de Pressensé\n93571 La Plaine Saint-Denis Cedex\nFrance\n+33 1 41 61 80 00</text:p>
          </table:table-cell>
          <table:table-cell table:style-name="ce5" office:value-type="date" office:date-value="2023-09-22">
            <text:p>2023-09-22</text:p>
          </table:table-cell>
          <table:table-cell table:number-columns-repeated="2"/>
          <table:table-cell office:value-type="string">
            <text:p>9 characters maximum, same the SIREN (code 0002)\nThe 9 characters number designates an organization\nNO</text:p>
          </table:table-cell>
          <table:table-cell office:value-type="string">
            <text:p>2023-09-22 04:29:00 UTC</text:p>
          </table:table-cell>
          <table:table-cell table:style-name="ce3" table:number-columns-repeated="16363"/>
        </table:table-row>
        <table:table-row table:style-name="ro1" table:visibility="filter">
          <table:table-cell office:value-type="float" office:value="232">
            <text:p>232</text:p>
          </table:table-cell>
          <table:table-cell table:style-name="ce4" office:value-type="string">
            <text:p>true</text:p>
          </table:table-cell>
          <table:table-cell table:number-columns-repeated="2" office:value-type="string">
            <text:p>NOBB product number</text:p>
          </table:table-cell>
          <table:table-cell office:value-type="string">
            <text:p>Norsk Byggevarebase (NOBB) is a national product information\ndatapool which purpose is to organize and distribute unique product\ninformation to the parties within the construction industry’s value\nchain.</text:p>
          </table:table-cell>
          <table:table-cell office:value-type="string">
            <text:p>Norsk Byggtjeneste AS\nC.J. Hambros Plass 2D, 0164 Oslo, Norway\nEmail: firmapost@byggtjeneste.no\nResponsible : Mikkel Nielsen – CEO\nEmail: mni@byggtjeneste.no</text:p>
          </table:table-cell>
          <table:table-cell/>
          <table:table-cell office:value-type="string">
            <text:p>None</text:p>
          </table:table-cell>
          <table:table-cell office:value-type="string">
            <text:p>NOBB NR : 00000001-99999999\nNRF NR: 0000001-9999999</text:p>
          </table:table-cell>
          <table:table-cell office:value-type="string">
            <text:p>Norwegian, English</text:p>
          </table:table-cell>
          <table:table-cell office:value-type="string">
            <text:p>No</text:p>
          </table:table-cell>
          <table:table-cell office:value-type="string">
            <text:p>n/a</text:p>
          </table:table-cell>
          <table:table-cell office:value-type="string">
            <text:p>Norsk Byggtjeneste As is an independent company, set up as a\njoint venture of several building material manufacturers and\nbuilding material wholesalers and retailers. Norsk Byggtjeneste AS\nhas launched their NOBB NR and NRF NR (Product Information) in\nthe construction industry. The initiative introduces an enhanced\nstandard structure for product information. The standard helps\nretailers and builders to take full advantage of electronic\ncommunication and data processing, as the Internet and ICT are\nfundamentally changing how products and services are offered,\nbought, and sold.</text:p>
          </table:table-cell>
          <table:table-cell office:value-type="string">
            <text:p>Construction product unique identifier</text:p>
          </table:table-cell>
          <table:table-cell office:value-type="string">
            <text:p>NOBB Number &amp; NRF Number</text:p>
          </table:table-cell>
          <table:table-cell office:value-type="string">
            <text:p>Standard Norge\nP.O Box 242, NO-1326 Lysaker, Norway\nLilleakerveien 2A, NO-0283 Oslo\nPostcode:0283\nCountry Norway\nContact name : Jacob Mehus, email: jme@standard.no</text:p>
          </table:table-cell>
          <table:table-cell table:style-name="ce5" office:value-type="date" office:date-value="2023-12-13">
            <text:p>2023-12-13</text:p>
          </table:table-cell>
          <table:table-cell table:number-columns-repeated="2"/>
          <table:table-cell office:value-type="string">
            <text:p>9 characters maximum, same the SIREN (code 0002)\nNOBB Number 8 digit numeric\nNRF Number 7 digit numeric</text:p>
          </table:table-cell>
          <table:table-cell office:value-type="string">
            <text:p>2023-12-13 20:06:22 UTC</text:p>
          </table:table-cell>
          <table:table-cell table:style-name="ce3" table:number-columns-repeated="16363"/>
        </table:table-row>
        <table:table-row table:style-name="ro1" table:visibility="filter">
          <table:table-cell office:value-type="float" office:value="233">
            <text:p>233</text:p>
          </table:table-cell>
          <table:table-cell table:style-name="ce4" office:value-type="string">
            <text:p>true</text:p>
          </table:table-cell>
          <table:table-cell table:number-columns-repeated="2" office:value-type="string">
            <text:p>Elnummer</text:p>
          </table:table-cell>
          <table:table-cell office:value-type="string">
            <text:p>EFObasen (www.efobasen .no) is a national product information\ndatabase which purpose is to organize and distribute unique product\ninformation to the parties within the electrotechnical industry's value\nchain</text:p>
          </table:table-cell>
          <table:table-cell office:value-type="string">
            <text:p>Elektroforeningen\nVollsveien 19, 1366 Lysaker, Norway\nEmail: elektroforeningen@efo.no\nResponsible : Frank Jaegtnes - CEO\nEmail: frank@efo.no</text:p>
          </table:table-cell>
          <table:table-cell/>
          <table:table-cell office:value-type="string">
            <text:p>None</text:p>
          </table:table-cell>
          <table:table-cell office:value-type="string">
            <text:p>EL NR: 1000000 - 9999999</text:p>
          </table:table-cell>
          <table:table-cell office:value-type="string">
            <text:p>Norwegian, English</text:p>
          </table:table-cell>
          <table:table-cell office:value-type="string">
            <text:p>No</text:p>
          </table:table-cell>
          <table:table-cell office:value-type="string">
            <text:p>n/a</text:p>
          </table:table-cell>
          <table:table-cell office:value-type="string">
            <text:p>The Norwegian Electrical Trade Association (Elektroforeningen,\nEFO) is a trade association of suppliers and wholesalers of\nelectrical materials, equipment and solutions. Through the\nelectrical industry's joint product identification scheme\nscheme database (EFObasen), we offer a shared digital platform\nwhere all suppliers and wholesalers can add their products with\naccompanying information and features. The products are also\nassigned a branch ID (EL NR10-99). This creates a marketplace\nfor the products as well as facilitating digitalisation of the entire\nvalue chain all the way to operation and maintenance of building\nand construction works. The database contains approximately\n260,000 unique products and manages the ETIM standard, which\nis strongly represented in the building and construction industry.</text:p>
          </table:table-cell>
          <table:table-cell office:value-type="string">
            <text:p>Electrotechnical product unique identifier</text:p>
          </table:table-cell>
          <table:table-cell office:value-type="string">
            <text:p>Elnummer, Elnumber</text:p>
          </table:table-cell>
          <table:table-cell office:value-type="string">
            <text:p>Standard Norge\nP.O Box 242, NO-1326 Lysaker, Norway\nLilleakerveien 2A, NO-0283 Oslo\nPostcode:0283\nCountry Norway\nContact name : Jacob Mehus, email: jme@standard.no</text:p>
          </table:table-cell>
          <table:table-cell table:style-name="ce5" office:value-type="date" office:date-value="2024-01-31">
            <text:p>2024-01-31</text:p>
          </table:table-cell>
          <table:table-cell table:number-columns-repeated="2"/>
          <table:table-cell office:value-type="string">
            <text:p>Elnumber 7 digit numeric</text:p>
          </table:table-cell>
          <table:table-cell office:value-type="string">
            <text:p>2024-01-31 05:23:50 UTC</text:p>
          </table:table-cell>
          <table:table-cell table:style-name="ce3" table:number-columns-repeated="16363"/>
        </table:table-row>
        <table:table-row table:style-name="ro1" table:visibility="filter">
          <table:table-cell office:value-type="float" office:value="234">
            <text:p>234</text:p>
          </table:table-cell>
          <table:table-cell table:style-name="ce4" office:value-type="string">
            <text:p>true</text:p>
          </table:table-cell>
          <table:table-cell table:number-columns-repeated="2" office:value-type="string">
            <text:p>Toimitusosoite ID</text:p>
          </table:table-cell>
          <table:table-cell office:value-type="string">
            <text:p>Identification scheme is used to identify delivery locations of the\nFinnish government accounting units</text:p>
          </table:table-cell>
          <table:table-cell office:value-type="string">
            <text:p>Valtiokonttori\nSörnäisten rantatie 13, Helsinki\nPL 14, 00054 Valtiokonttori\nFINLAND\nTel: +358 295 50 2000\nemail: kirjaamo@valtiokonttori.fi</text:p>
          </table:table-cell>
          <table:table-cell/>
          <table:table-cell office:value-type="string">
            <text:p>Toimitusosoite ID is used to identify delivery locations of the\nFinnish government accounting units</text:p>
          </table:table-cell>
          <table:table-cell office:value-type="string">
            <text:p>Digits 0-9</text:p>
          </table:table-cell>
          <table:table-cell office:value-type="string">
            <text:p>Finnish, English</text:p>
          </table:table-cell>
          <table:table-cell office:value-type="string">
            <text:p>Yes</text:p>
          </table:table-cell>
          <table:table-cell office:value-type="string">
            <text:p>Not allowed</text:p>
          </table:table-cell>
          <table:table-cell office:value-type="string">
            <text:p>The scheme applies to the Finnish government organisation\naccounting units</text:p>
          </table:table-cell>
          <table:table-cell table:number-columns-repeated="2"/>
          <table:table-cell office:value-type="string">
            <text:p>Finnish Standards Association SFS\nMalminkatu 34, P.O. Box 130, Helsinki, Finland\nTuomo Hirvonen, Tel: +358 9 1499 3432.\nEmail: tunnukset@sfs.fi</text:p>
          </table:table-cell>
          <table:table-cell table:style-name="ce5" office:value-type="date" office:date-value="2024-01-31">
            <text:p>2024-01-31</text:p>
          </table:table-cell>
          <table:table-cell table:number-columns-repeated="2"/>
          <table:table-cell office:value-type="string">
            <text:p>XXXXYYZZZZ\nThe length of the code is 10 characters. The XXXX part is the\naccounting agency ID. YY is used to identify sub-agency. If sub-\nagency is not present, 00 is used. The ZZZZ part is a running\nnumber.\nOnly numbers are allowed [0...9].</text:p>
          </table:table-cell>
          <table:table-cell office:value-type="string">
            <text:p>2024-01-31 05:41:44 UTC</text:p>
          </table:table-cell>
          <table:table-cell table:style-name="ce3" table:number-columns-repeated="16363"/>
        </table:table-row>
        <table:table-row table:style-name="ro1" table:visibility="filter">
          <table:table-cell office:value-type="float" office:value="235">
            <text:p>235</text:p>
          </table:table-cell>
          <table:table-cell table:style-name="ce4" office:value-type="string">
            <text:p>true</text:p>
          </table:table-cell>
          <table:table-cell table:number-columns-repeated="2" office:value-type="string">
            <text:p>UAE Tax Identification Number (TIN)</text:p>
          </table:table-cell>
          <table:table-cell office:value-type="string">
            <text:p>The TIN is a unique number issued by the UAE Federal Tax\nAuthority (FTA) to a range of persons required to be identified for tax\npurposes in the country. Appended to the TIN by the FTA is a\ndesignator of the specific types of tax a person might be registered\n(e.g., VAT, Excise Tax, Corporate Tax) which, in combination with\nthe TIN, is known as the Tax Registration Number. The intended\npurpose is to use the TIN to establish an endpoint ID on the\nOpenPeppol Network</text:p>
          </table:table-cell>
          <table:table-cell office:value-type="string">
            <text:p>Abdulla AIBastaki\nUAE Federal Tax Authority\nEmirates Property Investment Company Building,\nP.O. Box 2440,\nAbu Dhabi, United Arab Emirates\nEmail address: Abdulla.AIBastaki@tax.gov.ae\nPhone number: +971502262255</text:p>
          </table:table-cell>
          <table:table-cell/>
          <table:table-cell office:value-type="string">
            <text:p>[1][23456789][X]: The first digit from the left must always be "1"</text:p>
          </table:table-cell>
          <table:table-cell office:value-type="string">
            <text:p>The second through ninth digit (8 digits) can be a combination of\nany numerical digits [1][23456789][X]. All 8 digits cannot be zero\ni.e. [00000000]</text:p>
          </table:table-cell>
          <table:table-cell office:value-type="string">
            <text:p>English only</text:p>
          </table:table-cell>
          <table:table-cell office:value-type="string">
            <text:p>Explained above as part of "Structure of code"</text:p>
          </table:table-cell>
          <table:table-cell office:value-type="string">
            <text:p>A TIN can never be reallocated to any other business</text:p>
          </table:table-cell>
          <table:table-cell office:value-type="string">
            <text:p>Any organisation whether a commercial enterprise, government\norganisation, charitable entity etc, where required to be identified\nfor tax purposes in the UAE</text:p>
          </table:table-cell>
          <table:table-cell office:value-type="string">
            <text:p>All entities that are obligated to issue and/or receive elnvoice in the\nUAE shall use the TIN allocated by the FTA to uniquely identify\nthemselves (i.e., the TIN shall operate as the endpoint ID) on the\nPeppol Network</text:p>
          </table:table-cell>
          <table:table-cell table:number-columns-repeated="5"/>
          <table:table-cell office:value-type="string">
            <text:p>A TIN comprises of 10 numerical digits:\n• [1]: UAE country identifier in accordance with GCC agreement.\nThis number must always be "1"\n• [23456789]: business identifier, generated automatically by the\nFTA's core tax administration system at the time a person\npresents themselves for registration\n• [X]: check digit (mathematically derived by adopting Luhn's\nalgorithm). Luhn's algorithm is as follows:\na. Multiply each ODD-placed digit by 2\nb. Multiplying each EVEN-placed digit by 1\n0 If the product is less than 10, the number is\nretained as it is\n0 If the product is 10 or more, the units place and\ntens place digits is added to get a single value\nc. Take the sum of the digits from step b above\nd. Mod 10 of the unit's place of the sum of the values in\nstep c above\nA TIN comprises 10 numerical digits.\n[1][23456789][X]: The tenth digit from the left has a check digit</text:p>
          </table:table-cell>
          <table:table-cell/>
          <table:table-cell table:style-name="ce3" table:number-columns-repeated="16363"/>
        </table:table-row>
        <table:table-row table:style-name="ro1" table:visibility="filter">
          <table:table-cell office:value-type="float" office:value="236">
            <text:p>236</text:p>
          </table:table-cell>
          <table:table-cell table:style-name="ce4" office:value-type="string">
            <text:p>true</text:p>
          </table:table-cell>
          <table:table-cell table:number-columns-repeated="2" office:value-type="string">
            <text:p>ToimipaikkalD</text:p>
          </table:table-cell>
          <table:table-cell office:value-type="string">
            <text:p>Identification scheme is used to identify Establishments of Finnish\nRegistered Enterprises.</text:p>
          </table:table-cell>
          <table:table-cell office:value-type="string">
            <text:p>Statistics Finland\nTyöpajankatu 13, Helsinki\nFI-00022 Tilastokeskus\nFINLAND\ntel: +358 29 551 1000\nemail: kiriaamo@stat.fi\ncc: Mr. Ville-Matti Pilviö</text:p>
          </table:table-cell>
          <table:table-cell/>
          <table:table-cell office:value-type="string">
            <text:p>ToimipaikkalD is used to identify Establishments of Finnish\nRegistered Enterprises</text:p>
          </table:table-cell>
          <table:table-cell office:value-type="string">
            <text:p>Digits 9</text:p>
          </table:table-cell>
          <table:table-cell office:value-type="string">
            <text:p>Finnish, Swedish, English</text:p>
          </table:table-cell>
          <table:table-cell office:value-type="string">
            <text:p>Yes</text:p>
          </table:table-cell>
          <table:table-cell office:value-type="string">
            <text:p>Not allowed</text:p>
          </table:table-cell>
          <table:table-cell office:value-type="string">
            <text:p>The scheme applies to all Establishments of all Enterprises in\nFinland</text:p>
          </table:table-cell>
          <table:table-cell office:value-type="string">
            <text:p>This is the Unique ID of all Establishments of Enterprises in\nFinland and is maintained by legislative authority by Statistics\nFinland. Maintenance of the Business Register is decreed in the\nStatistics Act of Finland (2004/280), the EU Regulation 2019/2152\non European business statistics and the Commission implementing\nregulation (EU) 2020/1197</text:p>
          </table:table-cell>
          <table:table-cell office:value-type="string">
            <text:p>EN: The Register of Enterprises and Establishments of Finland\nSE: Finlands Företags- och arbetsställeregistret</text:p>
          </table:table-cell>
          <table:table-cell office:value-type="string">
            <text:p>Finnish Standards Association SFS\nMalminkatu 34, P.O. Box 130, 00100 Helsinki, Finland\nTuomo Hirvonen tel: +358 9 1499 3432.\nemail: tunnukset@sfs.fi</text:p>
          </table:table-cell>
          <table:table-cell table:style-name="ce5" office:value-type="date" office:date-value="2024-06-29">
            <text:p>2024-06-29</text:p>
          </table:table-cell>
          <table:table-cell table:number-columns-repeated="2"/>
          <table:table-cell office:value-type="string">
            <text:p>XXXXXXXZZ with the last two numbers being validation codes\nThe length of the code is 9 characters. The ZZ part is the validation\ncode.\nOnly numbers are allowed [9].</text:p>
          </table:table-cell>
          <table:table-cell office:value-type="string">
            <text:p>2024-06-29 04:00:09 UTC</text:p>
          </table:table-cell>
          <table:table-cell table:style-name="ce3" table:number-columns-repeated="16363"/>
        </table:table-row>
        <table:table-row table:style-name="ro1" table:visibility="filter">
          <table:table-cell office:value-type="float" office:value="237">
            <text:p>237</text:p>
          </table:table-cell>
          <table:table-cell table:style-name="ce4" office:value-type="string">
            <text:p>true</text:p>
          </table:table-cell>
          <table:table-cell table:number-columns-repeated="2" office:value-type="string">
            <text:p>CPR</text:p>
          </table:table-cell>
          <table:table-cell office:value-type="string">
            <text:p>Identify Danish persons based on civil registration number (CPR\nnumber)</text:p>
          </table:table-cell>
          <table:table-cell office:value-type="string">
            <text:p>The Danish Business Authority\nLangelinie Alle 17\nDK-2100 Copenhagen Ø\nDenmark\nAtt. Nemhandel\nTel: +45 35 29 10 00\nE-mail: erst@erst.dk</text:p>
          </table:table-cell>
          <table:table-cell/>
          <table:table-cell office:value-type="string">
            <text:p>10 digits, no space or other separator</text:p>
          </table:table-cell>
          <table:table-cell office:value-type="string">
            <text:p>Digits 0,1,2,3,4,5,6,7,8,9</text:p>
          </table:table-cell>
          <table:table-cell office:value-type="string">
            <text:p>Only digits</text:p>
          </table:table-cell>
          <table:table-cell office:value-type="string">
            <text:p>No</text:p>
          </table:table-cell>
          <table:table-cell office:value-type="string">
            <text:p>N/A</text:p>
          </table:table-cell>
          <table:table-cell office:value-type="string">
            <text:p>Danish civil registration number (CPR number)</text:p>
          </table:table-cell>
          <table:table-cell office:value-type="string">
            <text:p>The scheme with ICD code + CPR number will be used to identify\npersons that are parties to or referenced in electronic transactions\nsuch as electronic invoicing or other B2B exchanges.\nNew ICD code is in required to comply with European Standard for\ne-invoicing (EN 16931-1).</text:p>
          </table:table-cell>
          <table:table-cell office:value-type="string">
            <text:p>N/A</text:p>
          </table:table-cell>
          <table:table-cell office:value-type="string">
            <text:p>Dansk Standard (DS)\n(Danish Standards Foundation)\nGöteborg Plads 1\nDK-2150 Nordhavn\nDenmark</text:p>
          </table:table-cell>
          <table:table-cell table:style-name="ce5" office:value-type="date" office:date-value="2024-07-01">
            <text:p>2024-07-01</text:p>
          </table:table-cell>
          <table:table-cell table:number-columns-repeated="2"/>
          <table:table-cell office:value-type="string">
            <text:p>10 digits eg. 0707614285\n1 - 2 position contains the persons birthday.\n3 - 4 position contains the persons birth month.\n5 - 6 position contains the persons birth year (without century),\n7 - 10 position contains an additional serial number.\nN/A</text:p>
          </table:table-cell>
          <table:table-cell office:value-type="string">
            <text:p>2024-07-01 07:40:28 UTC</text:p>
          </table:table-cell>
          <table:table-cell table:style-name="ce3" table:number-columns-repeated="16363"/>
        </table:table-row>
        <table:table-row table:style-name="ro1" table:visibility="filter">
          <table:table-cell office:value-type="float" office:value="238">
            <text:p>238</text:p>
          </table:table-cell>
          <table:table-cell table:style-name="ce4" office:value-type="string">
            <text:p>true</text:p>
          </table:table-cell>
          <table:table-cell table:number-columns-repeated="2" office:value-type="string">
            <text:p>Plateforme.s agréée.s à la facturation électronique (PPF/PDP)</text:p>
          </table:table-cell>
          <table:table-cell office:value-type="string">
            <text:p>To provide identifiers for E-invoicing Public Platform and Partner\nDematerialisation Platform</text:p>
          </table:table-cell>
          <table:table-cell office:value-type="string">
            <text:p>AIFE (Agence pour l’Informatique Financière de l’Etat)\n10 rue du Centre\n93160 NOISY-LE-GRAND</text:p>
          </table:table-cell>
          <table:table-cell/>
          <table:table-cell office:value-type="string">
            <text:p>The identification number is a concatenated string of characters,\nwithout spaces and left justified</text:p>
          </table:table-cell>
          <table:table-cell office:value-type="string">
            <text:p>A-Z and 0-9 characters</text:p>
          </table:table-cell>
          <table:table-cell office:value-type="string">
            <text:p>French</text:p>
          </table:table-cell>
          <table:table-cell office:value-type="string">
            <text:p>No</text:p>
          </table:table-cell>
          <table:table-cell office:value-type="string">
            <text:p>N/A</text:p>
          </table:table-cell>
          <table:table-cell office:value-type="string">
            <text:p>E-invoicing Public Platform and Partner Dematerialisation Platform</text:p>
          </table:table-cell>
          <table:table-cell office:value-type="string">
            <text:p>This identifier is used as a legal identifier for E-invoicing Public\nPlatform and Partner Dematerialisation Platform</text:p>
          </table:table-cell>
          <table:table-cell office:value-type="string">
            <text:p>N/A</text:p>
          </table:table-cell>
          <table:table-cell office:value-type="string">
            <text:p>Association Française de Normalisation: AFNOR\n11 rue Francis de Pressensé\n93571 La Plaine Saint-Denis Cedex France\n+33 1 41 61 80 00</text:p>
          </table:table-cell>
          <table:table-cell table:style-name="ce5" office:value-type="date" office:date-value="2024-07-01">
            <text:p>2024-07-01</text:p>
          </table:table-cell>
          <table:table-cell table:number-columns-repeated="2"/>
          <table:table-cell office:value-type="string">
            <text:p>Plateforme.s agréée.s à la facturation électronique (PPF/PDP) :\nthe identifier is a string of 30 characters\nThe identifier is a string of 30 characters\nNo</text:p>
          </table:table-cell>
          <table:table-cell office:value-type="string">
            <text:p>2024-07-01 08:07:17 UTC</text:p>
          </table:table-cell>
          <table:table-cell table:style-name="ce3" table:number-columns-repeated="16363"/>
        </table:table-row>
        <table:table-row table:style-name="ro1" table:visibility="filter">
          <table:table-cell office:value-type="float" office:value="239">
            <text:p>239</text:p>
          </table:table-cell>
          <table:table-cell table:style-name="ce4" office:value-type="string">
            <text:p>true</text:p>
          </table:table-cell>
          <table:table-cell table:number-columns-repeated="2" office:value-type="string">
            <text:p>EAEU</text:p>
          </table:table-cell>
          <table:table-cell office:value-type="string">
            <text:p>Maintaining register of object identifiers designed to ensure electronic\ndata interchange among the EAEU Member States, including object\nidentifiers of public key infrastructure.</text:p>
          </table:table-cell>
          <table:table-cell office:value-type="string">
            <text:p>Eurasian Economic Commission\n3/5 Smolensky Boulevard, bid. 1, Moscow 119121\nRussian Federation\nTelephone: +7 (495) 669-24-00\nFax: +7 (495) 669-24-15\nSergei Kovalchuk\ndept_it@eecommission.org</text:p>
          </table:table-cell>
          <table:table-cell/>
          <table:table-cell office:value-type="string">
            <text:p>None</text:p>
          </table:table-cell>
          <table:table-cell office:value-type="string">
            <text:p>numeric digits separated by comma</text:p>
          </table:table-cell>
          <table:table-cell office:value-type="string">
            <text:p>Russian, English</text:p>
          </table:table-cell>
          <table:table-cell office:value-type="string">
            <text:p>Yes</text:p>
          </table:table-cell>
          <table:table-cell office:value-type="string">
            <text:p>None</text:p>
          </table:table-cell>
          <table:table-cell office:value-type="string">
            <text:p>Authorized bodies of the member states of the Eurasian Economic\nUnion, the Eurasian Economic Commission</text:p>
          </table:table-cell>
          <table:table-cell office:value-type="string">
            <text:p>The ICD is primarily intended for the registration of Object\nIdentifiers to be used for the registration of the following:\na) Identification of subject of electronic interaction in information\nsystems\nb) Authorisation of subject electronic interaction in information\nsystems\nc) Type of electronic interaction\nThe OID structure and the inclusion of the ICD therein is given\nbelow:\nlevel 1 : iso( 1 )\nlevel 2: Identified-Organization (3)\nlevel 3: (ICD EEC)\nlevel 4 to n: (defined by EEC)</text:p>
          </table:table-cell>
          <table:table-cell office:value-type="string">
            <text:p>None</text:p>
          </table:table-cell>
          <table:table-cell office:value-type="string">
            <text:p>Federal Agency on Technical Regulating and Metrology\nPresnenskaya embankment, 10-2, Moscow, Russia, 125039\nTel: +7 (495) 547-51-51\nFax: +7 (495) 547-51-60\nE-mail: info@rst.gov.ru</text:p>
          </table:table-cell>
          <table:table-cell table:style-name="ce5" office:value-type="date" office:date-value="2024-08-05">
            <text:p>2024-08-05</text:p>
          </table:table-cell>
          <table:table-cell table:number-columns-repeated="2"/>
          <table:table-cell office:value-type="string">
            <text:p>ICD 4 digits code\nNone</text:p>
          </table:table-cell>
          <table:table-cell office:value-type="string">
            <text:p>2024-08-06 15:36:24 UTC</text:p>
          </table:table-cell>
          <table:table-cell table:style-name="ce3" table:number-columns-repeated="16363"/>
        </table:table-row>
        <table:table-row table:style-name="ro1">
          <table:table-cell office:value-type="float" office:value="240">
            <text:p>240</text:p>
          </table:table-cell>
          <table:table-cell table:style-name="ce4" office:value-type="string">
            <text:p>false</text:p>
          </table:table-cell>
          <table:table-cell office:value-type="string">
            <text:p>Register of legal persons (in French : Répertoire des personnes morales)</text:p>
          </table:table-cell>
          <table:table-cell office:value-type="string">
            <text:p>Register of legal persons (in French : Répertoire des personnes\nmorales)</text:p>
          </table:table-cell>
          <table:table-cell office:value-type="string">
            <text:p>Unique identifier for legal persons in general and more specifically in\nthe domain of electronic invoicing.</text:p>
          </table:table-cell>
          <table:table-cell office:value-type="string">
            <text:p>Centre des technologies de l'information de l'Etat (CTIE)\n560, rue de Neudorf\nL-2220 Luxembourg\nGrand Duchy of Luxembourg\nM. Pierre TRAUSCH (pierre.trausch@ctie.etat.lu)\nhttps://annuaire.public.lu/fr.html?id=471</text:p>
          </table:table-cell>
          <table:table-cell/>
          <table:table-cell office:value-type="string">
            <text:p>None</text:p>
          </table:table-cell>
          <table:table-cell office:value-type="string">
            <text:p>Arabic numerals only (0,1,2,3,4,5,6,7,8,9)</text:p>
          </table:table-cell>
          <table:table-cell office:value-type="string">
            <text:p>French</text:p>
          </table:table-cell>
          <table:table-cell office:value-type="string">
            <text:p>Yes</text:p>
          </table:table-cell>
          <table:table-cell office:value-type="string">
            <text:p>N/A\nNo reuse of identifiers!</text:p>
          </table:table-cell>
          <table:table-cell office:value-type="string">
            <text:p>Legal persons</text:p>
          </table:table-cell>
          <table:table-cell office:value-type="string">
            <text:p>The organization identification scheme is used in many domains as\na unique identifier to identify unambiguously and reliably legal\npersons.</text:p>
          </table:table-cell>
          <table:table-cell office:value-type="string">
            <text:p>- Matricule (also used in French to designate the unique identifier)</text:p>
          </table:table-cell>
          <table:table-cell office:value-type="string">
            <text:p>lnstitut luxembourgeois de la normalisation, de l'accréditation, de la\nsécurité et qualité des produits et services (ILNAS)\n1, avenue du Swing\nL-4367 Belvaux\nGrand Duchy of Luxembourg\nPhone: +352 247-74300\nEmail : info@ilnas.etat.lu\nhttps://annuaire.public.lu/fr.html?id=574</text:p>
          </table:table-cell>
          <table:table-cell table:style-name="ce5" office:value-type="date" office:date-value="2024-12-12">
            <text:p>2024-12-12</text:p>
          </table:table-cell>
          <table:table-cell table:number-columns-repeated="2"/>
          <table:table-cell office:value-type="string">
            <text:p>- 11 characters in total (Arabic numerals only)\n- 4 first digits = year\n- Digits 5-6 = legal form of the legal person\nChecksum: digit 11</text:p>
          </table:table-cell>
          <table:table-cell office:value-type="string">
            <text:p>2024-12-12 08:07:18 UTC</text:p>
          </table:table-cell>
          <table:table-cell table:style-name="ce3" table:number-columns-repeated="16363"/>
        </table:table-row>
        <table:table-row table:style-name="ro1" table:visibility="filter">
          <table:table-cell office:value-type="float" office:value="241">
            <text:p>241</text:p>
          </table:table-cell>
          <table:table-cell table:style-name="ce4" office:value-type="string">
            <text:p>true</text:p>
          </table:table-cell>
          <table:table-cell table:number-columns-repeated="2" office:value-type="string">
            <text:p>Hitachi Rail</text:p>
          </table:table-cell>
          <table:table-cell office:value-type="string">
            <text:p>Identification of assets of the companies working with Hitachi Rail\nrecording in our PLM. It will use as main company identification when\nNATO identification will not be available.</text:p>
          </table:table-cell>
          <table:table-cell office:value-type="string">
            <text:p>Hitachi Rail GTS\n20-22 Rue Grange Dame Rose\n78140 Vélizy-Villacoublay\nFrance\nOlga Frolova\nemail: olga.frolova@urbanandmainlines.com</text:p>
          </table:table-cell>
          <table:table-cell/>
          <table:table-cell office:value-type="string">
            <text:p>&lt;Enterprise code - 5 digits&gt;~&lt;ICD - 4 digits&gt;\ne.g. 15870~0241</text:p>
          </table:table-cell>
          <table:table-cell office:value-type="string">
            <text:p>5 digits from 0 to 9</text:p>
          </table:table-cell>
          <table:table-cell office:value-type="string">
            <text:p>English</text:p>
          </table:table-cell>
          <table:table-cell office:value-type="string">
            <text:p>The system is also used for internal purpose to identify in our PLM\nHitachi Rail companies</text:p>
          </table:table-cell>
          <table:table-cell office:value-type="string">
            <text:p>No reallocation of an allocated identifier is forecast</text:p>
          </table:table-cell>
          <table:table-cell office:value-type="string">
            <text:p>Hitachi Rail subsidiaries, Partners, customers and suppliers of\nHitachi Rail worldwide</text:p>
          </table:table-cell>
          <table:table-cell office:value-type="string">
            <text:p>Identification of companies owning the assets (e.g. Part Numbers,\nDocuments, components) managed in our global PLM</text:p>
          </table:table-cell>
          <table:table-cell office:value-type="string">
            <text:p>Sometimes refer internally as CageCode+ICD (NATO Wording)</text:p>
          </table:table-cell>
          <table:table-cell office:value-type="string">
            <text:p>AFNOR\n11 rue Francis de Pressensé\nF-93571 La Plaine Saint-Denis Cedex\nFrance</text:p>
          </table:table-cell>
          <table:table-cell table:style-name="ce5" office:value-type="date" office:date-value="2025-06-18">
            <text:p>2025-06-18</text:p>
          </table:table-cell>
          <table:table-cell table:number-columns-repeated="2"/>
          <table:table-cell office:value-type="string">
            <text:p>&lt;Enterprise code - 5 digits&gt;~&lt;ICD - 4 digits&gt;\nEnterprise code - 5 digits - no significance</text:p>
          </table:table-cell>
          <table:table-cell office:value-type="string">
            <text:p>2025-06-19 02:39:06 UTC</text:p>
          </table:table-cell>
          <table:table-cell table:style-name="ce3" table:number-columns-repeated="16363"/>
        </table:table-row>
        <table:table-row table:style-name="ro1" table:visibility="filter">
          <table:table-cell office:value-type="float" office:value="242">
            <text:p>242</text:p>
          </table:table-cell>
          <table:table-cell table:style-name="ce4" office:value-type="string">
            <text:p>true</text:p>
          </table:table-cell>
          <table:table-cell table:number-columns-repeated="2" office:value-type="string">
            <text:p>OpenPeppol Service Provider Identification Scheme (SPIS)</text:p>
          </table:table-cell>
          <table:table-cell office:value-type="string">
            <text:p>Identify OpenPeppol Service Providers</text:p>
          </table:table-cell>
          <table:table-cell office:value-type="string">
            <text:p>OpenPeppol AISBL\nRand-point\n1040 Brussels, Belgium\nCorporate ID No. 0848.934.496 (Register of Legal Entities Brussels)\nName: Mr. Eleftherios Leontaridis\nThiseos 28\nPaleo Faliro\n175 62, Greece\ntel: +30 6944245050\nEmail: LLD@netsmart.gr</text:p>
          </table:table-cell>
          <table:table-cell/>
          <table:table-cell office:value-type="string">
            <text:p>Must follow the structure of the identifier</text:p>
          </table:table-cell>
          <table:table-cell office:value-type="string">
            <text:p>Different for each identifier part: the character repertoire\nrepertoire required to express the\n• The mandatory Main ID - digits only\n• The separator between Main ID and Peppol Use Case ID\nmust be a dash('-')\n• The optional Peppol Use Case ID - alphanumeric or\nunderscore\n• The separator between Peppol Use Case ID and Service\nProvider suffix must be a dot ('.')\n• The optional Service Provider Suffix - alphanumeric, dash,\ndot, underscore or tilde</text:p>
          </table:table-cell>
          <table:table-cell office:value-type="string">
            <text:p>English</text:p>
          </table:table-cell>
          <table:table-cell office:value-type="string">
            <text:p>No</text:p>
          </table:table-cell>
          <table:table-cell office:value-type="string">
            <text:p>Identifiers will never be reused</text:p>
          </table:table-cell>
          <table:table-cell office:value-type="string">
            <text:p>OpenPeppol Service Providers only</text:p>
          </table:table-cell>
          <table:table-cell office:value-type="string">
            <text:p>The identifier will have several applications within the Peppol\nNetwork.</text:p>
          </table:table-cell>
          <table:table-cell office:value-type="string">
            <text:p>Not applicable</text:p>
          </table:table-cell>
          <table:table-cell office:value-type="string">
            <text:p>DIN - Deutsches lnstitut fur Normung e.V.\nAttn: Viviane Haß\nBurggrafenstr. 6\n10787 Berlin\nGermany\nEmail: viviane.hass@din.de\nTel: +49 30 2601-2826</text:p>
          </table:table-cell>
          <table:table-cell table:style-name="ce5" office:value-type="date" office:date-value="2025-06-18">
            <text:p>2025-06-18</text:p>
          </table:table-cell>
          <table:table-cell table:number-columns-repeated="2"/>
          <table:table-cell office:value-type="string">
            <text:p>The identifier must follow the following regular expression in a\ncase-insensitive way:\n[0-9]{6}(-[0-9A-Z_]{3,12}(\.[0-9A-Z\-\._~]{3,24})?)?\nThe identifier consists of one to three parts: number of characters\nand their significance, if any\n• The mandatory Main ID - 6 characters\n• The optional Peppol Use Case ID - 3 to 12 characters\n• The optional Service Provider Suffix - 3 to 24 characters\nNot applicable</text:p>
          </table:table-cell>
          <table:table-cell office:value-type="string">
            <text:p>2025-06-23 15:20:26 UTC</text:p>
          </table:table-cell>
          <table:table-cell table:style-name="ce3" table:number-columns-repeated="16363"/>
        </table:table-row>
        <table:table-row table:style-name="ro1" table:visibility="filter">
          <table:table-cell office:value-type="float" office:value="243">
            <text:p>243</text:p>
          </table:table-cell>
          <table:table-cell table:style-name="ce4" office:value-type="string">
            <text:p>true</text:p>
          </table:table-cell>
          <table:table-cell table:number-columns-repeated="2" office:value-type="string">
            <text:p>Business Partner Number</text:p>
          </table:table-cell>
          <table:table-cell office:value-type="string">
            <text:p>To globally uniquely identify business partners in data spaces of the\nmanufacturing industry such as Catena-X, the BPN provides a\nstandardized and unique identifier on a legal entity, site and address\nlevel, so that data can be exchanged between data providers and\nconsumers based on legally binding data exchange contracts.</text:p>
          </table:table-cell>
          <table:table-cell office:value-type="string">
            <text:p>Address: Catena-X Automotive Network e.V.\nReinhardtstr. 58, 10117 Berlin Germany\nPhone: +49 175 5615 954\nResponsable: Johann Schütz\nE-mail: Johann.Schuetz@catena-x.net\nPhone: +49 160 5261172</text:p>
          </table:table-cell>
          <table:table-cell/>
          <table:table-cell office:value-type="string">
            <text:p>BPNL 0000 0000 IF61</text:p>
          </table:table-cell>
          <table:table-cell office:value-type="string">
            <text:p>Alphanumeric, upper case only. Represented as a regular\nexpression: <text:s/>BPN[LSA][A-Z0-9]{10}[A-Z0-9]{2}</text:p>
          </table:table-cell>
          <table:table-cell office:value-type="string">
            <text:p>English</text:p>
          </table:table-cell>
          <table:table-cell office:value-type="string">
            <text:p>N/A</text:p>
          </table:table-cell>
          <table:table-cell office:value-type="string">
            <text:p>No reuse</text:p>
          </table:table-cell>
          <table:table-cell office:value-type="string">
            <text:p>In the context of Catena-X, the organization identification scheme\nis designed to cover a wide range of entities involved in the\nautomotive value chain. This includes, for example:\n- OEMs (Original Equipment Manufacturers)\n- Tier n suppliers\n- Dismantlers and Recyclers\n- IT and service providers\nEssentially, any organization that plays a role in the automotive\nsupply network: from raw materials to end-of-life recycling,\neveryone can be part of the Catena-X ecosystem.</text:p>
          </table:table-cell>
          <table:table-cell office:value-type="string">
            <text:p>In the Catena-X data ecosystem, each participating company must\nbe assigned a unique identifier to enable unambiguous digital\nidentity management. This ensures consistent recognition of\norganizations across the network, supports traceable data sharing,\nand prevents duplication or misidentification within the network. As\nnew data spaces emerge, this identifier must become globally\nunique to assure the same not only within Catena-X, but to assure\nthe unique identification across industrial data spaces.</text:p>
          </table:table-cell>
          <table:table-cell office:value-type="string">
            <text:p>BPN</text:p>
          </table:table-cell>
          <table:table-cell office:value-type="string">
            <text:p>DIN e. V.\nAm DIN-Platz\nBurggrafenstraße 6, 10787 Berlin Germany</text:p>
          </table:table-cell>
          <table:table-cell table:style-name="ce5" office:value-type="date" office:date-value="2025-08-12">
            <text:p>2025-08-12</text:p>
          </table:table-cell>
          <table:table-cell table:number-columns-repeated="2"/>
          <table:table-cell office:value-type="string">
            <text:p>(e.g.) BPNL 0000 0000 IF61\n3 fixed characters for the ICD: "BPN"\n1 character for the classification: L|S|A for Legal, Site or Address\n10 characters for the identifier (alphanumeric)\n2 characters for check sum (2-digit verification algorithm according\nto ISO 7064 MOD 1271-36)</text:p>
          </table:table-cell>
          <table:table-cell office:value-type="string">
            <text:p>2025-10-16 21:41:35 UTC</text:p>
          </table:table-cell>
          <table:table-cell table:style-name="ce3" table:number-columns-repeated="16363"/>
        </table:table-row>
        <table:table-row table:style-name="ro1" table:visibility="filter">
          <table:table-cell office:value-type="float" office:value="244">
            <text:p>244</text:p>
          </table:table-cell>
          <table:table-cell table:style-name="ce4" office:value-type="string">
            <text:p>true</text:p>
          </table:table-cell>
          <table:table-cell table:number-columns-repeated="2" office:value-type="string">
            <text:p>Tax Identification (Tax ID)</text:p>
          </table:table-cell>
          <table:table-cell office:value-type="string">
            <text:p>The Tax Identification (Tax ID) is the national, unique identifier for\nindividuals and organizations in Nigeria, established under the\nNigeria Tax Administration Act (NTAA), 2025. The Tax ID is\ngoverned by the Federal Inland Revenue Service (FIRS) serves as\nthe statutory foundation for identifying all taxable persons and entities\nwithin the country.\nThe Tax ID connects to key reference information that enables the\nclear and unique identification of taxable persons and entities within\nNigeria. Each Tax ID is linked to records that establish a taxpayer's\nobligations and compliance history, thus answering the questions of\n"who is who" and "who is taxable".\nSimply put, the Tax ID database can be regarded as a national\ntaxpayer directory, which greatly enhances transparency,\naccountability, and efficiency in Nigeria's tax administration system.</text:p>
          </table:table-cell>
          <table:table-cell office:value-type="string">
            <text:p>Federal Inland Revenue Service Revenue (FIRS)\nHouse, 20 Sokode Crescent, Zone 5, Wuse, Abuja, Nigeria.\nEmail: mohammed.bawa@firs.gov.ng, sadiq@theaccubin.com\nContact: Mohammed Bawa - Project Manager e-lnvoicing Nigeria</text:p>
          </table:table-cell>
          <table:table-cell/>
          <table:table-cell office:value-type="string">
            <text:p>Displayed as a 13-digit numeric string (e.g., 0000000000244)\nwithout separators.</text:p>
          </table:table-cell>
          <table:table-cell office:value-type="string">
            <text:p>Numeric digits (0-9)</text:p>
          </table:table-cell>
          <table:table-cell office:value-type="string">
            <text:p>English</text:p>
          </table:table-cell>
          <table:table-cell office:value-type="string">
            <text:p>No</text:p>
          </table:table-cell>
          <table:table-cell table:number-columns-repeated="8"/>
          <table:table-cell office:value-type="string">
            <text:p>The Tax Identification (Tax ID) standard specifies the minimum\nreference data, which must be supplied for each Tax ID, including:\n1. Number of characters and their significance (see allocation\nscheme below).\n2. Category of the taxpayer {individual or entity) as recorded in\nofficial registers (NIN for individuals, CAC or relevant registry for\nentities).\n3. Registered address of the taxpayer.\n13 digits for Tax ID assigned to organizations\n- YY - Last two digits of issuance year (e.g., 25 for 2025).\n- SRC -Source of identity: 1 for individuals (NIN-based) 2 for\ncorporate entities (CAC-based).\n- SC - Numeric state code based on national standard (e.g., 24 for\nLagos).\n- HashFragment - 7-digit numeric fragment derived from the NIN or\nCAC Registrat ion Number by extracting only numeric characters\nfrom a cryptographic hash (e.g., SHA-256).\n- CheckDigit - Single-digit checksum calculated using the Luhn\n(Modulus 10) algorithm applied to the preceding numeric portion of\nthe Tax ID .\nValidation is done through internal database cross-checking and\nNIN/CAC registration linkages</text:p>
          </table:table-cell>
          <table:table-cell/>
          <table:table-cell table:style-name="ce3" table:number-columns-repeated="16363"/>
        </table:table-row>
        <table:table-row table:style-name="ro1" table:visibility="filter">
          <table:table-cell office:value-type="float" office:value="245">
            <text:p>245</text:p>
          </table:table-cell>
          <table:table-cell table:style-name="ce4" office:value-type="string">
            <text:p>true</text:p>
          </table:table-cell>
          <table:table-cell table:number-columns-repeated="2" office:value-type="string">
            <text:p>Tax identification number (DIČ)</text:p>
          </table:table-cell>
          <table:table-cell office:value-type="string">
            <text:p>A unique identification number assigned to a tax entity (an individual\nor a legal entity) upon registration.</text:p>
          </table:table-cell>
          <table:table-cell office:value-type="string">
            <text:p>The tax office according to the local jurisdiction of the taxpayer.\nHead office:\nFinancial Directorate of the Slovak Republic\nLazovná 63 , Banská Bystrica\n974 01 <text:s text:c="2"/>Banská Bystrica\nSlovakia</text:p>
          </table:table-cell>
          <table:table-cell/>
          <table:table-cell office:value-type="string">
            <text:p>The DIČ number is given as a single 10-digit number.</text:p>
          </table:table-cell>
          <table:table-cell office:value-type="string">
            <text:p>The DIČ number contains numeric characters from 0-9.</text:p>
          </table:table-cell>
          <table:table-cell office:value-type="string">
            <text:p>Slovak</text:p>
          </table:table-cell>
          <table:table-cell/>
          <table:table-cell office:value-type="string">
            <text:p>When a DIČ number is reassigned, the same DIČ number is\nassigned to the taxpayer, and there is no defined time period for\nreassignment. This DIČ number cannot be assigned to another\nlegal entity or natural person.</text:p>
          </table:table-cell>
          <table:table-cell office:value-type="string">
            <text:p>All legal entities and natural persons who are subject to tax\nregistration under applicable legislation.</text:p>
          </table:table-cell>
          <table:table-cell office:value-type="string">
            <text:p>The tax identification number (DIČ) is an identifier that taxpayers\nare required to provide when dealing with the tax administrator.</text:p>
          </table:table-cell>
          <table:table-cell/>
          <table:table-cell office:value-type="string">
            <text:p>Slovak Office of Standards, Metrology and Testing\nŠtefanovičova 3\nP. O. Box 76\n810 05 Bratislava 15\ninfo@normoff.gov.sk\nMgr. Jana Mikušová\n+421 2 20 907 340\njana.mikusova@normoff.gov.sk</text:p>
          </table:table-cell>
          <table:table-cell table:style-name="ce5" office:value-type="date" office:date-value="2025-10-31">
            <text:p>2025-10-31</text:p>
          </table:table-cell>
          <table:table-cell table:number-columns-repeated="2"/>
          <table:table-cell office:value-type="string">
            <text:p>10 characters (fixed length), the first digit determines the type of\nperson or status of the person:\n1- natural person\n2- legal entity\n3- foreign natural person\n4- foreign legal entity\n5- registered organizational unit\n6- tax representative for the import of goods\n7- VAT group\nThe DIČ number is divisible by 11.</text:p>
          </table:table-cell>
          <table:table-cell office:value-type="string">
            <text:p>2025-10-31 05:05:40 UTC</text:p>
          </table:table-cell>
          <table:table-cell table:style-name="ce3" table:number-columns-repeated="16363"/>
        </table:table-row>
        <table:table-row table:style-name="ro1" table:number-rows-repeated="1048329">
          <table:table-cell table:number-columns-repeated="21"/>
          <table:table-cell table:style-name="ce3" table:number-columns-repeated="16363"/>
        </table:table-row>
        <table:table-row table:style-name="ro1">
          <table:table-cell table:number-columns-repeated="21"/>
          <table:table-cell table:style-name="ce3" table:number-columns-repeated="16363"/>
        </table:table-row>
      </table:table>
      <table:named-expressions/>
      <table:database-ranges>
        <table:database-range table:name="__Anonymous_Sheet_DB__0" table:target-range-address="icd_combined.B1:icd_combined.B246" table:display-filter-buttons="true">
          <table:filter>
            <table:filter-or>
              <table:filter-condition table:value="false" table:operator="=" table:field-number="0"/>
            </table:filter-or>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5.2.7.2$Windows_X86_64 LibreOffice_project/5cbfd1ab6520636bb5f7b99185aa69bd7456825d</meta:generator>
    <dc:creator>Svante Schubert</dc:creator>
    <dc:date>2026-02-28T00:25:07.597899900</dc:date>
    <meta:editing-cycles>3</meta:editing-cycles>
    <meta:editing-duration>PT3M53S</meta:editing-duration>
    <meta:document-statistic meta:table-count="1" meta:cell-count="3321" meta:object-count="0"/>
  </office:meta>
</office:document-meta>
</file>